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0.677cm" svg:y="5.626cm">
            <draw:object draw:notify-on-update-of-ranges="Sheet1.A1:Sheet1.A1 Sheet1.A2:Sheet1.A12 Sheet1.B1:Sheet1.B1 Sheet1.B2:Sheet1.B12 Sheet1.C1:Sheet1.C1 Sheet1.C2:Sheet1.C12 Sheet1.D1:Sheet1.D1 Sheet1.D2:Sheet1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eltatime</text:p>
          </table:table-cell>
          <table:table-cell table:style-name="Default" office:value-type="string" calcext:value-type="string">
            <text:p>Spacial partitioning</text:p>
          </table:table-cell>
          <table:table-cell table:style-name="Default" office:value-type="string" calcext:value-type="string">
            <text:p>Baseline</text:p>
          </table:table-cell>
          <table:table-cell table:style-name="Default" office:value-type="string" calcext:value-type="string">
            <text:p>Iterative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Spacial partitioning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Iterativ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.126165" calcext:value-type="float">
            <text:p>0.126165</text:p>
          </table:table-cell>
          <table:table-cell office:value-type="float" office:value="0.013038" calcext:value-type="float">
            <text:p>0.013038</text:p>
          </table:table-cell>
          <table:table-cell office:value-type="float" office:value="0.13368" calcext:value-type="float">
            <text:p>0.1336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727083" calcext:value-type="float">
            <text:p>0.0727083</text:p>
          </table:table-cell>
          <table:table-cell office:value-type="float" office:value="0.013038" calcext:value-type="float">
            <text:p>0.013038</text:p>
          </table:table-cell>
          <table:table-cell office:value-type="float" office:value="0.13368" calcext:value-type="float">
            <text:p>0.1336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453688" calcext:value-type="float">
            <text:p>0.0453688</text:p>
          </table:table-cell>
          <table:table-cell office:value-type="float" office:value="0.013038" calcext:value-type="float">
            <text:p>0.013038</text:p>
          </table:table-cell>
          <table:table-cell office:value-type="float" office:value="0.13368" calcext:value-type="float">
            <text:p>0.1336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327461" calcext:value-type="float">
            <text:p>0.0327461</text:p>
          </table:table-cell>
          <table:table-cell office:value-type="float" office:value="0.013038" calcext:value-type="float">
            <text:p>0.013038</text:p>
          </table:table-cell>
          <table:table-cell office:value-type="float" office:value="0.13368" calcext:value-type="float">
            <text:p>0.13368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6996" calcext:value-type="float">
            <text:p>0.026996</text:p>
          </table:table-cell>
          <table:table-cell office:value-type="float" office:value="0.013038" calcext:value-type="float">
            <text:p>0.013038</text:p>
          </table:table-cell>
          <table:table-cell office:value-type="float" office:value="0.13368" calcext:value-type="float">
            <text:p>0.13368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31642" calcext:value-type="float">
            <text:p>0.0231642</text:p>
          </table:table-cell>
          <table:table-cell office:value-type="float" office:value="0.013038" calcext:value-type="float">
            <text:p>0.013038</text:p>
          </table:table-cell>
          <table:table-cell office:value-type="float" office:value="0.13368" calcext:value-type="float">
            <text:p>0.13368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3248" calcext:value-type="float">
            <text:p>0.023248</text:p>
          </table:table-cell>
          <table:table-cell office:value-type="float" office:value="0.013038" calcext:value-type="float">
            <text:p>0.013038</text:p>
          </table:table-cell>
          <table:table-cell office:value-type="float" office:value="0.13368" calcext:value-type="float">
            <text:p>0.13368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18848" calcext:value-type="float">
            <text:p>0.0218848</text:p>
          </table:table-cell>
          <table:table-cell office:value-type="float" office:value="0.013038" calcext:value-type="float">
            <text:p>0.013038</text:p>
          </table:table-cell>
          <table:table-cell office:value-type="float" office:value="0.13368" calcext:value-type="float">
            <text:p>0.13368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14954" calcext:value-type="float">
            <text:p>0.0214954</text:p>
          </table:table-cell>
          <table:table-cell office:value-type="float" office:value="0.013038" calcext:value-type="float">
            <text:p>0.013038</text:p>
          </table:table-cell>
          <table:table-cell office:value-type="float" office:value="0.13368" calcext:value-type="float">
            <text:p>0.13368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222932" calcext:value-type="float">
            <text:p>0.0222932</text:p>
          </table:table-cell>
          <table:table-cell office:value-type="float" office:value="0.013038" calcext:value-type="float">
            <text:p>0.013038</text:p>
          </table:table-cell>
          <table:table-cell office:value-type="float" office:value="0.13368" calcext:value-type="float">
            <text:p>0.13368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17132" calcext:value-type="float">
            <text:p>0.0217132</text:p>
          </table:table-cell>
          <table:table-cell office:value-type="float" office:value="0.013038" calcext:value-type="float">
            <text:p>0.013038</text:p>
          </table:table-cell>
          <table:table-cell office:value-type="float" office:value="0.13368" calcext:value-type="float">
            <text:p>0.13368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>
            <draw:frame draw:z-index="1" draw:style-name="gr1" draw:text-style-name="P1" svg:width="15.999cm" svg:height="8.999cm" svg:x="1.471cm" svg:y="0.151cm">
              <draw:object draw:notify-on-update-of-ranges="Sheet1.E1:Sheet1.E1 Sheet1.E2:Sheet1.E12 Sheet1.F1:Sheet1.F1 Sheet1.F2:Sheet1.F12 Sheet1.G1:Sheet1.G1 Sheet1.G2:Sheet1.G12 Sheet1.H1:Sheet1.H1 Sheet1.H2:Sheet1.H1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8">00/00/0000</text:date>, <text:time style:data-style-name="N2" text:time-value="13:52:04.227700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1T20:54:02.973988200</meta:creation-date>
    <dc:date>2026-05-18T15:03:03.198051900</dc:date>
    <meta:editing-duration>PT1H33M36S</meta:editing-duration>
    <meta:editing-cycles>4</meta:editing-cycles>
    <meta:generator>LibreOffice/25.8.5.2$Windows_X86_64 LibreOffice_project/9c8b85f387cc00a89945a79c9e6239f32e450ac2</meta:generator>
    <meta:document-statistic meta:table-count="1" meta:cell-count="96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1.82cm" svg:y="0.316cm" chart:style-name="ch2">
          <text:p>Performance of different depths of sectioning at 1000 boids</text:p>
        </chart:title>
        <chart:subtitle svg:x="4.647cm" svg:y="1.301cm" chart:style-name="ch2">
          <text:p><text:span text:style-name="T1">Using a KD-Tree for spatial partitioning</text:span></text:p>
        </chart:subtitle>
        <chart:legend chart:legend-position="end" svg:x="13.076cm" svg:y="4.017cm" style:legend-expansion="custom" svg:width="2.662cm" svg:height="2.427cm" style:legend-expansion-aspect-ratio="1.09682735887927" chart:style-name="ch3"/>
        <chart:plot-area chart:style-name="ch4" svg:x="1.321cm" svg:y="2.138cm" svg:width="11.255cm" svg:height="5.711cm">
          <chart:coordinate-region svg:x="2.272cm" svg:y="2.341cm" svg:width="10.102cm" svg:height="4.855cm"/>
          <chart:axis chart:dimension="x" chart:name="primary-x" chart:style-name="ch5" chartooo:axis-type="auto">
            <chartooo:date-scale/>
            <chart:title svg:x="5.708cm" svg:y="8.029cm" chart:style-name="ch2">
              <text:p><text:span text:style-name="T2">Sectioning depth</text:span></text:p>
            </chart:title>
            <chart:categories table:cell-range-address="Sheet1.A2:Sheet1.A12"/>
          </chart:axis>
          <chart:axis chart:dimension="y" chart:name="primary-y" chart:style-name="ch5">
            <chart:title svg:x="0.451cm" svg:y="6.462cm" chart:style-name="ch6">
              <text:p><text:span text:style-name="T2">Deltatime (seconds)</text:span></text:p>
            </chart:title>
            <chart:grid chart:style-name="ch7" chart:class="major"/>
          </chart:axis>
          <chart:series chart:style-name="ch8" chart:values-cell-range-address="Sheet1.B2:Sheet1.B12" chart:label-cell-address="Sheet1.B1:Sheet1.B1" chart:class="chart:line">
            <chart:data-point chart:repeated="11"/>
          </chart:series>
          <chart:series chart:style-name="ch9" chart:values-cell-range-address="Sheet1.C2:Sheet1.C12" chart:label-cell-address="Sheet1.C1:Sheet1.C1" chart:class="chart:line">
            <chart:data-point chart:repeated="11"/>
          </chart:series>
          <chart:series chart:style-name="ch10" chart:values-cell-range-address="Sheet1.D2:Sheet1.D12" chart:label-cell-address="Sheet1.D1:Sheet1.D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cial partitioning</text:p>
                <draw:g>
                  <svg:desc>Sheet1.B1:Sheet1.B1</svg:desc>
                </draw:g>
              </table:table-cell>
              <table:table-cell office:value-type="string">
                <text:p>Baseline</text:p>
                <draw:g>
                  <svg:desc>Sheet1.C1:Sheet1.C1</svg:desc>
                </draw:g>
              </table:table-cell>
              <table:table-cell office:value-type="string">
                <text:p>Iterativ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12</svg:desc>
                </draw:g>
              </table:table-cell>
              <table:table-cell office:value-type="float" office:value="0.126165">
                <text:p>0.126165</text:p>
                <draw:g>
                  <svg:desc>Sheet1.B2:Sheet1.B12</svg:desc>
                </draw:g>
              </table:table-cell>
              <table:table-cell office:value-type="float" office:value="0.013038">
                <text:p>0.013038</text:p>
                <draw:g>
                  <svg:desc>Sheet1.C2:Sheet1.C12</svg:desc>
                </draw:g>
              </table:table-cell>
              <table:table-cell office:value-type="float" office:value="0.13368">
                <text:p>0.13368</text:p>
                <draw:g>
                  <svg:desc>Sheet1.D2:Sheet1.D1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727083">
                <text:p>0.0727083</text:p>
              </table:table-cell>
              <table:table-cell office:value-type="float" office:value="0.013038">
                <text:p>0.013038</text:p>
              </table:table-cell>
              <table:table-cell office:value-type="float" office:value="0.13368">
                <text:p>0.1336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453688">
                <text:p>0.0453688</text:p>
              </table:table-cell>
              <table:table-cell office:value-type="float" office:value="0.013038">
                <text:p>0.013038</text:p>
              </table:table-cell>
              <table:table-cell office:value-type="float" office:value="0.13368">
                <text:p>0.1336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327461">
                <text:p>0.0327461</text:p>
              </table:table-cell>
              <table:table-cell office:value-type="float" office:value="0.013038">
                <text:p>0.013038</text:p>
              </table:table-cell>
              <table:table-cell office:value-type="float" office:value="0.13368">
                <text:p>0.1336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26996">
                <text:p>0.026996</text:p>
              </table:table-cell>
              <table:table-cell office:value-type="float" office:value="0.013038">
                <text:p>0.013038</text:p>
              </table:table-cell>
              <table:table-cell office:value-type="float" office:value="0.13368">
                <text:p>0.133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231642">
                <text:p>0.0231642</text:p>
              </table:table-cell>
              <table:table-cell office:value-type="float" office:value="0.013038">
                <text:p>0.013038</text:p>
              </table:table-cell>
              <table:table-cell office:value-type="float" office:value="0.13368">
                <text:p>0.1336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23248">
                <text:p>0.023248</text:p>
              </table:table-cell>
              <table:table-cell office:value-type="float" office:value="0.013038">
                <text:p>0.013038</text:p>
              </table:table-cell>
              <table:table-cell office:value-type="float" office:value="0.13368">
                <text:p>0.1336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218848">
                <text:p>0.0218848</text:p>
              </table:table-cell>
              <table:table-cell office:value-type="float" office:value="0.013038">
                <text:p>0.013038</text:p>
              </table:table-cell>
              <table:table-cell office:value-type="float" office:value="0.13368">
                <text:p>0.1336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214954">
                <text:p>0.0214954</text:p>
              </table:table-cell>
              <table:table-cell office:value-type="float" office:value="0.013038">
                <text:p>0.013038</text:p>
              </table:table-cell>
              <table:table-cell office:value-type="float" office:value="0.13368">
                <text:p>0.1336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222932">
                <text:p>0.0222932</text:p>
              </table:table-cell>
              <table:table-cell office:value-type="float" office:value="0.013038">
                <text:p>0.013038</text:p>
              </table:table-cell>
              <table:table-cell office:value-type="float" office:value="0.13368">
                <text:p>0.133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217132">
                <text:p>0.0217132</text:p>
              </table:table-cell>
              <table:table-cell office:value-type="float" office:value="0.013038">
                <text:p>0.013038</text:p>
              </table:table-cell>
              <table:table-cell office:value-type="float" office:value="0.13368">
                <text:p>0.133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5.2$Windows_X86_64 LibreOffice_project/9c8b85f387cc00a89945a79c9e6239f32e450ac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1.82cm" svg:y="0.316cm" chart:style-name="ch2">
          <text:p>Performance of different depths of sectioning at 1000 boids</text:p>
        </chart:title>
        <chart:subtitle svg:x="4.647cm" svg:y="1.301cm" chart:style-name="ch2">
          <text:p><text:span text:style-name="T1">Using a KD-Tree for spatial partitioning</text:span></text:p>
        </chart:subtitle>
        <chart:legend chart:legend-position="end" svg:x="13.076cm" svg:y="4.017cm" style:legend-expansion="custom" svg:width="2.662cm" svg:height="2.427cm" style:legend-expansion-aspect-ratio="1.09682735887927" chart:style-name="ch3"/>
        <chart:plot-area chart:style-name="ch4" svg:x="1.321cm" svg:y="2.138cm" svg:width="11.255cm" svg:height="5.711cm">
          <chart:coordinate-region svg:x="1.972cm" svg:y="2.34cm" svg:width="10.402cm" svg:height="4.856cm"/>
          <chart:axis chart:dimension="x" chart:name="primary-x" chart:style-name="ch5" chartooo:axis-type="auto">
            <chartooo:date-scale/>
            <chart:title svg:x="5.708cm" svg:y="8.029cm" chart:style-name="ch2">
              <text:p><text:span text:style-name="T2">Sectioning depth</text:span></text:p>
            </chart:title>
            <chart:categories table:cell-range-address="Sheet1.E2:Sheet1.E12"/>
          </chart:axis>
          <chart:axis chart:dimension="y" chart:name="primary-y" chart:style-name="ch5">
            <chart:title svg:x="0.451cm" svg:y="6.418cm" chart:style-name="ch6">
              <text:p><text:span text:style-name="T2">Frames per second</text:span></text:p>
            </chart:title>
            <chart:grid chart:style-name="ch7" chart:class="major"/>
          </chart:axis>
          <chart:series chart:style-name="ch8" chart:values-cell-range-address="Sheet1.F2:Sheet1.F12" chart:label-cell-address="Sheet1.F1:Sheet1.F1" chart:class="chart:line">
            <chart:data-point chart:repeated="11"/>
          </chart:series>
          <chart:series chart:style-name="ch9" chart:values-cell-range-address="Sheet1.G2:Sheet1.G12" chart:label-cell-address="Sheet1.G1:Sheet1.G1" chart:class="chart:line">
            <chart:data-point chart:repeated="11"/>
          </chart:series>
          <chart:series chart:style-name="ch10" chart:values-cell-range-address="Sheet1.H2:Sheet1.H12" chart:label-cell-address="Sheet1.H1:Sheet1.H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cial partitioning</text:p>
                <draw:g>
                  <svg:desc>Sheet1.F1:Sheet1.F1</svg:desc>
                </draw:g>
              </table:table-cell>
              <table:table-cell office:value-type="string">
                <text:p>Baseline</text:p>
                <draw:g>
                  <svg:desc>Sheet1.G1:Sheet1.G1</svg:desc>
                </draw:g>
              </table:table-cell>
              <table:table-cell office:value-type="string">
                <text:p>Iterative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E2:Sheet1.E12</svg:desc>
                </draw:g>
              </table:table-cell>
              <table:table-cell office:value-type="float" office:value="8">
                <text:p>8</text:p>
                <draw:g>
                  <svg:desc>Sheet1.F2:Sheet1.F12</svg:desc>
                </draw:g>
              </table:table-cell>
              <table:table-cell office:value-type="float" office:value="77">
                <text:p>77</text:p>
                <draw:g>
                  <svg:desc>Sheet1.G2:Sheet1.G12</svg:desc>
                </draw:g>
              </table:table-cell>
              <table:table-cell office:value-type="float" office:value="7">
                <text:p>7</text:p>
                <draw:g>
                  <svg:desc>Sheet1.H2:Sheet1.H1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77">
                <text:p>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77">
                <text:p>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77">
                <text:p>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7">
                <text:p>37</text:p>
              </table:table-cell>
              <table:table-cell office:value-type="float" office:value="77">
                <text:p>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77">
                <text:p>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77">
                <text:p>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6">
                <text:p>46</text:p>
              </table:table-cell>
              <table:table-cell office:value-type="float" office:value="77">
                <text:p>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7">
                <text:p>47</text:p>
              </table:table-cell>
              <table:table-cell office:value-type="float" office:value="77">
                <text:p>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77">
                <text:p>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6">
                <text:p>46</text:p>
              </table:table-cell>
              <table:table-cell office:value-type="float" office:value="77">
                <text:p>77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5.2$Windows_X86_64 LibreOffice_project/9c8b85f387cc00a89945a79c9e6239f32e450ac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