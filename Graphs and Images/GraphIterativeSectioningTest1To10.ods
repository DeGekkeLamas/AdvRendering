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656cm" svg:y="5.712cm">
            <draw:object draw:notify-on-update-of-ranges="Sheet1.A1:Sheet1.A1 Sheet1.A2:Sheet1.A12 Sheet1.B1:Sheet1.B1 Sheet1.B2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993cm" svg:y="5.885cm">
            <draw:object draw:notify-on-update-of-ranges="Sheet1.E1:Sheet1.E1 Sheet1.E2:Sheet1.E12 Sheet1.F1:Sheet1.F1 Sheet1.F2:Sheet1.F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ltatime</text:p>
          </table:table-cell>
          <table:table-cell table:style-name="Default" office:value-type="string" calcext:value-type="string">
            <text:p>1000 Boids</text:p>
          </table:table-cell>
          <table:table-cell table:number-columns-repeated="2"/>
          <table:table-cell office:value-type="string" calcext:value-type="string">
            <text:p>FPS</text:p>
          </table:table-cell>
          <table:table-cell office:value-type="string" calcext:value-type="string">
            <text:p>1000 Boid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126165" calcext:value-type="float">
            <text:p>0.1261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27083" calcext:value-type="float">
            <text:p>0.07270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53688" calcext:value-type="float">
            <text:p>0.04536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27461" calcext:value-type="float">
            <text:p>0.032746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6996" calcext:value-type="float">
            <text:p>0.02699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31642" calcext:value-type="float">
            <text:p>0.023164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3248" calcext:value-type="float">
            <text:p>0.02324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18848" calcext:value-type="float">
            <text:p>0.021884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14954" calcext:value-type="float">
            <text:p>0.02149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22932" calcext:value-type="float">
            <text:p>0.022293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17132" calcext:value-type="float">
            <text:p>0.021713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1T20:54:02.973988200</meta:creation-date>
    <dc:date>2026-05-11T21:11:40.758674600</dc:date>
    <meta:editing-duration>PT6M44S</meta:editing-duration>
    <meta:editing-cycles>2</meta:editing-cycles>
    <meta:generator>LibreOffice/25.8.5.2$Windows_X86_64 LibreOffice_project/9c8b85f387cc00a89945a79c9e6239f32e450ac2</meta:generator>
    <meta:document-statistic meta:table-count="1" meta:cell-count="48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5cm" svg:y="4.198cm" style:legend-expansion="high" chart:style-name="ch2"/>
        <chart:plot-area chart:style-name="ch3" svg:x="1.321cm" svg:y="0.18cm" svg:width="11.214cm" svg:height="7.669cm">
          <chart:coordinate-region svg:x="2.272cm" svg:y="0.383cm" svg:width="10.061cm" svg:height="6.813cm"/>
          <chart:axis chart:dimension="x" chart:name="primary-x" chart:style-name="ch4" chartooo:axis-type="auto">
            <chartooo:date-scale/>
            <chart:title svg:x="5.688cm" svg:y="8.029cm" chart:style-name="ch5">
              <text:p><text:span text:style-name="T1">Sectioning depth</text:span></text:p>
            </chart:title>
            <chart:categories table:cell-range-address="Sheet1.A2:Sheet1.A12"/>
          </chart:axis>
          <chart:axis chart:dimension="y" chart:name="primary-y" chart:style-name="ch4">
            <chart:title svg:x="0.451cm" svg:y="5.483cm" chart:style-name="ch6">
              <text:p><text:span text:style-name="T1">Deltatime (seconds)</text:span></text:p>
            </chart:title>
            <chart:grid chart:style-name="ch7" chart:class="major"/>
          </chart:axis>
          <chart:series chart:style-name="ch8" chart:values-cell-range-address="Sheet1.B2:Sheet1.B12" chart:label-cell-address="Sheet1.B1:Sheet1.B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 Boid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0.126165">
                <text:p>0.126165</text:p>
                <draw:g>
                  <svg:desc>Sheet1.B2:Sheet1.B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727083">
                <text:p>0.072708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53688">
                <text:p>0.04536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27461">
                <text:p>0.03274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6996">
                <text:p>0.0269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31642">
                <text:p>0.023164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3248">
                <text:p>0.0232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218848">
                <text:p>0.02188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14954">
                <text:p>0.02149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222932">
                <text:p>0.02229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17132">
                <text:p>0.02171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5cm" svg:y="4.198cm" style:legend-expansion="high" chart:style-name="ch2"/>
        <chart:plot-area chart:style-name="ch3" svg:x="1.321cm" svg:y="0.18cm" svg:width="11.214cm" svg:height="7.669cm">
          <chart:coordinate-region svg:x="1.972cm" svg:y="0.382cm" svg:width="10.362cm" svg:height="6.814cm"/>
          <chart:axis chart:dimension="x" chart:name="primary-x" chart:style-name="ch4" chartooo:axis-type="auto">
            <chartooo:date-scale/>
            <chart:title svg:x="5.688cm" svg:y="8.029cm" chart:style-name="ch5">
              <text:p><text:span text:style-name="T1">Sectioning depth</text:span></text:p>
            </chart:title>
            <chart:categories table:cell-range-address="Sheet1.E2:Sheet1.E12"/>
          </chart:axis>
          <chart:axis chart:dimension="y" chart:name="primary-y" chart:style-name="ch4">
            <chart:title svg:x="0.451cm" svg:y="5.439cm" chart:style-name="ch6">
              <text:p><text:span text:style-name="T1">Frames per second</text:span></text:p>
            </chart:title>
            <chart:grid chart:style-name="ch7" chart:class="major"/>
          </chart:axis>
          <chart:series chart:style-name="ch8" chart:values-cell-range-address="Sheet1.F2:Sheet1.F12" chart:label-cell-address="Sheet1.F1:Sheet1.F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 Boids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E2:Sheet1.E12</svg:desc>
                </draw:g>
              </table:table-cell>
              <table:table-cell office:value-type="float" office:value="8">
                <text:p>8</text:p>
                <draw:g>
                  <svg:desc>Sheet1.F2:Sheet1.F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