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633cm" svg:y="11.109cm">
            <draw:object draw:notify-on-update-of-ranges="Sheet1.A13:Sheet1.A13 Sheet1.A14:Sheet1.A24 Sheet1.B13:Sheet1.B13 Sheet1.B14:Sheet1.B24 Sheet1.C13:Sheet1.C13 Sheet1.C14:Sheet1.C24 Sheet1.D13:Sheet1.D13 Sheet1.D14:Sheet1.D24 Sheet1.E13:Sheet1.E13 Sheet1.E14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eltati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Iterative with sectioning (Depth 3)</text:p>
          </table:table-cell>
          <table:table-cell table:number-columns-repeated="2"/>
          <table:table-cell office:value-type="string" calcext:value-type="string">
            <text:p>FP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Iterative with sectioning (Depth 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670319" calcext:value-type="float">
            <text:p>0.000670319</text:p>
          </table:table-cell>
          <table:table-cell table:style-name="ce1" office:value-type="float" office:value="0.000583849" calcext:value-type="float">
            <text:p>0.000583849</text:p>
          </table:table-cell>
          <table:table-cell table:style-name="ce1" office:value-type="float" office:value="0.000712757" calcext:value-type="float">
            <text:p>0.000712757</text:p>
          </table:table-cell>
          <table:table-cell table:style-name="ce1" office:value-type="float" office:value="0.000645597" calcext:value-type="float">
            <text:p>0.0006455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713" calcext:value-type="float">
            <text:p>1713</text:p>
          </table:table-cell>
          <table:table-cell office:value-type="float" office:value="1403" calcext:value-type="float">
            <text:p>1403</text:p>
          </table:table-cell>
          <table:table-cell table:style-name="ce1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217253" calcext:value-type="float">
            <text:p>0.00217253</text:p>
          </table:table-cell>
          <table:table-cell table:style-name="ce1" office:value-type="float" office:value="0.00297233" calcext:value-type="float">
            <text:p>0.00297233</text:p>
          </table:table-cell>
          <table:table-cell table:style-name="ce1" office:value-type="float" office:value="0.00310502" calcext:value-type="float">
            <text:p>0.00310502</text:p>
          </table:table-cell>
          <table:table-cell table:style-name="ce1" office:value-type="float" office:value="0.00251276" calcext:value-type="float">
            <text:p>0.0025127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322" calcext:value-type="float">
            <text:p>3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343093" calcext:value-type="float">
            <text:p>0.00343093</text:p>
          </table:table-cell>
          <table:table-cell table:style-name="ce1" office:value-type="float" office:value="0.00423431" calcext:value-type="float">
            <text:p>0.00423431</text:p>
          </table:table-cell>
          <table:table-cell table:style-name="ce1" office:value-type="float" office:value="0.00814696" calcext:value-type="float">
            <text:p>0.00814696</text:p>
          </table:table-cell>
          <table:table-cell table:style-name="ce1" office:value-type="float" office:value="0.00510107" calcext:value-type="float">
            <text:p>0.0051010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  <table:table-cell office:value-type="float" office:value="123" calcext:value-type="float">
            <text:p>1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0439708" calcext:value-type="float">
            <text:p>0.00439708</text:p>
          </table:table-cell>
          <table:table-cell table:style-name="ce1" office:value-type="float" office:value="0.00550712" calcext:value-type="float">
            <text:p>0.00550712</text:p>
          </table:table-cell>
          <table:table-cell table:style-name="ce1" office:value-type="float" office:value="0.0151171" calcext:value-type="float">
            <text:p>0.0151171</text:p>
          </table:table-cell>
          <table:table-cell table:style-name="ce1" office:value-type="float" office:value="0.00719853" calcext:value-type="float">
            <text:p>0.0071985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0.00555424" calcext:value-type="float">
            <text:p>0.00555424</text:p>
          </table:table-cell>
          <table:table-cell table:style-name="ce1" office:value-type="float" office:value="0.00683802" calcext:value-type="float">
            <text:p>0.00683802</text:p>
          </table:table-cell>
          <table:table-cell table:style-name="ce1" office:value-type="float" office:value="0.0252553" calcext:value-type="float">
            <text:p>0.0252553</text:p>
          </table:table-cell>
          <table:table-cell table:style-name="ce1" office:value-type="float" office:value="0.0109054" calcext:value-type="float">
            <text:p>0.010905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698604" calcext:value-type="float">
            <text:p>0.00698604</text:p>
          </table:table-cell>
          <table:table-cell table:style-name="ce1" office:value-type="float" office:value="0.00793325" calcext:value-type="float">
            <text:p>0.00793325</text:p>
          </table:table-cell>
          <table:table-cell table:style-name="ce1" office:value-type="float" office:value="0.0365434" calcext:value-type="float">
            <text:p>0.0365434</text:p>
          </table:table-cell>
          <table:table-cell table:style-name="ce1" office:value-type="float" office:value="0.0135906" calcext:value-type="float">
            <text:p>0.01359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0.00880191" calcext:value-type="float">
            <text:p>0.00880191</text:p>
          </table:table-cell>
          <table:table-cell table:style-name="ce1" office:value-type="float" office:value="0.00933804" calcext:value-type="float">
            <text:p>0.00933804</text:p>
          </table:table-cell>
          <table:table-cell table:style-name="ce1" office:value-type="float" office:value="0.0523307" calcext:value-type="float">
            <text:p>0.0523307</text:p>
          </table:table-cell>
          <table:table-cell table:style-name="ce1" office:value-type="float" office:value="0.0177779" calcext:value-type="float">
            <text:p>0.017777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float" office:value="0.00982045" calcext:value-type="float">
            <text:p>0.00982045</text:p>
          </table:table-cell>
          <table:table-cell table:style-name="ce1" office:value-type="float" office:value="0.0106613" calcext:value-type="float">
            <text:p>0.0106613</text:p>
          </table:table-cell>
          <table:table-cell table:style-name="ce1" office:value-type="float" office:value="0.066306" calcext:value-type="float">
            <text:p>0.066306</text:p>
          </table:table-cell>
          <table:table-cell table:style-name="ce1" office:value-type="float" office:value="0.0203954" calcext:value-type="float">
            <text:p>0.0203954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0.0105244" calcext:value-type="float">
            <text:p>0.0105244</text:p>
          </table:table-cell>
          <table:table-cell table:style-name="ce1" office:value-type="float" office:value="0.0121985" calcext:value-type="float">
            <text:p>0.0121985</text:p>
          </table:table-cell>
          <table:table-cell table:style-name="ce1" office:value-type="float" office:value="0.0853853" calcext:value-type="float">
            <text:p>0.0853853</text:p>
          </table:table-cell>
          <table:table-cell table:style-name="ce1" office:value-type="float" office:value="0.0254255" calcext:value-type="float">
            <text:p>0.025425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float" office:value="0.0126935" calcext:value-type="float">
            <text:p>0.0126935</text:p>
          </table:table-cell>
          <table:table-cell table:style-name="ce1" office:value-type="float" office:value="0.0141512" calcext:value-type="float">
            <text:p>0.0141512</text:p>
          </table:table-cell>
          <table:table-cell table:style-name="ce1" office:value-type="float" office:value="0.111801" calcext:value-type="float">
            <text:p>0.111801</text:p>
          </table:table-cell>
          <table:table-cell table:style-name="ce1" office:value-type="float" office:value="0.0293164" calcext:value-type="float">
            <text:p>0.0293164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13038" calcext:value-type="float">
            <text:p>0.013038</text:p>
          </table:table-cell>
          <table:table-cell table:style-name="ce1" office:value-type="float" office:value="0.01496" calcext:value-type="float">
            <text:p>0.01496</text:p>
          </table:table-cell>
          <table:table-cell table:style-name="ce1" office:value-type="float" office:value="0.13368" calcext:value-type="float">
            <text:p>0.13368</text:p>
          </table:table-cell>
          <table:table-cell table:style-name="ce1" office:value-type="float" office:value="0.0362682" calcext:value-type="float">
            <text:p>0.036268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eltati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Iterative with sectioning (Depth 3)</text:p>
          </table:table-cell>
          <table:table-cell table:number-columns-repeated="2"/>
          <table:table-cell office:value-type="string" calcext:value-type="string">
            <text:p>FP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Iterative with sectioning (Depth 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670319" calcext:value-type="float">
            <text:p>0.000670319</text:p>
          </table:table-cell>
          <table:table-cell table:style-name="ce1" office:value-type="float" office:value="0.000583849" calcext:value-type="float">
            <text:p>0.000583849</text:p>
          </table:table-cell>
          <table:table-cell table:style-name="ce1" office:value-type="float" office:value="0.000712757" calcext:value-type="float">
            <text:p>0.000712757</text:p>
          </table:table-cell>
          <table:table-cell table:style-name="ce1" office:value-type="float" office:value="0.000645597" calcext:value-type="float">
            <text:p>0.0006455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713" calcext:value-type="float">
            <text:p>1713</text:p>
          </table:table-cell>
          <table:table-cell office:value-type="float" office:value="1403" calcext:value-type="float">
            <text:p>1403</text:p>
          </table:table-cell>
          <table:table-cell table:style-name="ce1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754714" calcext:value-type="float">
            <text:p>0.000754714</text:p>
          </table:table-cell>
          <table:table-cell table:style-name="ce1" office:value-type="float" office:value="0.00135336" calcext:value-type="float">
            <text:p>0.00135336</text:p>
          </table:table-cell>
          <table:table-cell table:style-name="ce1" office:value-type="float" office:value="0.000748004" calcext:value-type="float">
            <text:p>0.000748004</text:p>
          </table:table-cell>
          <table:table-cell table:style-name="ce1" office:value-type="float" office:value="0.000790122" calcext:value-type="float">
            <text:p>0.0007901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25" calcext:value-type="float">
            <text:p>1325</text:p>
          </table:table-cell>
          <table:table-cell office:value-type="float" office:value="739" calcext:value-type="float">
            <text:p>739</text:p>
          </table:table-cell>
          <table:table-cell office:value-type="float" office:value="1337" calcext:value-type="float">
            <text:p>1337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00821055" calcext:value-type="float">
            <text:p>0.000821055</text:p>
          </table:table-cell>
          <table:table-cell table:style-name="ce1" office:value-type="float" office:value="0.00151615" calcext:value-type="float">
            <text:p>0.00151615</text:p>
          </table:table-cell>
          <table:table-cell table:style-name="ce1" office:value-type="float" office:value="0.000927076" calcext:value-type="float">
            <text:p>0.000927076</text:p>
          </table:table-cell>
          <table:table-cell table:style-name="ce1" office:value-type="float" office:value="0.000938263" calcext:value-type="float">
            <text:p>0.0009382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18" calcext:value-type="float">
            <text:p>1218</text:p>
          </table:table-cell>
          <table:table-cell office:value-type="float" office:value="660" calcext:value-type="float">
            <text:p>660</text:p>
          </table:table-cell>
          <table:table-cell office:value-type="float" office:value="1079" calcext:value-type="float">
            <text:p>107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000941964" calcext:value-type="float">
            <text:p>0.000941964</text:p>
          </table:table-cell>
          <table:table-cell table:style-name="ce1" office:value-type="float" office:value="0.00153551" calcext:value-type="float">
            <text:p>0.00153551</text:p>
          </table:table-cell>
          <table:table-cell table:style-name="ce1" office:value-type="float" office:value="0.00104325" calcext:value-type="float">
            <text:p>0.00104325</text:p>
          </table:table-cell>
          <table:table-cell table:style-name="ce1" office:value-type="float" office:value="0.00107725" calcext:value-type="float">
            <text:p>0.001077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62" calcext:value-type="float">
            <text:p>1062</text:p>
          </table:table-cell>
          <table:table-cell office:value-type="float" office:value="651" calcext:value-type="float">
            <text:p>651</text:p>
          </table:table-cell>
          <table:table-cell office:value-type="float" office:value="959" calcext:value-type="float">
            <text:p>959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00101605" calcext:value-type="float">
            <text:p>0.00101605</text:p>
          </table:table-cell>
          <table:table-cell table:style-name="ce1" office:value-type="float" office:value="0.00173281" calcext:value-type="float">
            <text:p>0.00173281</text:p>
          </table:table-cell>
          <table:table-cell table:style-name="ce1" office:value-type="float" office:value="0.00130164" calcext:value-type="float">
            <text:p>0.00130164</text:p>
          </table:table-cell>
          <table:table-cell table:style-name="ce1" office:value-type="float" office:value="0.00127702" calcext:value-type="float">
            <text:p>0.001277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577" calcext:value-type="float">
            <text:p>577</text:p>
          </table:table-cell>
          <table:table-cell office:value-type="float" office:value="768" calcext:value-type="float">
            <text:p>76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123685" calcext:value-type="float">
            <text:p>0.00123685</text:p>
          </table:table-cell>
          <table:table-cell table:style-name="ce1" office:value-type="float" office:value="0.00186955" calcext:value-type="float">
            <text:p>0.00186955</text:p>
          </table:table-cell>
          <table:table-cell table:style-name="ce1" office:value-type="float" office:value="0.00150844" calcext:value-type="float">
            <text:p>0.00150844</text:p>
          </table:table-cell>
          <table:table-cell table:style-name="ce1" office:value-type="float" office:value="0.00144773" calcext:value-type="float">
            <text:p>0.001447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9" calcext:value-type="float">
            <text:p>809</text:p>
          </table:table-cell>
          <table:table-cell office:value-type="float" office:value="535" calcext:value-type="float">
            <text:p>535</text:p>
          </table:table-cell>
          <table:table-cell office:value-type="float" office:value="663" calcext:value-type="float">
            <text:p>66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00130527" calcext:value-type="float">
            <text:p>0.00130527</text:p>
          </table:table-cell>
          <table:table-cell table:style-name="ce1" office:value-type="float" office:value="0.00205426" calcext:value-type="float">
            <text:p>0.00205426</text:p>
          </table:table-cell>
          <table:table-cell table:style-name="ce1" office:value-type="float" office:value="0.00176198" calcext:value-type="float">
            <text:p>0.00176198</text:p>
          </table:table-cell>
          <table:table-cell table:style-name="ce1" office:value-type="float" office:value="0.00171127" calcext:value-type="float">
            <text:p>0.0017112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66" calcext:value-type="float">
            <text:p>766</text:p>
          </table:table-cell>
          <table:table-cell office:value-type="float" office:value="487" calcext:value-type="float">
            <text:p>487</text:p>
          </table:table-cell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00148128" calcext:value-type="float">
            <text:p>0.00148128</text:p>
          </table:table-cell>
          <table:table-cell table:style-name="ce1" office:value-type="float" office:value="0.00222377" calcext:value-type="float">
            <text:p>0.00222377</text:p>
          </table:table-cell>
          <table:table-cell table:style-name="ce1" office:value-type="float" office:value="0.00215403" calcext:value-type="float">
            <text:p>0.00215403</text:p>
          </table:table-cell>
          <table:table-cell table:style-name="ce1" office:value-type="float" office:value="0.00179359" calcext:value-type="float">
            <text:p>0.0017935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75" calcext:value-type="float">
            <text:p>675</text:p>
          </table:table-cell>
          <table:table-cell office:value-type="float" office:value="450" calcext:value-type="float">
            <text:p>450</text:p>
          </table:table-cell>
          <table:table-cell office:value-type="float" office:value="464" calcext:value-type="float">
            <text:p>46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00169534" calcext:value-type="float">
            <text:p>0.00169534</text:p>
          </table:table-cell>
          <table:table-cell table:style-name="ce1" office:value-type="float" office:value="0.00247069" calcext:value-type="float">
            <text:p>0.00247069</text:p>
          </table:table-cell>
          <table:table-cell table:style-name="ce1" office:value-type="float" office:value="0.00236714" calcext:value-type="float">
            <text:p>0.00236714</text:p>
          </table:table-cell>
          <table:table-cell table:style-name="ce1" office:value-type="float" office:value="0.00217569" calcext:value-type="float">
            <text:p>0.0021756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  <table:table-cell office:value-type="float" office:value="405" calcext:value-type="float">
            <text:p>405</text:p>
          </table:table-cell>
          <table:table-cell office:value-type="float" office:value="422" calcext:value-type="float">
            <text:p>42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184038" calcext:value-type="float">
            <text:p>0.00184038</text:p>
          </table:table-cell>
          <table:table-cell table:style-name="ce1" office:value-type="float" office:value="0.00253651" calcext:value-type="float">
            <text:p>0.00253651</text:p>
          </table:table-cell>
          <table:table-cell table:style-name="ce1" office:value-type="float" office:value="0.00291324" calcext:value-type="float">
            <text:p>0.00291324</text:p>
          </table:table-cell>
          <table:table-cell table:style-name="ce1" office:value-type="float" office:value="0.00224464" calcext:value-type="float">
            <text:p>0.0022446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394" calcext:value-type="float">
            <text:p>394</text:p>
          </table:table-cell>
          <table:table-cell office:value-type="float" office:value="343" calcext:value-type="float">
            <text:p>34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217253" calcext:value-type="float">
            <text:p>0.00217253</text:p>
          </table:table-cell>
          <table:table-cell table:style-name="ce1" office:value-type="float" office:value="0.00297233" calcext:value-type="float">
            <text:p>0.00297233</text:p>
          </table:table-cell>
          <table:table-cell table:style-name="ce1" office:value-type="float" office:value="0.00310502" calcext:value-type="float">
            <text:p>0.00310502</text:p>
          </table:table-cell>
          <table:table-cell table:style-name="ce1" office:value-type="float" office:value="0.00251276" calcext:value-type="float">
            <text:p>0.0025127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322" calcext:value-type="float">
            <text:p>3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7"/>
          <table:table-cell>
            <draw:frame draw:z-index="1" draw:style-name="gr1" draw:text-style-name="P1" svg:width="15.999cm" svg:height="8.999cm" svg:x="0.983cm" svg:y="0.109cm">
              <draw:object draw:notify-on-update-of-ranges="Sheet1.A2:Sheet1.A12 Sheet1.B1:Sheet1.B1 Sheet1.B2:Sheet1.B12 Sheet1.C1:Sheet1.C1 Sheet1.C2:Sheet1.C12 Sheet1.D1:Sheet1.D1 Sheet1.D2:Sheet1.D12 Sheet1.E1:Sheet1.E1 Sheet1.E2:Sheet1.E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>
            <draw:frame draw:z-index="2" draw:style-name="gr1" draw:text-style-name="P1" svg:width="15.999cm" svg:height="8.999cm" svg:x="0.745cm" svg:y="0.389cm">
              <draw:object draw:notify-on-update-of-ranges="Sheet1.H13:Sheet1.H13 Sheet1.H14:Sheet1.H24 Sheet1.I13:Sheet1.I13 Sheet1.I14:Sheet1.I24 Sheet1.J13:Sheet1.J13 Sheet1.J14:Sheet1.J24 Sheet1.K13:Sheet1.K13 Sheet1.K14:Sheet1.K24 Sheet1.L13:Sheet1.L13 Sheet1.L14:Sheet1.L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15.999cm" svg:height="8.999cm" svg:x="1.172cm" svg:y="0.432cm">
              <draw:object draw:notify-on-update-of-ranges="Sheet1.H1:Sheet1.H1 Sheet1.H2:Sheet1.H12 Sheet1.I1:Sheet1.I1 Sheet1.I2:Sheet1.I12 Sheet1.J1:Sheet1.J1 Sheet1.J2:Sheet1.J12 Sheet1.K1:Sheet1.K1 Sheet1.K2:Sheet1.K12 Sheet1.L1:Sheet1.L1 Sheet1.L2:Sheet1.L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1:43:38.530590700</meta:creation-date>
    <dc:date>2026-05-12T12:46:25.809588800</dc:date>
    <meta:editing-duration>PT6M17S</meta:editing-duration>
    <meta:editing-cycles>3</meta:editing-cycles>
    <meta:generator>LibreOffice/25.8.5.2$Windows_X86_64 LibreOffice_project/9c8b85f387cc00a89945a79c9e6239f32e450ac2</meta:generator>
    <meta:document-statistic meta:table-count="1" meta:cell-count="24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673cm" svg:y="2.032cm" svg:width="7.621cm" svg:height="5.164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A14:Sheet1.A24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B14:Sheet1.B24" chart:label-cell-address="Sheet1.B13:Sheet1.B13" chart:class="chart:line">
            <chart:data-point chart:repeated="11"/>
          </chart:series>
          <chart:series chart:style-name="ch9" chart:values-cell-range-address="Sheet1.C14:Sheet1.C24" chart:label-cell-address="Sheet1.C13:Sheet1.C13" chart:class="chart:line">
            <chart:data-point chart:repeated="11"/>
          </chart:series>
          <chart:series chart:style-name="ch10" chart:values-cell-range-address="Sheet1.D14:Sheet1.D24" chart:label-cell-address="Sheet1.D13:Sheet1.D13" chart:class="chart:line">
            <chart:data-point chart:repeated="11"/>
          </chart:series>
          <chart:series chart:style-name="ch11" chart:values-cell-range-address="Sheet1.E14:Sheet1.E24" chart:label-cell-address="Sheet1.E13:Sheet1.E1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13:Sheet1.B13</svg:desc>
                </draw:g>
              </table:table-cell>
              <table:table-cell office:value-type="string">
                <text:p>Compute</text:p>
                <draw:g>
                  <svg:desc>Sheet1.C13:Sheet1.C13</svg:desc>
                </draw:g>
              </table:table-cell>
              <table:table-cell office:value-type="string">
                <text:p>Iterative</text:p>
                <draw:g>
                  <svg:desc>Sheet1.D13:Sheet1.D13</svg:desc>
                </draw:g>
              </table:table-cell>
              <table:table-cell office:value-type="string">
                <text:p>Iterative with sectioning (Depth 3)</text:p>
                <draw:g>
                  <svg:desc>Sheet1.E13:Sheet1.E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4:Sheet1.A24</svg:desc>
                </draw:g>
              </table:table-cell>
              <table:table-cell office:value-type="float" office:value="0.000670319">
                <text:p>0.000670319</text:p>
                <draw:g>
                  <svg:desc>Sheet1.B14:Sheet1.B24</svg:desc>
                </draw:g>
              </table:table-cell>
              <table:table-cell office:value-type="float" office:value="0.000583849">
                <text:p>0.000583849</text:p>
                <draw:g>
                  <svg:desc>Sheet1.C14:Sheet1.C24</svg:desc>
                </draw:g>
              </table:table-cell>
              <table:table-cell office:value-type="float" office:value="0.000712757">
                <text:p>0.000712757</text:p>
                <draw:g>
                  <svg:desc>Sheet1.D14:Sheet1.D24</svg:desc>
                </draw:g>
              </table:table-cell>
              <table:table-cell office:value-type="float" office:value="0.000645597">
                <text:p>0.000645597</text:p>
                <draw:g>
                  <svg:desc>Sheet1.E14:Sheet1.E2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754714">
                <text:p>0.000754714</text:p>
              </table:table-cell>
              <table:table-cell office:value-type="float" office:value="0.00135336">
                <text:p>0.00135336</text:p>
              </table:table-cell>
              <table:table-cell office:value-type="float" office:value="0.000748004">
                <text:p>0.000748004</text:p>
              </table:table-cell>
              <table:table-cell office:value-type="float" office:value="0.000790122">
                <text:p>0.0007901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821055">
                <text:p>0.000821055</text:p>
              </table:table-cell>
              <table:table-cell office:value-type="float" office:value="0.00151615">
                <text:p>0.00151615</text:p>
              </table:table-cell>
              <table:table-cell office:value-type="float" office:value="0.000927076">
                <text:p>0.000927076</text:p>
              </table:table-cell>
              <table:table-cell office:value-type="float" office:value="0.000938263">
                <text:p>0.0009382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941964">
                <text:p>0.000941964</text:p>
              </table:table-cell>
              <table:table-cell office:value-type="float" office:value="0.00153551">
                <text:p>0.00153551</text:p>
              </table:table-cell>
              <table:table-cell office:value-type="float" office:value="0.00104325">
                <text:p>0.00104325</text:p>
              </table:table-cell>
              <table:table-cell office:value-type="float" office:value="0.00107725">
                <text:p>0.001077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01605">
                <text:p>0.00101605</text:p>
              </table:table-cell>
              <table:table-cell office:value-type="float" office:value="0.00173281">
                <text:p>0.00173281</text:p>
              </table:table-cell>
              <table:table-cell office:value-type="float" office:value="0.00130164">
                <text:p>0.00130164</text:p>
              </table:table-cell>
              <table:table-cell office:value-type="float" office:value="0.00127702">
                <text:p>0.00127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23685">
                <text:p>0.00123685</text:p>
              </table:table-cell>
              <table:table-cell office:value-type="float" office:value="0.00186955">
                <text:p>0.00186955</text:p>
              </table:table-cell>
              <table:table-cell office:value-type="float" office:value="0.00150844">
                <text:p>0.00150844</text:p>
              </table:table-cell>
              <table:table-cell office:value-type="float" office:value="0.00144773">
                <text:p>0.001447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30527">
                <text:p>0.00130527</text:p>
              </table:table-cell>
              <table:table-cell office:value-type="float" office:value="0.00205426">
                <text:p>0.00205426</text:p>
              </table:table-cell>
              <table:table-cell office:value-type="float" office:value="0.00176198">
                <text:p>0.00176198</text:p>
              </table:table-cell>
              <table:table-cell office:value-type="float" office:value="0.00171127">
                <text:p>0.001711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48128">
                <text:p>0.00148128</text:p>
              </table:table-cell>
              <table:table-cell office:value-type="float" office:value="0.00222377">
                <text:p>0.00222377</text:p>
              </table:table-cell>
              <table:table-cell office:value-type="float" office:value="0.00215403">
                <text:p>0.00215403</text:p>
              </table:table-cell>
              <table:table-cell office:value-type="float" office:value="0.00179359">
                <text:p>0.001793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69534">
                <text:p>0.00169534</text:p>
              </table:table-cell>
              <table:table-cell office:value-type="float" office:value="0.00247069">
                <text:p>0.00247069</text:p>
              </table:table-cell>
              <table:table-cell office:value-type="float" office:value="0.00236714">
                <text:p>0.00236714</text:p>
              </table:table-cell>
              <table:table-cell office:value-type="float" office:value="0.00217569">
                <text:p>0.002175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184038">
                <text:p>0.00184038</text:p>
              </table:table-cell>
              <table:table-cell office:value-type="float" office:value="0.00253651">
                <text:p>0.00253651</text:p>
              </table:table-cell>
              <table:table-cell office:value-type="float" office:value="0.00291324">
                <text:p>0.00291324</text:p>
              </table:table-cell>
              <table:table-cell office:value-type="float" office:value="0.00224464">
                <text:p>0.002244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17253">
                <text:p>0.00217253</text:p>
              </table:table-cell>
              <table:table-cell office:value-type="float" office:value="0.00297233">
                <text:p>0.00297233</text:p>
              </table:table-cell>
              <table:table-cell office:value-type="float" office:value="0.00310502">
                <text:p>0.00310502</text:p>
              </table:table-cell>
              <table:table-cell office:value-type="float" office:value="0.00251276">
                <text:p>0.00251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272cm" svg:y="2.033cm" svg:width="7.922cm" svg:height="5.163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A2:Sheet1.A12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B2:Sheet1.B12" chart:label-cell-address="Sheet1.B1:Sheet1.B1" chart:class="chart:line">
            <chart:data-point chart:repeated="11"/>
          </chart:series>
          <chart:series chart:style-name="ch9" chart:values-cell-range-address="Sheet1.C2:Sheet1.C12" chart:label-cell-address="Sheet1.C1:Sheet1.C1" chart:class="chart:line">
            <chart:data-point chart:repeated="11"/>
          </chart:series>
          <chart:series chart:style-name="ch10" chart:values-cell-range-address="Sheet1.D2:Sheet1.D12" chart:label-cell-address="Sheet1.D1:Sheet1.D1" chart:class="chart:line">
            <chart:data-point chart:repeated="11"/>
          </chart:series>
          <chart:series chart:style-name="ch11" chart:values-cell-range-address="Sheet1.E2:Sheet1.E12" chart:label-cell-address="Sheet1.E1:Sheet1.E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1:Sheet1.B1</svg:desc>
                </draw:g>
              </table:table-cell>
              <table:table-cell office:value-type="string">
                <text:p>Compute</text:p>
                <draw:g>
                  <svg:desc>Sheet1.C1:Sheet1.C1</svg:desc>
                </draw:g>
              </table:table-cell>
              <table:table-cell office:value-type="string">
                <text:p>Iterative</text:p>
                <draw:g>
                  <svg:desc>Sheet1.D1:Sheet1.D1</svg:desc>
                </draw:g>
              </table:table-cell>
              <table:table-cell office:value-type="string">
                <text:p>Iterative with sectioning (Depth 3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000670319">
                <text:p>0.000670319</text:p>
                <draw:g>
                  <svg:desc>Sheet1.B2:Sheet1.B12</svg:desc>
                </draw:g>
              </table:table-cell>
              <table:table-cell office:value-type="float" office:value="0.000583849">
                <text:p>0.000583849</text:p>
                <draw:g>
                  <svg:desc>Sheet1.C2:Sheet1.C12</svg:desc>
                </draw:g>
              </table:table-cell>
              <table:table-cell office:value-type="float" office:value="0.000712757">
                <text:p>0.000712757</text:p>
                <draw:g>
                  <svg:desc>Sheet1.D2:Sheet1.D12</svg:desc>
                </draw:g>
              </table:table-cell>
              <table:table-cell office:value-type="float" office:value="0.000645597">
                <text:p>0.000645597</text:p>
                <draw:g>
                  <svg:desc>Sheet1.E2:Sheet1.E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17253">
                <text:p>0.00217253</text:p>
              </table:table-cell>
              <table:table-cell office:value-type="float" office:value="0.00297233">
                <text:p>0.00297233</text:p>
              </table:table-cell>
              <table:table-cell office:value-type="float" office:value="0.00310502">
                <text:p>0.00310502</text:p>
              </table:table-cell>
              <table:table-cell office:value-type="float" office:value="0.00251276">
                <text:p>0.002512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43093">
                <text:p>0.00343093</text:p>
              </table:table-cell>
              <table:table-cell office:value-type="float" office:value="0.00423431">
                <text:p>0.00423431</text:p>
              </table:table-cell>
              <table:table-cell office:value-type="float" office:value="0.00814696">
                <text:p>0.00814696</text:p>
              </table:table-cell>
              <table:table-cell office:value-type="float" office:value="0.00510107">
                <text:p>0.005101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439708">
                <text:p>0.00439708</text:p>
              </table:table-cell>
              <table:table-cell office:value-type="float" office:value="0.00550712">
                <text:p>0.00550712</text:p>
              </table:table-cell>
              <table:table-cell office:value-type="float" office:value="0.0151171">
                <text:p>0.0151171</text:p>
              </table:table-cell>
              <table:table-cell office:value-type="float" office:value="0.00719853">
                <text:p>0.007198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55424">
                <text:p>0.00555424</text:p>
              </table:table-cell>
              <table:table-cell office:value-type="float" office:value="0.00683802">
                <text:p>0.00683802</text:p>
              </table:table-cell>
              <table:table-cell office:value-type="float" office:value="0.0252553">
                <text:p>0.0252553</text:p>
              </table:table-cell>
              <table:table-cell office:value-type="float" office:value="0.0109054">
                <text:p>0.010905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698604">
                <text:p>0.00698604</text:p>
              </table:table-cell>
              <table:table-cell office:value-type="float" office:value="0.00793325">
                <text:p>0.00793325</text:p>
              </table:table-cell>
              <table:table-cell office:value-type="float" office:value="0.0365434">
                <text:p>0.0365434</text:p>
              </table:table-cell>
              <table:table-cell office:value-type="float" office:value="0.0135906">
                <text:p>0.013590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880191">
                <text:p>0.00880191</text:p>
              </table:table-cell>
              <table:table-cell office:value-type="float" office:value="0.00933804">
                <text:p>0.00933804</text:p>
              </table:table-cell>
              <table:table-cell office:value-type="float" office:value="0.0523307">
                <text:p>0.0523307</text:p>
              </table:table-cell>
              <table:table-cell office:value-type="float" office:value="0.0177779">
                <text:p>0.0177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982045">
                <text:p>0.00982045</text:p>
              </table:table-cell>
              <table:table-cell office:value-type="float" office:value="0.0106613">
                <text:p>0.0106613</text:p>
              </table:table-cell>
              <table:table-cell office:value-type="float" office:value="0.066306">
                <text:p>0.066306</text:p>
              </table:table-cell>
              <table:table-cell office:value-type="float" office:value="0.0203954">
                <text:p>0.020395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105244">
                <text:p>0.0105244</text:p>
              </table:table-cell>
              <table:table-cell office:value-type="float" office:value="0.0121985">
                <text:p>0.0121985</text:p>
              </table:table-cell>
              <table:table-cell office:value-type="float" office:value="0.0853853">
                <text:p>0.0853853</text:p>
              </table:table-cell>
              <table:table-cell office:value-type="float" office:value="0.0254255">
                <text:p>0.02542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26935">
                <text:p>0.0126935</text:p>
              </table:table-cell>
              <table:table-cell office:value-type="float" office:value="0.0141512">
                <text:p>0.0141512</text:p>
              </table:table-cell>
              <table:table-cell office:value-type="float" office:value="0.111801">
                <text:p>0.111801</text:p>
              </table:table-cell>
              <table:table-cell office:value-type="float" office:value="0.0293164">
                <text:p>0.02931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038">
                <text:p>0.013038</text:p>
              </table:table-cell>
              <table:table-cell office:value-type="float" office:value="0.01496">
                <text:p>0.01496</text:p>
              </table:table-cell>
              <table:table-cell office:value-type="float" office:value="0.13368">
                <text:p>0.13368</text:p>
              </table:table-cell>
              <table:table-cell office:value-type="float" office:value="0.0362682">
                <text:p>0.0362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372cm" svg:y="2.032cm" svg:width="7.922cm" svg:height="5.164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H14:Sheet1.H24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I14:Sheet1.I24" chart:label-cell-address="Sheet1.I13:Sheet1.I13" chart:class="chart:line">
            <chart:data-point chart:repeated="11"/>
          </chart:series>
          <chart:series chart:style-name="ch9" chart:values-cell-range-address="Sheet1.J14:Sheet1.J24" chart:label-cell-address="Sheet1.J13:Sheet1.J13" chart:class="chart:line">
            <chart:data-point chart:repeated="11"/>
          </chart:series>
          <chart:series chart:style-name="ch10" chart:values-cell-range-address="Sheet1.K14:Sheet1.K24" chart:label-cell-address="Sheet1.K13:Sheet1.K13" chart:class="chart:line">
            <chart:data-point chart:repeated="11"/>
          </chart:series>
          <chart:series chart:style-name="ch11" chart:values-cell-range-address="Sheet1.L14:Sheet1.L24" chart:label-cell-address="Sheet1.L13:Sheet1.L1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I13:Sheet1.I13</svg:desc>
                </draw:g>
              </table:table-cell>
              <table:table-cell office:value-type="string">
                <text:p>Compute</text:p>
                <draw:g>
                  <svg:desc>Sheet1.J13:Sheet1.J13</svg:desc>
                </draw:g>
              </table:table-cell>
              <table:table-cell office:value-type="string">
                <text:p>Iterative</text:p>
                <draw:g>
                  <svg:desc>Sheet1.K13:Sheet1.K13</svg:desc>
                </draw:g>
              </table:table-cell>
              <table:table-cell office:value-type="string">
                <text:p>Iterative with sectioning (Depth 3)</text:p>
                <draw:g>
                  <svg:desc>Sheet1.L13:Sheet1.L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H14:Sheet1.H24</svg:desc>
                </draw:g>
              </table:table-cell>
              <table:table-cell office:value-type="float" office:value="1492">
                <text:p>1492</text:p>
                <draw:g>
                  <svg:desc>Sheet1.I14:Sheet1.I24</svg:desc>
                </draw:g>
              </table:table-cell>
              <table:table-cell office:value-type="float" office:value="1713">
                <text:p>1713</text:p>
                <draw:g>
                  <svg:desc>Sheet1.J14:Sheet1.J24</svg:desc>
                </draw:g>
              </table:table-cell>
              <table:table-cell office:value-type="float" office:value="1403">
                <text:p>1403</text:p>
                <draw:g>
                  <svg:desc>Sheet1.K14:Sheet1.K24</svg:desc>
                </draw:g>
              </table:table-cell>
              <table:table-cell office:value-type="float" office:value="1549">
                <text:p>1549</text:p>
                <draw:g>
                  <svg:desc>Sheet1.L14:Sheet1.L2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25">
                <text:p>1325</text:p>
              </table:table-cell>
              <table:table-cell office:value-type="float" office:value="739">
                <text:p>739</text:p>
              </table:table-cell>
              <table:table-cell office:value-type="float" office:value="1337">
                <text:p>1337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660">
                <text:p>660</text:p>
              </table:table-cell>
              <table:table-cell office:value-type="float" office:value="1079">
                <text:p>107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2">
                <text:p>1062</text:p>
              </table:table-cell>
              <table:table-cell office:value-type="float" office:value="651">
                <text:p>651</text:p>
              </table:table-cell>
              <table:table-cell office:value-type="float" office:value="959">
                <text:p>959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84">
                <text:p>984</text:p>
              </table:table-cell>
              <table:table-cell office:value-type="float" office:value="577">
                <text:p>577</text:p>
              </table:table-cell>
              <table:table-cell office:value-type="float" office:value="768">
                <text:p>76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9">
                <text:p>809</text:p>
              </table:table-cell>
              <table:table-cell office:value-type="float" office:value="535">
                <text:p>535</text:p>
              </table:table-cell>
              <table:table-cell office:value-type="float" office:value="663">
                <text:p>66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6">
                <text:p>766</text:p>
              </table:table-cell>
              <table:table-cell office:value-type="float" office:value="487">
                <text:p>487</text:p>
              </table:table-cell>
              <table:table-cell office:value-type="float" office:value="568">
                <text:p>56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75">
                <text:p>675</text:p>
              </table:table-cell>
              <table:table-cell office:value-type="float" office:value="450">
                <text:p>450</text:p>
              </table:table-cell>
              <table:table-cell office:value-type="float" office:value="464">
                <text:p>46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90">
                <text:p>590</text:p>
              </table:table-cell>
              <table:table-cell office:value-type="float" office:value="405">
                <text:p>405</text:p>
              </table:table-cell>
              <table:table-cell office:value-type="float" office:value="422">
                <text:p>4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3">
                <text:p>543</text:p>
              </table:table-cell>
              <table:table-cell office:value-type="float" office:value="394">
                <text:p>394</text:p>
              </table:table-cell>
              <table:table-cell office:value-type="float" office:value="343">
                <text:p>34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60">
                <text:p>460</text:p>
              </table:table-cell>
              <table:table-cell office:value-type="float" office:value="336">
                <text:p>336</text:p>
              </table:table-cell>
              <table:table-cell office:value-type="float" office:value="322">
                <text:p>322</text:p>
              </table:table-cell>
              <table:table-cell office:value-type="float" office:value="398">
                <text:p>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96cm" svg:y="0.315cm" chart:style-name="ch2">
          <text:p>Performance of different quantities of boids with various implementations</text:p>
        </chart:title>
        <chart:legend chart:legend-position="end" svg:x="10.916cm" svg:y="3.24cm" style:legend-expansion="high" chart:style-name="ch3"/>
        <chart:plot-area chart:style-name="ch4" svg:x="1.321cm" svg:y="1.83cm" svg:width="9.275cm" svg:height="6.019cm">
          <chart:coordinate-region svg:x="2.372cm" svg:y="2.032cm" svg:width="7.822cm" svg:height="5.164cm"/>
          <chart:axis chart:dimension="x" chart:name="primary-x" chart:style-name="ch5" chartooo:axis-type="auto">
            <chartooo:date-scale/>
            <chart:title svg:x="4.983cm" svg:y="8.029cm" chart:style-name="ch2">
              <text:p><text:span text:style-name="T1">Boid quantity</text:span></text:p>
            </chart:title>
            <chart:categories table:cell-range-address="Sheet1.H2:Sheet1.H12"/>
          </chart:axis>
          <chart:axis chart:dimension="y" chart:name="primary-y" chart:style-name="ch5">
            <chart:title svg:x="0.451cm" svg:y="6.308cm" chart:style-name="ch6">
              <text:p><text:span text:style-name="T1">Deltatime (seconds)</text:span></text:p>
            </chart:title>
            <chart:grid chart:style-name="ch7" chart:class="major"/>
          </chart:axis>
          <chart:series chart:style-name="ch8" chart:values-cell-range-address="Sheet1.I2:Sheet1.I12" chart:label-cell-address="Sheet1.I1:Sheet1.I1" chart:class="chart:line">
            <chart:data-point chart:repeated="11"/>
          </chart:series>
          <chart:series chart:style-name="ch9" chart:values-cell-range-address="Sheet1.J2:Sheet1.J12" chart:label-cell-address="Sheet1.J1:Sheet1.J1" chart:class="chart:line">
            <chart:data-point chart:repeated="11"/>
          </chart:series>
          <chart:series chart:style-name="ch10" chart:values-cell-range-address="Sheet1.K2:Sheet1.K12" chart:label-cell-address="Sheet1.K1:Sheet1.K1" chart:class="chart:line">
            <chart:data-point chart:repeated="11"/>
          </chart:series>
          <chart:series chart:style-name="ch11" chart:values-cell-range-address="Sheet1.L2:Sheet1.L12" chart:label-cell-address="Sheet1.L1:Sheet1.L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I1:Sheet1.I1</svg:desc>
                </draw:g>
              </table:table-cell>
              <table:table-cell office:value-type="string">
                <text:p>Compute</text:p>
                <draw:g>
                  <svg:desc>Sheet1.J1:Sheet1.J1</svg:desc>
                </draw:g>
              </table:table-cell>
              <table:table-cell office:value-type="string">
                <text:p>Iterative</text:p>
                <draw:g>
                  <svg:desc>Sheet1.K1:Sheet1.K1</svg:desc>
                </draw:g>
              </table:table-cell>
              <table:table-cell office:value-type="string">
                <text:p>Iterative with sectioning (Depth 3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H2:Sheet1.H12</svg:desc>
                </draw:g>
              </table:table-cell>
              <table:table-cell office:value-type="float" office:value="1492">
                <text:p>1492</text:p>
                <draw:g>
                  <svg:desc>Sheet1.I2:Sheet1.I12</svg:desc>
                </draw:g>
              </table:table-cell>
              <table:table-cell office:value-type="float" office:value="1713">
                <text:p>1713</text:p>
                <draw:g>
                  <svg:desc>Sheet1.J2:Sheet1.J12</svg:desc>
                </draw:g>
              </table:table-cell>
              <table:table-cell office:value-type="float" office:value="1403">
                <text:p>1403</text:p>
                <draw:g>
                  <svg:desc>Sheet1.K2:Sheet1.K12</svg:desc>
                </draw:g>
              </table:table-cell>
              <table:table-cell office:value-type="float" office:value="1549">
                <text:p>1549</text:p>
                <draw:g>
                  <svg:desc>Sheet1.L2:Sheet1.L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60">
                <text:p>460</text:p>
              </table:table-cell>
              <table:table-cell office:value-type="float" office:value="336">
                <text:p>336</text:p>
              </table:table-cell>
              <table:table-cell office:value-type="float" office:value="322">
                <text:p>32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1">
                <text:p>291</text:p>
              </table:table-cell>
              <table:table-cell office:value-type="float" office:value="236">
                <text:p>236</text:p>
              </table:table-cell>
              <table:table-cell office:value-type="float" office:value="123">
                <text:p>12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7">
                <text:p>227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146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3">
                <text:p>143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5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