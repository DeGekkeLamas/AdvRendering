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967cm" svg:y="1.068cm">
            <draw:object draw:notify-on-update-of-ranges="Sheet1.A1:Sheet1.A1 Sheet1.A2:Sheet1.A501 Sheet1.B1:Sheet1.B1 Sheet1.B2:Sheet1.B501 Sheet1.C1:Sheet1.C1 Sheet1.C2:Sheet1.C501 Sheet1.D1:Sheet1.D1 Sheet1.D2:Sheet1.D501 Sheet1.E1:Sheet1.E1 Sheet1.E2:Sheet1.E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ltati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Iterative with sectioning (Depth 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343" calcext:value-type="float">
            <text:p>0.044343</text:p>
          </table:table-cell>
          <table:table-cell office:value-type="float" office:value="0.0499045" calcext:value-type="float">
            <text:p>0.0499045</text:p>
          </table:table-cell>
          <table:table-cell office:value-type="float" office:value="0.181339" calcext:value-type="float">
            <text:p>0.181339</text:p>
          </table:table-cell>
          <table:table-cell office:value-type="float" office:value="0.0718664" calcext:value-type="float">
            <text:p>0.07186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847" calcext:value-type="float">
            <text:p>0.014847</text:p>
          </table:table-cell>
          <table:table-cell office:value-type="float" office:value="0.0191642" calcext:value-type="float">
            <text:p>0.0191642</text:p>
          </table:table-cell>
          <table:table-cell office:value-type="float" office:value="0.143422" calcext:value-type="float">
            <text:p>0.143422</text:p>
          </table:table-cell>
          <table:table-cell office:value-type="float" office:value="0.0335079" calcext:value-type="float">
            <text:p>0.0335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29295" calcext:value-type="float">
            <text:p>0.0129295</text:p>
          </table:table-cell>
          <table:table-cell office:value-type="float" office:value="0.0176971" calcext:value-type="float">
            <text:p>0.0176971</text:p>
          </table:table-cell>
          <table:table-cell office:value-type="float" office:value="0.138638" calcext:value-type="float">
            <text:p>0.138638</text:p>
          </table:table-cell>
          <table:table-cell office:value-type="float" office:value="0.0344416" calcext:value-type="float">
            <text:p>0.0344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0218" calcext:value-type="float">
            <text:p>0.0140218</text:p>
          </table:table-cell>
          <table:table-cell office:value-type="float" office:value="0.0135229" calcext:value-type="float">
            <text:p>0.0135229</text:p>
          </table:table-cell>
          <table:table-cell office:value-type="float" office:value="0.141046" calcext:value-type="float">
            <text:p>0.141046</text:p>
          </table:table-cell>
          <table:table-cell office:value-type="float" office:value="0.0339939" calcext:value-type="float">
            <text:p>0.03399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9377" calcext:value-type="float">
            <text:p>0.0129377</text:p>
          </table:table-cell>
          <table:table-cell office:value-type="float" office:value="0.0140455" calcext:value-type="float">
            <text:p>0.0140455</text:p>
          </table:table-cell>
          <table:table-cell office:value-type="float" office:value="0.137933" calcext:value-type="float">
            <text:p>0.137933</text:p>
          </table:table-cell>
          <table:table-cell office:value-type="float" office:value="0.0342012" calcext:value-type="float">
            <text:p>0.0342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6736" calcext:value-type="float">
            <text:p>0.0126736</text:p>
          </table:table-cell>
          <table:table-cell office:value-type="float" office:value="0.0136923" calcext:value-type="float">
            <text:p>0.0136923</text:p>
          </table:table-cell>
          <table:table-cell office:value-type="float" office:value="0.136933" calcext:value-type="float">
            <text:p>0.136933</text:p>
          </table:table-cell>
          <table:table-cell office:value-type="float" office:value="0.034461" calcext:value-type="float">
            <text:p>0.0344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5821" calcext:value-type="float">
            <text:p>0.0125821</text:p>
          </table:table-cell>
          <table:table-cell office:value-type="float" office:value="0.0137138" calcext:value-type="float">
            <text:p>0.0137138</text:p>
          </table:table-cell>
          <table:table-cell office:value-type="float" office:value="0.131402" calcext:value-type="float">
            <text:p>0.131402</text:p>
          </table:table-cell>
          <table:table-cell office:value-type="float" office:value="0.0360686" calcext:value-type="float">
            <text:p>0.03606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26218" calcext:value-type="float">
            <text:p>0.0126218</text:p>
          </table:table-cell>
          <table:table-cell office:value-type="float" office:value="0.0174065" calcext:value-type="float">
            <text:p>0.0174065</text:p>
          </table:table-cell>
          <table:table-cell office:value-type="float" office:value="0.135093" calcext:value-type="float">
            <text:p>0.135093</text:p>
          </table:table-cell>
          <table:table-cell office:value-type="float" office:value="0.0344104" calcext:value-type="float">
            <text:p>0.0344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30131" calcext:value-type="float">
            <text:p>0.0130131</text:p>
          </table:table-cell>
          <table:table-cell office:value-type="float" office:value="0.0139205" calcext:value-type="float">
            <text:p>0.0139205</text:p>
          </table:table-cell>
          <table:table-cell office:value-type="float" office:value="0.136429" calcext:value-type="float">
            <text:p>0.136429</text:p>
          </table:table-cell>
          <table:table-cell office:value-type="float" office:value="0.0343726" calcext:value-type="float">
            <text:p>0.03437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35457" calcext:value-type="float">
            <text:p>0.0135457</text:p>
          </table:table-cell>
          <table:table-cell office:value-type="float" office:value="0.0141869" calcext:value-type="float">
            <text:p>0.0141869</text:p>
          </table:table-cell>
          <table:table-cell office:value-type="float" office:value="0.140266" calcext:value-type="float">
            <text:p>0.140266</text:p>
          </table:table-cell>
          <table:table-cell office:value-type="float" office:value="0.0344366" calcext:value-type="float">
            <text:p>0.03443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26628" calcext:value-type="float">
            <text:p>0.0126628</text:p>
          </table:table-cell>
          <table:table-cell office:value-type="float" office:value="0.013034" calcext:value-type="float">
            <text:p>0.013034</text:p>
          </table:table-cell>
          <table:table-cell office:value-type="float" office:value="0.14572" calcext:value-type="float">
            <text:p>0.14572</text:p>
          </table:table-cell>
          <table:table-cell office:value-type="float" office:value="0.0357969" calcext:value-type="float">
            <text:p>0.03579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3898" calcext:value-type="float">
            <text:p>0.0123898</text:p>
          </table:table-cell>
          <table:table-cell office:value-type="float" office:value="0.0140482" calcext:value-type="float">
            <text:p>0.0140482</text:p>
          </table:table-cell>
          <table:table-cell office:value-type="float" office:value="0.152434" calcext:value-type="float">
            <text:p>0.152434</text:p>
          </table:table-cell>
          <table:table-cell office:value-type="float" office:value="0.0351571" calcext:value-type="float">
            <text:p>0.03515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5358" calcext:value-type="float">
            <text:p>0.0125358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139865" calcext:value-type="float">
            <text:p>0.139865</text:p>
          </table:table-cell>
          <table:table-cell office:value-type="float" office:value="0.0343952" calcext:value-type="float">
            <text:p>0.03439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25983" calcext:value-type="float">
            <text:p>0.0125983</text:p>
          </table:table-cell>
          <table:table-cell office:value-type="float" office:value="0.0133174" calcext:value-type="float">
            <text:p>0.0133174</text:p>
          </table:table-cell>
          <table:table-cell office:value-type="float" office:value="0.139639" calcext:value-type="float">
            <text:p>0.139639</text:p>
          </table:table-cell>
          <table:table-cell office:value-type="float" office:value="0.0344335" calcext:value-type="float">
            <text:p>0.03443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3314" calcext:value-type="float">
            <text:p>0.0153314</text:p>
          </table:table-cell>
          <table:table-cell office:value-type="float" office:value="0.0147209" calcext:value-type="float">
            <text:p>0.0147209</text:p>
          </table:table-cell>
          <table:table-cell office:value-type="float" office:value="0.140146" calcext:value-type="float">
            <text:p>0.140146</text:p>
          </table:table-cell>
          <table:table-cell office:value-type="float" office:value="0.0363799" calcext:value-type="float">
            <text:p>0.03637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36971" calcext:value-type="float">
            <text:p>0.0136971</text:p>
          </table:table-cell>
          <table:table-cell office:value-type="float" office:value="0.0131668" calcext:value-type="float">
            <text:p>0.0131668</text:p>
          </table:table-cell>
          <table:table-cell office:value-type="float" office:value="0.138371" calcext:value-type="float">
            <text:p>0.138371</text:p>
          </table:table-cell>
          <table:table-cell office:value-type="float" office:value="0.0333271" calcext:value-type="float">
            <text:p>0.0333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5977" calcext:value-type="float">
            <text:p>0.0125977</text:p>
          </table:table-cell>
          <table:table-cell office:value-type="float" office:value="0.015973" calcext:value-type="float">
            <text:p>0.015973</text:p>
          </table:table-cell>
          <table:table-cell office:value-type="float" office:value="0.137858" calcext:value-type="float">
            <text:p>0.137858</text:p>
          </table:table-cell>
          <table:table-cell office:value-type="float" office:value="0.0356706" calcext:value-type="float">
            <text:p>0.03567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23549" calcext:value-type="float">
            <text:p>0.0123549</text:p>
          </table:table-cell>
          <table:table-cell office:value-type="float" office:value="0.0145395" calcext:value-type="float">
            <text:p>0.0145395</text:p>
          </table:table-cell>
          <table:table-cell office:value-type="float" office:value="0.134372" calcext:value-type="float">
            <text:p>0.134372</text:p>
          </table:table-cell>
          <table:table-cell office:value-type="float" office:value="0.0359087" calcext:value-type="float">
            <text:p>0.03590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22018" calcext:value-type="float">
            <text:p>0.0122018</text:p>
          </table:table-cell>
          <table:table-cell office:value-type="float" office:value="0.0136144" calcext:value-type="float">
            <text:p>0.0136144</text:p>
          </table:table-cell>
          <table:table-cell office:value-type="float" office:value="0.136341" calcext:value-type="float">
            <text:p>0.136341</text:p>
          </table:table-cell>
          <table:table-cell office:value-type="float" office:value="0.0355728" calcext:value-type="float">
            <text:p>0.03557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24857" calcext:value-type="float">
            <text:p>0.0124857</text:p>
          </table:table-cell>
          <table:table-cell office:value-type="float" office:value="0.0148176" calcext:value-type="float">
            <text:p>0.0148176</text:p>
          </table:table-cell>
          <table:table-cell office:value-type="float" office:value="0.135749" calcext:value-type="float">
            <text:p>0.135749</text:p>
          </table:table-cell>
          <table:table-cell office:value-type="float" office:value="0.0350228" calcext:value-type="float">
            <text:p>0.0350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4754" calcext:value-type="float">
            <text:p>0.0124754</text:p>
          </table:table-cell>
          <table:table-cell office:value-type="float" office:value="0.0131862" calcext:value-type="float">
            <text:p>0.0131862</text:p>
          </table:table-cell>
          <table:table-cell office:value-type="float" office:value="0.138336" calcext:value-type="float">
            <text:p>0.138336</text:p>
          </table:table-cell>
          <table:table-cell office:value-type="float" office:value="0.0357161" calcext:value-type="float">
            <text:p>0.03571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29503" calcext:value-type="float">
            <text:p>0.0129503</text:p>
          </table:table-cell>
          <table:table-cell office:value-type="float" office:value="0.0145131" calcext:value-type="float">
            <text:p>0.0145131</text:p>
          </table:table-cell>
          <table:table-cell office:value-type="float" office:value="0.136742" calcext:value-type="float">
            <text:p>0.136742</text:p>
          </table:table-cell>
          <table:table-cell office:value-type="float" office:value="0.0357066" calcext:value-type="float">
            <text:p>0.03570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25879" calcext:value-type="float">
            <text:p>0.0125879</text:p>
          </table:table-cell>
          <table:table-cell office:value-type="float" office:value="0.0134083" calcext:value-type="float">
            <text:p>0.0134083</text:p>
          </table:table-cell>
          <table:table-cell office:value-type="float" office:value="0.138799" calcext:value-type="float">
            <text:p>0.138799</text:p>
          </table:table-cell>
          <table:table-cell office:value-type="float" office:value="0.0353577" calcext:value-type="float">
            <text:p>0.03535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25867" calcext:value-type="float">
            <text:p>0.0125867</text:p>
          </table:table-cell>
          <table:table-cell office:value-type="float" office:value="0.0133836" calcext:value-type="float">
            <text:p>0.0133836</text:p>
          </table:table-cell>
          <table:table-cell office:value-type="float" office:value="0.138098" calcext:value-type="float">
            <text:p>0.138098</text:p>
          </table:table-cell>
          <table:table-cell office:value-type="float" office:value="0.0357064" calcext:value-type="float">
            <text:p>0.03570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0743" calcext:value-type="float">
            <text:p>0.0140743</text:p>
          </table:table-cell>
          <table:table-cell office:value-type="float" office:value="0.139776" calcext:value-type="float">
            <text:p>0.139776</text:p>
          </table:table-cell>
          <table:table-cell office:value-type="float" office:value="0.0363587" calcext:value-type="float">
            <text:p>0.03635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35568" calcext:value-type="float">
            <text:p>0.0135568</text:p>
          </table:table-cell>
          <table:table-cell office:value-type="float" office:value="0.016208" calcext:value-type="float">
            <text:p>0.016208</text:p>
          </table:table-cell>
          <table:table-cell office:value-type="float" office:value="0.140534" calcext:value-type="float">
            <text:p>0.140534</text:p>
          </table:table-cell>
          <table:table-cell office:value-type="float" office:value="0.0362473" calcext:value-type="float">
            <text:p>0.03624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3657" calcext:value-type="float">
            <text:p>0.013657</text:p>
          </table:table-cell>
          <table:table-cell office:value-type="float" office:value="0.0146332" calcext:value-type="float">
            <text:p>0.0146332</text:p>
          </table:table-cell>
          <table:table-cell office:value-type="float" office:value="0.140737" calcext:value-type="float">
            <text:p>0.140737</text:p>
          </table:table-cell>
          <table:table-cell office:value-type="float" office:value="0.0361517" calcext:value-type="float">
            <text:p>0.03615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2702" calcext:value-type="float">
            <text:p>0.012702</text:p>
          </table:table-cell>
          <table:table-cell office:value-type="float" office:value="0.0143415" calcext:value-type="float">
            <text:p>0.0143415</text:p>
          </table:table-cell>
          <table:table-cell office:value-type="float" office:value="0.139761" calcext:value-type="float">
            <text:p>0.139761</text:p>
          </table:table-cell>
          <table:table-cell office:value-type="float" office:value="0.0356649" calcext:value-type="float">
            <text:p>0.03566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23319" calcext:value-type="float">
            <text:p>0.0123319</text:p>
          </table:table-cell>
          <table:table-cell office:value-type="float" office:value="0.0150789" calcext:value-type="float">
            <text:p>0.0150789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0359958" calcext:value-type="float">
            <text:p>0.0359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23776" calcext:value-type="float">
            <text:p>0.0123776</text:p>
          </table:table-cell>
          <table:table-cell office:value-type="float" office:value="0.0136262" calcext:value-type="float">
            <text:p>0.0136262</text:p>
          </table:table-cell>
          <table:table-cell office:value-type="float" office:value="0.191932" calcext:value-type="float">
            <text:p>0.191932</text:p>
          </table:table-cell>
          <table:table-cell office:value-type="float" office:value="0.0362538" calcext:value-type="float">
            <text:p>0.03625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14902" calcext:value-type="float">
            <text:p>0.014902</text:p>
          </table:table-cell>
          <table:table-cell office:value-type="float" office:value="0.175797" calcext:value-type="float">
            <text:p>0.175797</text:p>
          </table:table-cell>
          <table:table-cell office:value-type="float" office:value="0.0361717" calcext:value-type="float">
            <text:p>0.03617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27864" calcext:value-type="float">
            <text:p>0.0127864</text:p>
          </table:table-cell>
          <table:table-cell office:value-type="float" office:value="0.0132708" calcext:value-type="float">
            <text:p>0.0132708</text:p>
          </table:table-cell>
          <table:table-cell office:value-type="float" office:value="0.139445" calcext:value-type="float">
            <text:p>0.139445</text:p>
          </table:table-cell>
          <table:table-cell office:value-type="float" office:value="0.0366797" calcext:value-type="float">
            <text:p>0.0366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26878" calcext:value-type="float">
            <text:p>0.0126878</text:p>
          </table:table-cell>
          <table:table-cell office:value-type="float" office:value="0.0149422" calcext:value-type="float">
            <text:p>0.0149422</text:p>
          </table:table-cell>
          <table:table-cell office:value-type="float" office:value="0.132084" calcext:value-type="float">
            <text:p>0.132084</text:p>
          </table:table-cell>
          <table:table-cell office:value-type="float" office:value="0.0363694" calcext:value-type="float">
            <text:p>0.03636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25688" calcext:value-type="float">
            <text:p>0.0125688</text:p>
          </table:table-cell>
          <table:table-cell office:value-type="float" office:value="0.0150518" calcext:value-type="float">
            <text:p>0.0150518</text:p>
          </table:table-cell>
          <table:table-cell office:value-type="float" office:value="0.133191" calcext:value-type="float">
            <text:p>0.133191</text:p>
          </table:table-cell>
          <table:table-cell office:value-type="float" office:value="0.040522" calcext:value-type="float">
            <text:p>0.0405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26763" calcext:value-type="float">
            <text:p>0.0126763</text:p>
          </table:table-cell>
          <table:table-cell office:value-type="float" office:value="0.0137187" calcext:value-type="float">
            <text:p>0.0137187</text:p>
          </table:table-cell>
          <table:table-cell office:value-type="float" office:value="0.131923" calcext:value-type="float">
            <text:p>0.131923</text:p>
          </table:table-cell>
          <table:table-cell office:value-type="float" office:value="0.0381785" calcext:value-type="float">
            <text:p>0.03817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26176" calcext:value-type="float">
            <text:p>0.0126176</text:p>
          </table:table-cell>
          <table:table-cell office:value-type="float" office:value="0.0127735" calcext:value-type="float">
            <text:p>0.0127735</text:p>
          </table:table-cell>
          <table:table-cell office:value-type="float" office:value="0.134035" calcext:value-type="float">
            <text:p>0.134035</text:p>
          </table:table-cell>
          <table:table-cell office:value-type="float" office:value="0.0381299" calcext:value-type="float">
            <text:p>0.03812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25142" calcext:value-type="float">
            <text:p>0.0125142</text:p>
          </table:table-cell>
          <table:table-cell office:value-type="float" office:value="0.0142583" calcext:value-type="float">
            <text:p>0.0142583</text:p>
          </table:table-cell>
          <table:table-cell office:value-type="float" office:value="0.142849" calcext:value-type="float">
            <text:p>0.142849</text:p>
          </table:table-cell>
          <table:table-cell office:value-type="float" office:value="0.0407734" calcext:value-type="float">
            <text:p>0.04077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24318" calcext:value-type="float">
            <text:p>0.0124318</text:p>
          </table:table-cell>
          <table:table-cell office:value-type="float" office:value="0.0162294" calcext:value-type="float">
            <text:p>0.0162294</text:p>
          </table:table-cell>
          <table:table-cell office:value-type="float" office:value="0.139007" calcext:value-type="float">
            <text:p>0.139007</text:p>
          </table:table-cell>
          <table:table-cell office:value-type="float" office:value="0.0395005" calcext:value-type="float">
            <text:p>0.03950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2737" calcext:value-type="float">
            <text:p>0.012737</text:p>
          </table:table-cell>
          <table:table-cell office:value-type="float" office:value="0.0146256" calcext:value-type="float">
            <text:p>0.0146256</text:p>
          </table:table-cell>
          <table:table-cell office:value-type="float" office:value="0.14374" calcext:value-type="float">
            <text:p>0.14374</text:p>
          </table:table-cell>
          <table:table-cell office:value-type="float" office:value="0.041085" calcext:value-type="float">
            <text:p>0.0410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23105" calcext:value-type="float">
            <text:p>0.0123105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132443" calcext:value-type="float">
            <text:p>0.132443</text:p>
          </table:table-cell>
          <table:table-cell office:value-type="float" office:value="0.0390628" calcext:value-type="float">
            <text:p>0.03906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25626" calcext:value-type="float">
            <text:p>0.0125626</text:p>
          </table:table-cell>
          <table:table-cell office:value-type="float" office:value="0.0159787" calcext:value-type="float">
            <text:p>0.0159787</text:p>
          </table:table-cell>
          <table:table-cell office:value-type="float" office:value="0.134855" calcext:value-type="float">
            <text:p>0.134855</text:p>
          </table:table-cell>
          <table:table-cell office:value-type="float" office:value="0.0403071" calcext:value-type="float">
            <text:p>0.04030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25393" calcext:value-type="float">
            <text:p>0.0125393</text:p>
          </table:table-cell>
          <table:table-cell office:value-type="float" office:value="0.0147411" calcext:value-type="float">
            <text:p>0.0147411</text:p>
          </table:table-cell>
          <table:table-cell office:value-type="float" office:value="0.138755" calcext:value-type="float">
            <text:p>0.138755</text:p>
          </table:table-cell>
          <table:table-cell office:value-type="float" office:value="0.0390665" calcext:value-type="float">
            <text:p>0.03906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24863" calcext:value-type="float">
            <text:p>0.0124863</text:p>
          </table:table-cell>
          <table:table-cell office:value-type="float" office:value="0.0146873" calcext:value-type="float">
            <text:p>0.0146873</text:p>
          </table:table-cell>
          <table:table-cell office:value-type="float" office:value="0.137877" calcext:value-type="float">
            <text:p>0.137877</text:p>
          </table:table-cell>
          <table:table-cell office:value-type="float" office:value="0.0396524" calcext:value-type="float">
            <text:p>0.03965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3448" calcext:value-type="float">
            <text:p>0.0123448</text:p>
          </table:table-cell>
          <table:table-cell office:value-type="float" office:value="0.0164427" calcext:value-type="float">
            <text:p>0.0164427</text:p>
          </table:table-cell>
          <table:table-cell office:value-type="float" office:value="0.140665" calcext:value-type="float">
            <text:p>0.140665</text:p>
          </table:table-cell>
          <table:table-cell office:value-type="float" office:value="0.040866" calcext:value-type="float">
            <text:p>0.040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24794" calcext:value-type="float">
            <text:p>0.0124794</text:p>
          </table:table-cell>
          <table:table-cell office:value-type="float" office:value="0.0144391" calcext:value-type="float">
            <text:p>0.0144391</text:p>
          </table:table-cell>
          <table:table-cell office:value-type="float" office:value="0.140998" calcext:value-type="float">
            <text:p>0.140998</text:p>
          </table:table-cell>
          <table:table-cell office:value-type="float" office:value="0.040194" calcext:value-type="float">
            <text:p>0.0401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36096" calcext:value-type="float">
            <text:p>0.0136096</text:p>
          </table:table-cell>
          <table:table-cell office:value-type="float" office:value="0.140124" calcext:value-type="float">
            <text:p>0.140124</text:p>
          </table:table-cell>
          <table:table-cell office:value-type="float" office:value="0.0382355" calcext:value-type="float">
            <text:p>0.03823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26755" calcext:value-type="float">
            <text:p>0.0126755</text:p>
          </table:table-cell>
          <table:table-cell office:value-type="float" office:value="0.0143559" calcext:value-type="float">
            <text:p>0.0143559</text:p>
          </table:table-cell>
          <table:table-cell office:value-type="float" office:value="0.138074" calcext:value-type="float">
            <text:p>0.138074</text:p>
          </table:table-cell>
          <table:table-cell office:value-type="float" office:value="0.0411376" calcext:value-type="float">
            <text:p>0.04113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24671" calcext:value-type="float">
            <text:p>0.0124671</text:p>
          </table:table-cell>
          <table:table-cell office:value-type="float" office:value="0.0147273" calcext:value-type="float">
            <text:p>0.0147273</text:p>
          </table:table-cell>
          <table:table-cell office:value-type="float" office:value="0.136843" calcext:value-type="float">
            <text:p>0.136843</text:p>
          </table:table-cell>
          <table:table-cell office:value-type="float" office:value="0.0377819" calcext:value-type="float">
            <text:p>0.03778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26053" calcext:value-type="float">
            <text:p>0.0126053</text:p>
          </table:table-cell>
          <table:table-cell office:value-type="float" office:value="0.016049" calcext:value-type="float">
            <text:p>0.016049</text:p>
          </table:table-cell>
          <table:table-cell office:value-type="float" office:value="0.137482" calcext:value-type="float">
            <text:p>0.137482</text:p>
          </table:table-cell>
          <table:table-cell office:value-type="float" office:value="0.0389571" calcext:value-type="float">
            <text:p>0.03895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21885" calcext:value-type="float">
            <text:p>0.0121885</text:p>
          </table:table-cell>
          <table:table-cell office:value-type="float" office:value="0.0143162" calcext:value-type="float">
            <text:p>0.0143162</text:p>
          </table:table-cell>
          <table:table-cell office:value-type="float" office:value="0.137558" calcext:value-type="float">
            <text:p>0.137558</text:p>
          </table:table-cell>
          <table:table-cell office:value-type="float" office:value="0.0372842" calcext:value-type="float">
            <text:p>0.03728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23617" calcext:value-type="float">
            <text:p>0.0123617</text:p>
          </table:table-cell>
          <table:table-cell office:value-type="float" office:value="0.0128488" calcext:value-type="float">
            <text:p>0.0128488</text:p>
          </table:table-cell>
          <table:table-cell office:value-type="float" office:value="0.138768" calcext:value-type="float">
            <text:p>0.138768</text:p>
          </table:table-cell>
          <table:table-cell office:value-type="float" office:value="0.0364249" calcext:value-type="float">
            <text:p>0.03642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26213" calcext:value-type="float">
            <text:p>0.0126213</text:p>
          </table:table-cell>
          <table:table-cell office:value-type="float" office:value="0.0144855" calcext:value-type="float">
            <text:p>0.0144855</text:p>
          </table:table-cell>
          <table:table-cell office:value-type="float" office:value="0.138331" calcext:value-type="float">
            <text:p>0.138331</text:p>
          </table:table-cell>
          <table:table-cell office:value-type="float" office:value="0.0363884" calcext:value-type="float">
            <text:p>0.03638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25388" calcext:value-type="float">
            <text:p>0.0125388</text:p>
          </table:table-cell>
          <table:table-cell office:value-type="float" office:value="0.012963" calcext:value-type="float">
            <text:p>0.012963</text:p>
          </table:table-cell>
          <table:table-cell office:value-type="float" office:value="0.136758" calcext:value-type="float">
            <text:p>0.136758</text:p>
          </table:table-cell>
          <table:table-cell office:value-type="float" office:value="0.0344135" calcext:value-type="float">
            <text:p>0.03441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23906" calcext:value-type="float">
            <text:p>0.0123906</text:p>
          </table:table-cell>
          <table:table-cell office:value-type="float" office:value="0.0130773" calcext:value-type="float">
            <text:p>0.0130773</text:p>
          </table:table-cell>
          <table:table-cell office:value-type="float" office:value="0.137369" calcext:value-type="float">
            <text:p>0.13736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24217" calcext:value-type="float">
            <text:p>0.0124217</text:p>
          </table:table-cell>
          <table:table-cell office:value-type="float" office:value="0.0136139" calcext:value-type="float">
            <text:p>0.0136139</text:p>
          </table:table-cell>
          <table:table-cell office:value-type="float" office:value="0.137138" calcext:value-type="float">
            <text:p>0.137138</text:p>
          </table:table-cell>
          <table:table-cell office:value-type="float" office:value="0.0340037" calcext:value-type="float">
            <text:p>0.03400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6846" calcext:value-type="float">
            <text:p>0.0136846</text:p>
          </table:table-cell>
          <table:table-cell office:value-type="float" office:value="0.13737" calcext:value-type="float">
            <text:p>0.13737</text:p>
          </table:table-cell>
          <table:table-cell office:value-type="float" office:value="0.0354385" calcext:value-type="float">
            <text:p>0.03543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24567" calcext:value-type="float">
            <text:p>0.0124567</text:p>
          </table:table-cell>
          <table:table-cell office:value-type="float" office:value="0.0135734" calcext:value-type="float">
            <text:p>0.0135734</text:p>
          </table:table-cell>
          <table:table-cell office:value-type="float" office:value="0.133462" calcext:value-type="float">
            <text:p>0.133462</text:p>
          </table:table-cell>
          <table:table-cell office:value-type="float" office:value="0.034725" calcext:value-type="float">
            <text:p>0.0347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26613" calcext:value-type="float">
            <text:p>0.0126613</text:p>
          </table:table-cell>
          <table:table-cell office:value-type="float" office:value="0.0133441" calcext:value-type="float">
            <text:p>0.0133441</text:p>
          </table:table-cell>
          <table:table-cell office:value-type="float" office:value="0.132964" calcext:value-type="float">
            <text:p>0.132964</text:p>
          </table:table-cell>
          <table:table-cell office:value-type="float" office:value="0.036257" calcext:value-type="float">
            <text:p>0.0362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25239" calcext:value-type="float">
            <text:p>0.0125239</text:p>
          </table:table-cell>
          <table:table-cell office:value-type="float" office:value="0.0137958" calcext:value-type="float">
            <text:p>0.0137958</text:p>
          </table:table-cell>
          <table:table-cell office:value-type="float" office:value="0.132583" calcext:value-type="float">
            <text:p>0.132583</text:p>
          </table:table-cell>
          <table:table-cell office:value-type="float" office:value="0.037451" calcext:value-type="float">
            <text:p>0.0374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27179" calcext:value-type="float">
            <text:p>0.0127179</text:p>
          </table:table-cell>
          <table:table-cell office:value-type="float" office:value="0.013118" calcext:value-type="float">
            <text:p>0.013118</text:p>
          </table:table-cell>
          <table:table-cell office:value-type="float" office:value="0.132325" calcext:value-type="float">
            <text:p>0.132325</text:p>
          </table:table-cell>
          <table:table-cell office:value-type="float" office:value="0.0375391" calcext:value-type="float">
            <text:p>0.0375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7683" calcext:value-type="float">
            <text:p>0.0127683</text:p>
          </table:table-cell>
          <table:table-cell office:value-type="float" office:value="0.0142787" calcext:value-type="float">
            <text:p>0.0142787</text:p>
          </table:table-cell>
          <table:table-cell office:value-type="float" office:value="0.132187" calcext:value-type="float">
            <text:p>0.132187</text:p>
          </table:table-cell>
          <table:table-cell office:value-type="float" office:value="0.0330313" calcext:value-type="float">
            <text:p>0.03303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28013" calcext:value-type="float">
            <text:p>0.0128013</text:p>
          </table:table-cell>
          <table:table-cell office:value-type="float" office:value="0.0136746" calcext:value-type="float">
            <text:p>0.0136746</text:p>
          </table:table-cell>
          <table:table-cell office:value-type="float" office:value="0.132307" calcext:value-type="float">
            <text:p>0.132307</text:p>
          </table:table-cell>
          <table:table-cell office:value-type="float" office:value="0.0344933" calcext:value-type="float">
            <text:p>0.03449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31844" calcext:value-type="float">
            <text:p>0.0131844</text:p>
          </table:table-cell>
          <table:table-cell office:value-type="float" office:value="0.0134672" calcext:value-type="float">
            <text:p>0.0134672</text:p>
          </table:table-cell>
          <table:table-cell office:value-type="float" office:value="0.131506" calcext:value-type="float">
            <text:p>0.131506</text:p>
          </table:table-cell>
          <table:table-cell office:value-type="float" office:value="0.0345754" calcext:value-type="float">
            <text:p>0.03457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33278" calcext:value-type="float">
            <text:p>0.0133278</text:p>
          </table:table-cell>
          <table:table-cell office:value-type="float" office:value="0.0126107" calcext:value-type="float">
            <text:p>0.0126107</text:p>
          </table:table-cell>
          <table:table-cell office:value-type="float" office:value="0.129014" calcext:value-type="float">
            <text:p>0.129014</text:p>
          </table:table-cell>
          <table:table-cell office:value-type="float" office:value="0.0344557" calcext:value-type="float">
            <text:p>0.03445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35502" calcext:value-type="float">
            <text:p>0.0135502</text:p>
          </table:table-cell>
          <table:table-cell office:value-type="float" office:value="0.0181021" calcext:value-type="float">
            <text:p>0.0181021</text:p>
          </table:table-cell>
          <table:table-cell office:value-type="float" office:value="0.135334" calcext:value-type="float">
            <text:p>0.135334</text:p>
          </table:table-cell>
          <table:table-cell office:value-type="float" office:value="0.0373572" calcext:value-type="float">
            <text:p>0.03735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30198" calcext:value-type="float">
            <text:p>0.0130198</text:p>
          </table:table-cell>
          <table:table-cell office:value-type="float" office:value="0.0155896" calcext:value-type="float">
            <text:p>0.0155896</text:p>
          </table:table-cell>
          <table:table-cell office:value-type="float" office:value="0.137378" calcext:value-type="float">
            <text:p>0.137378</text:p>
          </table:table-cell>
          <table:table-cell office:value-type="float" office:value="0.034225" calcext:value-type="float">
            <text:p>0.0342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26377" calcext:value-type="float">
            <text:p>0.0126377</text:p>
          </table:table-cell>
          <table:table-cell office:value-type="float" office:value="0.0135222" calcext:value-type="float">
            <text:p>0.0135222</text:p>
          </table:table-cell>
          <table:table-cell office:value-type="float" office:value="0.133134" calcext:value-type="float">
            <text:p>0.133134</text:p>
          </table:table-cell>
          <table:table-cell office:value-type="float" office:value="0.0340309" calcext:value-type="float">
            <text:p>0.03403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2461" calcext:value-type="float">
            <text:p>0.012461</text:p>
          </table:table-cell>
          <table:table-cell office:value-type="float" office:value="0.0158254" calcext:value-type="float">
            <text:p>0.0158254</text:p>
          </table:table-cell>
          <table:table-cell office:value-type="float" office:value="0.133332" calcext:value-type="float">
            <text:p>0.133332</text:p>
          </table:table-cell>
          <table:table-cell office:value-type="float" office:value="0.0346031" calcext:value-type="float">
            <text:p>0.03460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45786" calcext:value-type="float">
            <text:p>0.0145786</text:p>
          </table:table-cell>
          <table:table-cell office:value-type="float" office:value="0.0140955" calcext:value-type="float">
            <text:p>0.0140955</text:p>
          </table:table-cell>
          <table:table-cell office:value-type="float" office:value="0.140827" calcext:value-type="float">
            <text:p>0.140827</text:p>
          </table:table-cell>
          <table:table-cell office:value-type="float" office:value="0.0343667" calcext:value-type="float">
            <text:p>0.0343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57481" calcext:value-type="float">
            <text:p>0.0157481</text:p>
          </table:table-cell>
          <table:table-cell office:value-type="float" office:value="0.0130435" calcext:value-type="float">
            <text:p>0.0130435</text:p>
          </table:table-cell>
          <table:table-cell office:value-type="float" office:value="0.138538" calcext:value-type="float">
            <text:p>0.138538</text:p>
          </table:table-cell>
          <table:table-cell office:value-type="float" office:value="0.0348578" calcext:value-type="float">
            <text:p>0.03485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34231" calcext:value-type="float">
            <text:p>0.0134231</text:p>
          </table:table-cell>
          <table:table-cell office:value-type="float" office:value="0.0134451" calcext:value-type="float">
            <text:p>0.0134451</text:p>
          </table:table-cell>
          <table:table-cell office:value-type="float" office:value="0.137217" calcext:value-type="float">
            <text:p>0.137217</text:p>
          </table:table-cell>
          <table:table-cell office:value-type="float" office:value="0.0355375" calcext:value-type="float">
            <text:p>0.03553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37397" calcext:value-type="float">
            <text:p>0.0137397</text:p>
          </table:table-cell>
          <table:table-cell office:value-type="float" office:value="0.0139995" calcext:value-type="float">
            <text:p>0.0139995</text:p>
          </table:table-cell>
          <table:table-cell office:value-type="float" office:value="0.136561" calcext:value-type="float">
            <text:p>0.136561</text:p>
          </table:table-cell>
          <table:table-cell office:value-type="float" office:value="0.0352242" calcext:value-type="float">
            <text:p>0.03522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36679" calcext:value-type="float">
            <text:p>0.0136679</text:p>
          </table:table-cell>
          <table:table-cell office:value-type="float" office:value="0.0133407" calcext:value-type="float">
            <text:p>0.0133407</text:p>
          </table:table-cell>
          <table:table-cell office:value-type="float" office:value="0.132749" calcext:value-type="float">
            <text:p>0.132749</text:p>
          </table:table-cell>
          <table:table-cell office:value-type="float" office:value="0.0322485" calcext:value-type="float">
            <text:p>0.03224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32006" calcext:value-type="float">
            <text:p>0.0132006</text:p>
          </table:table-cell>
          <table:table-cell office:value-type="float" office:value="0.0131191" calcext:value-type="float">
            <text:p>0.0131191</text:p>
          </table:table-cell>
          <table:table-cell office:value-type="float" office:value="0.138353" calcext:value-type="float">
            <text:p>0.138353</text:p>
          </table:table-cell>
          <table:table-cell office:value-type="float" office:value="0.0334284" calcext:value-type="float">
            <text:p>0.03342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26238" calcext:value-type="float">
            <text:p>0.0126238</text:p>
          </table:table-cell>
          <table:table-cell office:value-type="float" office:value="0.0131826" calcext:value-type="float">
            <text:p>0.0131826</text:p>
          </table:table-cell>
          <table:table-cell office:value-type="float" office:value="0.133842" calcext:value-type="float">
            <text:p>0.133842</text:p>
          </table:table-cell>
          <table:table-cell office:value-type="float" office:value="0.0340702" calcext:value-type="float">
            <text:p>0.03407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24213" calcext:value-type="float">
            <text:p>0.0124213</text:p>
          </table:table-cell>
          <table:table-cell office:value-type="float" office:value="0.0144118" calcext:value-type="float">
            <text:p>0.0144118</text:p>
          </table:table-cell>
          <table:table-cell office:value-type="float" office:value="0.130348" calcext:value-type="float">
            <text:p>0.130348</text:p>
          </table:table-cell>
          <table:table-cell office:value-type="float" office:value="0.0333891" calcext:value-type="float">
            <text:p>0.03338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24416" calcext:value-type="float">
            <text:p>0.0124416</text:p>
          </table:table-cell>
          <table:table-cell office:value-type="float" office:value="0.0145113" calcext:value-type="float">
            <text:p>0.0145113</text:p>
          </table:table-cell>
          <table:table-cell office:value-type="float" office:value="0.132084" calcext:value-type="float">
            <text:p>0.132084</text:p>
          </table:table-cell>
          <table:table-cell office:value-type="float" office:value="0.0341331" calcext:value-type="float">
            <text:p>0.03413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27269" calcext:value-type="float">
            <text:p>0.0127269</text:p>
          </table:table-cell>
          <table:table-cell office:value-type="float" office:value="0.0136876" calcext:value-type="float">
            <text:p>0.0136876</text:p>
          </table:table-cell>
          <table:table-cell office:value-type="float" office:value="0.131518" calcext:value-type="float">
            <text:p>0.131518</text:p>
          </table:table-cell>
          <table:table-cell office:value-type="float" office:value="0.0334375" calcext:value-type="float">
            <text:p>0.03343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35009" calcext:value-type="float">
            <text:p>0.0135009</text:p>
          </table:table-cell>
          <table:table-cell office:value-type="float" office:value="0.0169338" calcext:value-type="float">
            <text:p>0.0169338</text:p>
          </table:table-cell>
          <table:table-cell office:value-type="float" office:value="0.132138" calcext:value-type="float">
            <text:p>0.132138</text:p>
          </table:table-cell>
          <table:table-cell office:value-type="float" office:value="0.0347771" calcext:value-type="float">
            <text:p>0.03477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25384" calcext:value-type="float">
            <text:p>0.0125384</text:p>
          </table:table-cell>
          <table:table-cell office:value-type="float" office:value="0.0150675" calcext:value-type="float">
            <text:p>0.0150675</text:p>
          </table:table-cell>
          <table:table-cell office:value-type="float" office:value="0.130599" calcext:value-type="float">
            <text:p>0.130599</text:p>
          </table:table-cell>
          <table:table-cell office:value-type="float" office:value="0.0352452" calcext:value-type="float">
            <text:p>0.03524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0793" calcext:value-type="float">
            <text:p>0.0130793</text:p>
          </table:table-cell>
          <table:table-cell office:value-type="float" office:value="0.0139671" calcext:value-type="float">
            <text:p>0.0139671</text:p>
          </table:table-cell>
          <table:table-cell office:value-type="float" office:value="0.133868" calcext:value-type="float">
            <text:p>0.133868</text:p>
          </table:table-cell>
          <table:table-cell office:value-type="float" office:value="0.0357025" calcext:value-type="float">
            <text:p>0.03570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23742" calcext:value-type="float">
            <text:p>0.0123742</text:p>
          </table:table-cell>
          <table:table-cell office:value-type="float" office:value="0.0122573" calcext:value-type="float">
            <text:p>0.0122573</text:p>
          </table:table-cell>
          <table:table-cell office:value-type="float" office:value="0.130753" calcext:value-type="float">
            <text:p>0.130753</text:p>
          </table:table-cell>
          <table:table-cell office:value-type="float" office:value="0.036135" calcext:value-type="float">
            <text:p>0.0361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21823" calcext:value-type="float">
            <text:p>0.0121823</text:p>
          </table:table-cell>
          <table:table-cell office:value-type="float" office:value="0.0139605" calcext:value-type="float">
            <text:p>0.0139605</text:p>
          </table:table-cell>
          <table:table-cell office:value-type="float" office:value="0.132471" calcext:value-type="float">
            <text:p>0.132471</text:p>
          </table:table-cell>
          <table:table-cell office:value-type="float" office:value="0.0374934" calcext:value-type="float">
            <text:p>0.03749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24855" calcext:value-type="float">
            <text:p>0.0124855</text:p>
          </table:table-cell>
          <table:table-cell office:value-type="float" office:value="0.0134335" calcext:value-type="float">
            <text:p>0.0134335</text:p>
          </table:table-cell>
          <table:table-cell office:value-type="float" office:value="0.132186" calcext:value-type="float">
            <text:p>0.132186</text:p>
          </table:table-cell>
          <table:table-cell office:value-type="float" office:value="0.0376429" calcext:value-type="float">
            <text:p>0.03764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27206" calcext:value-type="float">
            <text:p>0.0127206</text:p>
          </table:table-cell>
          <table:table-cell office:value-type="float" office:value="0.0126732" calcext:value-type="float">
            <text:p>0.0126732</text:p>
          </table:table-cell>
          <table:table-cell office:value-type="float" office:value="0.132497" calcext:value-type="float">
            <text:p>0.132497</text:p>
          </table:table-cell>
          <table:table-cell office:value-type="float" office:value="0.0365351" calcext:value-type="float">
            <text:p>0.03653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27669" calcext:value-type="float">
            <text:p>0.0127669</text:p>
          </table:table-cell>
          <table:table-cell office:value-type="float" office:value="0.0138342" calcext:value-type="float">
            <text:p>0.0138342</text:p>
          </table:table-cell>
          <table:table-cell office:value-type="float" office:value="0.13215" calcext:value-type="float">
            <text:p>0.13215</text:p>
          </table:table-cell>
          <table:table-cell office:value-type="float" office:value="0.0361755" calcext:value-type="float">
            <text:p>0.03617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24858" calcext:value-type="float">
            <text:p>0.0124858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132989" calcext:value-type="float">
            <text:p>0.132989</text:p>
          </table:table-cell>
          <table:table-cell office:value-type="float" office:value="0.0353897" calcext:value-type="float">
            <text:p>0.03538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55271" calcext:value-type="float">
            <text:p>0.0155271</text:p>
          </table:table-cell>
          <table:table-cell office:value-type="float" office:value="0.0143357" calcext:value-type="float">
            <text:p>0.0143357</text:p>
          </table:table-cell>
          <table:table-cell office:value-type="float" office:value="0.13352" calcext:value-type="float">
            <text:p>0.13352</text:p>
          </table:table-cell>
          <table:table-cell office:value-type="float" office:value="0.0353806" calcext:value-type="float">
            <text:p>0.03538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53987" calcext:value-type="float">
            <text:p>0.0153987</text:p>
          </table:table-cell>
          <table:table-cell office:value-type="float" office:value="0.0141785" calcext:value-type="float">
            <text:p>0.0141785</text:p>
          </table:table-cell>
          <table:table-cell office:value-type="float" office:value="0.132062" calcext:value-type="float">
            <text:p>0.132062</text:p>
          </table:table-cell>
          <table:table-cell office:value-type="float" office:value="0.0348788" calcext:value-type="float">
            <text:p>0.03487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28372" calcext:value-type="float">
            <text:p>0.0128372</text:p>
          </table:table-cell>
          <table:table-cell office:value-type="float" office:value="0.0173491" calcext:value-type="float">
            <text:p>0.0173491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0.0350032" calcext:value-type="float">
            <text:p>0.03500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23116" calcext:value-type="float">
            <text:p>0.0123116</text:p>
          </table:table-cell>
          <table:table-cell office:value-type="float" office:value="0.0145889" calcext:value-type="float">
            <text:p>0.0145889</text:p>
          </table:table-cell>
          <table:table-cell office:value-type="float" office:value="0.136526" calcext:value-type="float">
            <text:p>0.136526</text:p>
          </table:table-cell>
          <table:table-cell office:value-type="float" office:value="0.0353252" calcext:value-type="float">
            <text:p>0.03532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29363" calcext:value-type="float">
            <text:p>0.0129363</text:p>
          </table:table-cell>
          <table:table-cell office:value-type="float" office:value="0.0147424" calcext:value-type="float">
            <text:p>0.0147424</text:p>
          </table:table-cell>
          <table:table-cell office:value-type="float" office:value="0.136492" calcext:value-type="float">
            <text:p>0.136492</text:p>
          </table:table-cell>
          <table:table-cell office:value-type="float" office:value="0.0344147" calcext:value-type="float">
            <text:p>0.03441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29839" calcext:value-type="float">
            <text:p>0.0129839</text:p>
          </table:table-cell>
          <table:table-cell office:value-type="float" office:value="0.0127857" calcext:value-type="float">
            <text:p>0.0127857</text:p>
          </table:table-cell>
          <table:table-cell office:value-type="float" office:value="0.135768" calcext:value-type="float">
            <text:p>0.135768</text:p>
          </table:table-cell>
          <table:table-cell office:value-type="float" office:value="0.036292" calcext:value-type="float">
            <text:p>0.0362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27471" calcext:value-type="float">
            <text:p>0.0127471</text:p>
          </table:table-cell>
          <table:table-cell office:value-type="float" office:value="0.0128652" calcext:value-type="float">
            <text:p>0.0128652</text:p>
          </table:table-cell>
          <table:table-cell office:value-type="float" office:value="0.136731" calcext:value-type="float">
            <text:p>0.136731</text:p>
          </table:table-cell>
          <table:table-cell office:value-type="float" office:value="0.0356139" calcext:value-type="float">
            <text:p>0.03561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23822" calcext:value-type="float">
            <text:p>0.0123822</text:p>
          </table:table-cell>
          <table:table-cell office:value-type="float" office:value="0.0131051" calcext:value-type="float">
            <text:p>0.0131051</text:p>
          </table:table-cell>
          <table:table-cell office:value-type="float" office:value="0.140983" calcext:value-type="float">
            <text:p>0.140983</text:p>
          </table:table-cell>
          <table:table-cell office:value-type="float" office:value="0.0374711" calcext:value-type="float">
            <text:p>0.03747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24265" calcext:value-type="float">
            <text:p>0.0124265</text:p>
          </table:table-cell>
          <table:table-cell office:value-type="float" office:value="0.012831" calcext:value-type="float">
            <text:p>0.012831</text:p>
          </table:table-cell>
          <table:table-cell office:value-type="float" office:value="0.137506" calcext:value-type="float">
            <text:p>0.137506</text:p>
          </table:table-cell>
          <table:table-cell office:value-type="float" office:value="0.0357849" calcext:value-type="float">
            <text:p>0.03578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2572" calcext:value-type="float">
            <text:p>0.012572</text:p>
          </table:table-cell>
          <table:table-cell office:value-type="float" office:value="0.0135672" calcext:value-type="float">
            <text:p>0.0135672</text:p>
          </table:table-cell>
          <table:table-cell office:value-type="float" office:value="0.137632" calcext:value-type="float">
            <text:p>0.137632</text:p>
          </table:table-cell>
          <table:table-cell office:value-type="float" office:value="0.0365353" calcext:value-type="float">
            <text:p>0.03653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31964" calcext:value-type="float">
            <text:p>0.0131964</text:p>
          </table:table-cell>
          <table:table-cell office:value-type="float" office:value="0.0127184" calcext:value-type="float">
            <text:p>0.0127184</text:p>
          </table:table-cell>
          <table:table-cell office:value-type="float" office:value="0.139217" calcext:value-type="float">
            <text:p>0.139217</text:p>
          </table:table-cell>
          <table:table-cell office:value-type="float" office:value="0.0356115" calcext:value-type="float">
            <text:p>0.03561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25732" calcext:value-type="float">
            <text:p>0.0125732</text:p>
          </table:table-cell>
          <table:table-cell office:value-type="float" office:value="0.0168426" calcext:value-type="float">
            <text:p>0.0168426</text:p>
          </table:table-cell>
          <table:table-cell office:value-type="float" office:value="0.136694" calcext:value-type="float">
            <text:p>0.136694</text:p>
          </table:table-cell>
          <table:table-cell office:value-type="float" office:value="0.0354296" calcext:value-type="float">
            <text:p>0.03542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22306" calcext:value-type="float">
            <text:p>0.0122306</text:p>
          </table:table-cell>
          <table:table-cell office:value-type="float" office:value="0.0146302" calcext:value-type="float">
            <text:p>0.0146302</text:p>
          </table:table-cell>
          <table:table-cell office:value-type="float" office:value="0.137158" calcext:value-type="float">
            <text:p>0.137158</text:p>
          </table:table-cell>
          <table:table-cell office:value-type="float" office:value="0.0371356" calcext:value-type="float">
            <text:p>0.0371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23579" calcext:value-type="float">
            <text:p>0.0123579</text:p>
          </table:table-cell>
          <table:table-cell office:value-type="float" office:value="0.0168694" calcext:value-type="float">
            <text:p>0.0168694</text:p>
          </table:table-cell>
          <table:table-cell office:value-type="float" office:value="0.135562" calcext:value-type="float">
            <text:p>0.135562</text:p>
          </table:table-cell>
          <table:table-cell office:value-type="float" office:value="0.0354561" calcext:value-type="float">
            <text:p>0.03545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26835" calcext:value-type="float">
            <text:p>0.0126835</text:p>
          </table:table-cell>
          <table:table-cell office:value-type="float" office:value="0.0151314" calcext:value-type="float">
            <text:p>0.0151314</text:p>
          </table:table-cell>
          <table:table-cell office:value-type="float" office:value="0.132857" calcext:value-type="float">
            <text:p>0.132857</text:p>
          </table:table-cell>
          <table:table-cell office:value-type="float" office:value="0.0374674" calcext:value-type="float">
            <text:p>0.03746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24768" calcext:value-type="float">
            <text:p>0.0124768</text:p>
          </table:table-cell>
          <table:table-cell office:value-type="float" office:value="0.018367" calcext:value-type="float">
            <text:p>0.018367</text:p>
          </table:table-cell>
          <table:table-cell office:value-type="float" office:value="0.138399" calcext:value-type="float">
            <text:p>0.138399</text:p>
          </table:table-cell>
          <table:table-cell office:value-type="float" office:value="0.0376252" calcext:value-type="float">
            <text:p>0.03762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24616" calcext:value-type="float">
            <text:p>0.0124616</text:p>
          </table:table-cell>
          <table:table-cell office:value-type="float" office:value="0.0140507" calcext:value-type="float">
            <text:p>0.0140507</text:p>
          </table:table-cell>
          <table:table-cell office:value-type="float" office:value="0.138281" calcext:value-type="float">
            <text:p>0.138281</text:p>
          </table:table-cell>
          <table:table-cell office:value-type="float" office:value="0.0372189" calcext:value-type="float">
            <text:p>0.037218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21065" calcext:value-type="float">
            <text:p>0.0121065</text:p>
          </table:table-cell>
          <table:table-cell office:value-type="float" office:value="0.0174942" calcext:value-type="float">
            <text:p>0.0174942</text:p>
          </table:table-cell>
          <table:table-cell office:value-type="float" office:value="0.135897" calcext:value-type="float">
            <text:p>0.135897</text:p>
          </table:table-cell>
          <table:table-cell office:value-type="float" office:value="0.0385629" calcext:value-type="float">
            <text:p>0.03856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26654" calcext:value-type="float">
            <text:p>0.0126654</text:p>
          </table:table-cell>
          <table:table-cell office:value-type="float" office:value="0.0144866" calcext:value-type="float">
            <text:p>0.0144866</text:p>
          </table:table-cell>
          <table:table-cell office:value-type="float" office:value="0.145645" calcext:value-type="float">
            <text:p>0.145645</text:p>
          </table:table-cell>
          <table:table-cell office:value-type="float" office:value="0.0381582" calcext:value-type="float">
            <text:p>0.03815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24209" calcext:value-type="float">
            <text:p>0.0124209</text:p>
          </table:table-cell>
          <table:table-cell office:value-type="float" office:value="0.0129686" calcext:value-type="float">
            <text:p>0.0129686</text:p>
          </table:table-cell>
          <table:table-cell office:value-type="float" office:value="0.140787" calcext:value-type="float">
            <text:p>0.140787</text:p>
          </table:table-cell>
          <table:table-cell office:value-type="float" office:value="0.0372905" calcext:value-type="float">
            <text:p>0.03729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12478" calcext:value-type="float">
            <text:p>0.012478</text:p>
          </table:table-cell>
          <table:table-cell office:value-type="float" office:value="0.0127785" calcext:value-type="float">
            <text:p>0.0127785</text:p>
          </table:table-cell>
          <table:table-cell office:value-type="float" office:value="0.134366" calcext:value-type="float">
            <text:p>0.134366</text:p>
          </table:table-cell>
          <table:table-cell office:value-type="float" office:value="0.0370966" calcext:value-type="float">
            <text:p>0.03709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22366" calcext:value-type="float">
            <text:p>0.0122366</text:p>
          </table:table-cell>
          <table:table-cell office:value-type="float" office:value="0.0135131" calcext:value-type="float">
            <text:p>0.0135131</text:p>
          </table:table-cell>
          <table:table-cell office:value-type="float" office:value="0.131583" calcext:value-type="float">
            <text:p>0.131583</text:p>
          </table:table-cell>
          <table:table-cell office:value-type="float" office:value="0.035961" calcext:value-type="float">
            <text:p>0.0359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123121" calcext:value-type="float">
            <text:p>0.0123121</text:p>
          </table:table-cell>
          <table:table-cell office:value-type="float" office:value="0.0136416" calcext:value-type="float">
            <text:p>0.0136416</text:p>
          </table:table-cell>
          <table:table-cell office:value-type="float" office:value="0.130977" calcext:value-type="float">
            <text:p>0.130977</text:p>
          </table:table-cell>
          <table:table-cell office:value-type="float" office:value="0.0364841" calcext:value-type="float">
            <text:p>0.03648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24028" calcext:value-type="float">
            <text:p>0.0124028</text:p>
          </table:table-cell>
          <table:table-cell office:value-type="float" office:value="0.0141775" calcext:value-type="float">
            <text:p>0.0141775</text:p>
          </table:table-cell>
          <table:table-cell office:value-type="float" office:value="0.135203" calcext:value-type="float">
            <text:p>0.135203</text:p>
          </table:table-cell>
          <table:table-cell office:value-type="float" office:value="0.0365155" calcext:value-type="float">
            <text:p>0.03651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24052" calcext:value-type="float">
            <text:p>0.0124052</text:p>
          </table:table-cell>
          <table:table-cell office:value-type="float" office:value="0.013326" calcext:value-type="float">
            <text:p>0.013326</text:p>
          </table:table-cell>
          <table:table-cell office:value-type="float" office:value="0.129898" calcext:value-type="float">
            <text:p>0.129898</text:p>
          </table:table-cell>
          <table:table-cell office:value-type="float" office:value="0.035353" calcext:value-type="float">
            <text:p>0.0353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57081" calcext:value-type="float">
            <text:p>0.0157081</text:p>
          </table:table-cell>
          <table:table-cell office:value-type="float" office:value="0.0157285" calcext:value-type="float">
            <text:p>0.0157285</text:p>
          </table:table-cell>
          <table:table-cell office:value-type="float" office:value="0.129287" calcext:value-type="float">
            <text:p>0.129287</text:p>
          </table:table-cell>
          <table:table-cell office:value-type="float" office:value="0.0352607" calcext:value-type="float">
            <text:p>0.03526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135839" calcext:value-type="float">
            <text:p>0.0135839</text:p>
          </table:table-cell>
          <table:table-cell office:value-type="float" office:value="0.0144928" calcext:value-type="float">
            <text:p>0.0144928</text:p>
          </table:table-cell>
          <table:table-cell office:value-type="float" office:value="0.131353" calcext:value-type="float">
            <text:p>0.131353</text:p>
          </table:table-cell>
          <table:table-cell office:value-type="float" office:value="0.0357632" calcext:value-type="float">
            <text:p>0.03576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124025" calcext:value-type="float">
            <text:p>0.0124025</text:p>
          </table:table-cell>
          <table:table-cell office:value-type="float" office:value="0.0130487" calcext:value-type="float">
            <text:p>0.0130487</text:p>
          </table:table-cell>
          <table:table-cell office:value-type="float" office:value="0.132471" calcext:value-type="float">
            <text:p>0.132471</text:p>
          </table:table-cell>
          <table:table-cell office:value-type="float" office:value="0.034507" calcext:value-type="float">
            <text:p>0.0345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2865" calcext:value-type="float">
            <text:p>0.012865</text:p>
          </table:table-cell>
          <table:table-cell office:value-type="float" office:value="0.0156078" calcext:value-type="float">
            <text:p>0.0156078</text:p>
          </table:table-cell>
          <table:table-cell office:value-type="float" office:value="0.131374" calcext:value-type="float">
            <text:p>0.131374</text:p>
          </table:table-cell>
          <table:table-cell office:value-type="float" office:value="0.0345829" calcext:value-type="float">
            <text:p>0.03458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57668" calcext:value-type="float">
            <text:p>0.0157668</text:p>
          </table:table-cell>
          <table:table-cell office:value-type="float" office:value="0.0149765" calcext:value-type="float">
            <text:p>0.0149765</text:p>
          </table:table-cell>
          <table:table-cell office:value-type="float" office:value="0.132118" calcext:value-type="float">
            <text:p>0.132118</text:p>
          </table:table-cell>
          <table:table-cell office:value-type="float" office:value="0.0349455" calcext:value-type="float">
            <text:p>0.03494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133951" calcext:value-type="float">
            <text:p>0.0133951</text:p>
          </table:table-cell>
          <table:table-cell office:value-type="float" office:value="0.014466" calcext:value-type="float">
            <text:p>0.014466</text:p>
          </table:table-cell>
          <table:table-cell office:value-type="float" office:value="0.136077" calcext:value-type="float">
            <text:p>0.136077</text:p>
          </table:table-cell>
          <table:table-cell office:value-type="float" office:value="0.0355863" calcext:value-type="float">
            <text:p>0.03558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12628" calcext:value-type="float">
            <text:p>0.012628</text:p>
          </table:table-cell>
          <table:table-cell office:value-type="float" office:value="0.0131419" calcext:value-type="float">
            <text:p>0.0131419</text:p>
          </table:table-cell>
          <table:table-cell office:value-type="float" office:value="0.136011" calcext:value-type="float">
            <text:p>0.136011</text:p>
          </table:table-cell>
          <table:table-cell office:value-type="float" office:value="0.0371217" calcext:value-type="float">
            <text:p>0.03712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25044" calcext:value-type="float">
            <text:p>0.0125044</text:p>
          </table:table-cell>
          <table:table-cell office:value-type="float" office:value="0.0148922" calcext:value-type="float">
            <text:p>0.0148922</text:p>
          </table:table-cell>
          <table:table-cell office:value-type="float" office:value="0.132073" calcext:value-type="float">
            <text:p>0.132073</text:p>
          </table:table-cell>
          <table:table-cell office:value-type="float" office:value="0.0364326" calcext:value-type="float">
            <text:p>0.03643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39138" calcext:value-type="float">
            <text:p>0.0139138</text:p>
          </table:table-cell>
          <table:table-cell office:value-type="float" office:value="0.0144698" calcext:value-type="float">
            <text:p>0.0144698</text:p>
          </table:table-cell>
          <table:table-cell office:value-type="float" office:value="0.131742" calcext:value-type="float">
            <text:p>0.131742</text:p>
          </table:table-cell>
          <table:table-cell office:value-type="float" office:value="0.0345636" calcext:value-type="float">
            <text:p>0.03456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30519" calcext:value-type="float">
            <text:p>0.0130519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132343" calcext:value-type="float">
            <text:p>0.132343</text:p>
          </table:table-cell>
          <table:table-cell office:value-type="float" office:value="0.0379762" calcext:value-type="float">
            <text:p>0.03797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137007" calcext:value-type="float">
            <text:p>0.0137007</text:p>
          </table:table-cell>
          <table:table-cell office:value-type="float" office:value="0.014227" calcext:value-type="float">
            <text:p>0.014227</text:p>
          </table:table-cell>
          <table:table-cell office:value-type="float" office:value="0.132272" calcext:value-type="float">
            <text:p>0.132272</text:p>
          </table:table-cell>
          <table:table-cell office:value-type="float" office:value="0.0414289" calcext:value-type="float">
            <text:p>0.04142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28659" calcext:value-type="float">
            <text:p>0.0128659</text:p>
          </table:table-cell>
          <table:table-cell office:value-type="float" office:value="0.0139292" calcext:value-type="float">
            <text:p>0.0139292</text:p>
          </table:table-cell>
          <table:table-cell office:value-type="float" office:value="0.139566" calcext:value-type="float">
            <text:p>0.139566</text:p>
          </table:table-cell>
          <table:table-cell office:value-type="float" office:value="0.0383422" calcext:value-type="float">
            <text:p>0.03834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0.0131338" calcext:value-type="float">
            <text:p>0.0131338</text:p>
          </table:table-cell>
          <table:table-cell office:value-type="float" office:value="0.130451" calcext:value-type="float">
            <text:p>0.130451</text:p>
          </table:table-cell>
          <table:table-cell office:value-type="float" office:value="0.0382274" calcext:value-type="float">
            <text:p>0.03822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35401" calcext:value-type="float">
            <text:p>0.0135401</text:p>
          </table:table-cell>
          <table:table-cell office:value-type="float" office:value="0.0143193" calcext:value-type="float">
            <text:p>0.0143193</text:p>
          </table:table-cell>
          <table:table-cell office:value-type="float" office:value="0.136205" calcext:value-type="float">
            <text:p>0.136205</text:p>
          </table:table-cell>
          <table:table-cell office:value-type="float" office:value="0.0378325" calcext:value-type="float">
            <text:p>0.03783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131183" calcext:value-type="float">
            <text:p>0.0131183</text:p>
          </table:table-cell>
          <table:table-cell office:value-type="float" office:value="0.0142297" calcext:value-type="float">
            <text:p>0.0142297</text:p>
          </table:table-cell>
          <table:table-cell office:value-type="float" office:value="0.138038" calcext:value-type="float">
            <text:p>0.138038</text:p>
          </table:table-cell>
          <table:table-cell office:value-type="float" office:value="0.0380613" calcext:value-type="float">
            <text:p>0.03806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129337" calcext:value-type="float">
            <text:p>0.0129337</text:p>
          </table:table-cell>
          <table:table-cell office:value-type="float" office:value="0.0183134" calcext:value-type="float">
            <text:p>0.0183134</text:p>
          </table:table-cell>
          <table:table-cell office:value-type="float" office:value="0.135454" calcext:value-type="float">
            <text:p>0.135454</text:p>
          </table:table-cell>
          <table:table-cell office:value-type="float" office:value="0.0388527" calcext:value-type="float">
            <text:p>0.03885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31057" calcext:value-type="float">
            <text:p>0.0131057</text:p>
          </table:table-cell>
          <table:table-cell office:value-type="float" office:value="0.0150248" calcext:value-type="float">
            <text:p>0.0150248</text:p>
          </table:table-cell>
          <table:table-cell office:value-type="float" office:value="0.136088" calcext:value-type="float">
            <text:p>0.136088</text:p>
          </table:table-cell>
          <table:table-cell office:value-type="float" office:value="0.0394842" calcext:value-type="float">
            <text:p>0.03948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70367" calcext:value-type="float">
            <text:p>0.0170367</text:p>
          </table:table-cell>
          <table:table-cell office:value-type="float" office:value="0.0140885" calcext:value-type="float">
            <text:p>0.0140885</text:p>
          </table:table-cell>
          <table:table-cell office:value-type="float" office:value="0.130754" calcext:value-type="float">
            <text:p>0.130754</text:p>
          </table:table-cell>
          <table:table-cell office:value-type="float" office:value="0.0385808" calcext:value-type="float">
            <text:p>0.03858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46498" calcext:value-type="float">
            <text:p>0.0146498</text:p>
          </table:table-cell>
          <table:table-cell office:value-type="float" office:value="0.0135497" calcext:value-type="float">
            <text:p>0.0135497</text:p>
          </table:table-cell>
          <table:table-cell office:value-type="float" office:value="0.130815" calcext:value-type="float">
            <text:p>0.130815</text:p>
          </table:table-cell>
          <table:table-cell office:value-type="float" office:value="0.0388687" calcext:value-type="float">
            <text:p>0.03886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174289" calcext:value-type="float">
            <text:p>0.0174289</text:p>
          </table:table-cell>
          <table:table-cell office:value-type="float" office:value="0.0130691" calcext:value-type="float">
            <text:p>0.0130691</text:p>
          </table:table-cell>
          <table:table-cell office:value-type="float" office:value="0.129626" calcext:value-type="float">
            <text:p>0.129626</text:p>
          </table:table-cell>
          <table:table-cell office:value-type="float" office:value="0.0388194" calcext:value-type="float">
            <text:p>0.03881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131755" calcext:value-type="float">
            <text:p>0.0131755</text:p>
          </table:table-cell>
          <table:table-cell office:value-type="float" office:value="0.134446" calcext:value-type="float">
            <text:p>0.134446</text:p>
          </table:table-cell>
          <table:table-cell office:value-type="float" office:value="0.0386035" calcext:value-type="float">
            <text:p>0.03860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13301" calcext:value-type="float">
            <text:p>0.013301</text:p>
          </table:table-cell>
          <table:table-cell office:value-type="float" office:value="0.0152494" calcext:value-type="float">
            <text:p>0.0152494</text:p>
          </table:table-cell>
          <table:table-cell office:value-type="float" office:value="0.13176" calcext:value-type="float">
            <text:p>0.13176</text:p>
          </table:table-cell>
          <table:table-cell office:value-type="float" office:value="0.0391325" calcext:value-type="float">
            <text:p>0.03913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131277" calcext:value-type="float">
            <text:p>0.0131277</text:p>
          </table:table-cell>
          <table:table-cell office:value-type="float" office:value="0.0151093" calcext:value-type="float">
            <text:p>0.0151093</text:p>
          </table:table-cell>
          <table:table-cell office:value-type="float" office:value="0.131005" calcext:value-type="float">
            <text:p>0.131005</text:p>
          </table:table-cell>
          <table:table-cell office:value-type="float" office:value="0.0384732" calcext:value-type="float">
            <text:p>0.03847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134847" calcext:value-type="float">
            <text:p>0.0134847</text:p>
          </table:table-cell>
          <table:table-cell office:value-type="float" office:value="0.0137429" calcext:value-type="float">
            <text:p>0.0137429</text:p>
          </table:table-cell>
          <table:table-cell office:value-type="float" office:value="0.130714" calcext:value-type="float">
            <text:p>0.130714</text:p>
          </table:table-cell>
          <table:table-cell office:value-type="float" office:value="0.037764" calcext:value-type="float">
            <text:p>0.0377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140507" calcext:value-type="float">
            <text:p>0.0140507</text:p>
          </table:table-cell>
          <table:table-cell office:value-type="float" office:value="0.0128179" calcext:value-type="float">
            <text:p>0.0128179</text:p>
          </table:table-cell>
          <table:table-cell office:value-type="float" office:value="0.133039" calcext:value-type="float">
            <text:p>0.133039</text:p>
          </table:table-cell>
          <table:table-cell office:value-type="float" office:value="0.0374135" calcext:value-type="float">
            <text:p>0.0374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26671" calcext:value-type="float">
            <text:p>0.0126671</text:p>
          </table:table-cell>
          <table:table-cell office:value-type="float" office:value="0.0130801" calcext:value-type="float">
            <text:p>0.0130801</text:p>
          </table:table-cell>
          <table:table-cell office:value-type="float" office:value="0.130651" calcext:value-type="float">
            <text:p>0.130651</text:p>
          </table:table-cell>
          <table:table-cell office:value-type="float" office:value="0.0384601" calcext:value-type="float">
            <text:p>0.03846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128563" calcext:value-type="float">
            <text:p>0.0128563</text:p>
          </table:table-cell>
          <table:table-cell office:value-type="float" office:value="0.0141096" calcext:value-type="float">
            <text:p>0.0141096</text:p>
          </table:table-cell>
          <table:table-cell office:value-type="float" office:value="0.130584" calcext:value-type="float">
            <text:p>0.130584</text:p>
          </table:table-cell>
          <table:table-cell office:value-type="float" office:value="0.0347801" calcext:value-type="float">
            <text:p>0.03478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123162" calcext:value-type="float">
            <text:p>0.0123162</text:p>
          </table:table-cell>
          <table:table-cell office:value-type="float" office:value="0.013738" calcext:value-type="float">
            <text:p>0.013738</text:p>
          </table:table-cell>
          <table:table-cell office:value-type="float" office:value="0.130003" calcext:value-type="float">
            <text:p>0.130003</text:p>
          </table:table-cell>
          <table:table-cell office:value-type="float" office:value="0.0360674" calcext:value-type="float">
            <text:p>0.036067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147142" calcext:value-type="float">
            <text:p>0.0147142</text:p>
          </table:table-cell>
          <table:table-cell office:value-type="float" office:value="0.013676" calcext:value-type="float">
            <text:p>0.013676</text:p>
          </table:table-cell>
          <table:table-cell office:value-type="float" office:value="0.132188" calcext:value-type="float">
            <text:p>0.132188</text:p>
          </table:table-cell>
          <table:table-cell office:value-type="float" office:value="0.0337926" calcext:value-type="float">
            <text:p>0.03379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31547" calcext:value-type="float">
            <text:p>0.0131547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132078" calcext:value-type="float">
            <text:p>0.132078</text:p>
          </table:table-cell>
          <table:table-cell office:value-type="float" office:value="0.0356671" calcext:value-type="float">
            <text:p>0.03566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125363" calcext:value-type="float">
            <text:p>0.0125363</text:p>
          </table:table-cell>
          <table:table-cell office:value-type="float" office:value="0.014333" calcext:value-type="float">
            <text:p>0.014333</text:p>
          </table:table-cell>
          <table:table-cell office:value-type="float" office:value="0.130933" calcext:value-type="float">
            <text:p>0.130933</text:p>
          </table:table-cell>
          <table:table-cell office:value-type="float" office:value="0.0348336" calcext:value-type="float">
            <text:p>0.03483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125992" calcext:value-type="float">
            <text:p>0.0125992</text:p>
          </table:table-cell>
          <table:table-cell office:value-type="float" office:value="0.0127467" calcext:value-type="float">
            <text:p>0.0127467</text:p>
          </table:table-cell>
          <table:table-cell office:value-type="float" office:value="0.131593" calcext:value-type="float">
            <text:p>0.131593</text:p>
          </table:table-cell>
          <table:table-cell office:value-type="float" office:value="0.033459" calcext:value-type="float">
            <text:p>0.0334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25891" calcext:value-type="float">
            <text:p>0.0125891</text:p>
          </table:table-cell>
          <table:table-cell office:value-type="float" office:value="0.0139916" calcext:value-type="float">
            <text:p>0.0139916</text:p>
          </table:table-cell>
          <table:table-cell office:value-type="float" office:value="0.131298" calcext:value-type="float">
            <text:p>0.131298</text:p>
          </table:table-cell>
          <table:table-cell office:value-type="float" office:value="0.0358426" calcext:value-type="float">
            <text:p>0.03584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2491" calcext:value-type="float">
            <text:p>0.012491</text:p>
          </table:table-cell>
          <table:table-cell office:value-type="float" office:value="0.0143685" calcext:value-type="float">
            <text:p>0.0143685</text:p>
          </table:table-cell>
          <table:table-cell office:value-type="float" office:value="0.130566" calcext:value-type="float">
            <text:p>0.130566</text:p>
          </table:table-cell>
          <table:table-cell office:value-type="float" office:value="0.0369023" calcext:value-type="float">
            <text:p>0.03690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123984" calcext:value-type="float">
            <text:p>0.0123984</text:p>
          </table:table-cell>
          <table:table-cell office:value-type="float" office:value="0.014081" calcext:value-type="float">
            <text:p>0.014081</text:p>
          </table:table-cell>
          <table:table-cell office:value-type="float" office:value="0.131932" calcext:value-type="float">
            <text:p>0.131932</text:p>
          </table:table-cell>
          <table:table-cell office:value-type="float" office:value="0.0343939" calcext:value-type="float">
            <text:p>0.03439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125206" calcext:value-type="float">
            <text:p>0.0125206</text:p>
          </table:table-cell>
          <table:table-cell office:value-type="float" office:value="0.0132444" calcext:value-type="float">
            <text:p>0.0132444</text:p>
          </table:table-cell>
          <table:table-cell office:value-type="float" office:value="0.134102" calcext:value-type="float">
            <text:p>0.134102</text:p>
          </table:table-cell>
          <table:table-cell office:value-type="float" office:value="0.0379323" calcext:value-type="float">
            <text:p>0.03793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124655" calcext:value-type="float">
            <text:p>0.0124655</text:p>
          </table:table-cell>
          <table:table-cell office:value-type="float" office:value="0.0138387" calcext:value-type="float">
            <text:p>0.0138387</text:p>
          </table:table-cell>
          <table:table-cell office:value-type="float" office:value="0.132728" calcext:value-type="float">
            <text:p>0.132728</text:p>
          </table:table-cell>
          <table:table-cell office:value-type="float" office:value="0.0372496" calcext:value-type="float">
            <text:p>0.03724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23292" calcext:value-type="float">
            <text:p>0.0123292</text:p>
          </table:table-cell>
          <table:table-cell office:value-type="float" office:value="0.0142813" calcext:value-type="float">
            <text:p>0.0142813</text:p>
          </table:table-cell>
          <table:table-cell office:value-type="float" office:value="0.130695" calcext:value-type="float">
            <text:p>0.130695</text:p>
          </table:table-cell>
          <table:table-cell office:value-type="float" office:value="0.0340575" calcext:value-type="float">
            <text:p>0.03405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23121" calcext:value-type="float">
            <text:p>0.0123121</text:p>
          </table:table-cell>
          <table:table-cell office:value-type="float" office:value="0.0145121" calcext:value-type="float">
            <text:p>0.0145121</text:p>
          </table:table-cell>
          <table:table-cell office:value-type="float" office:value="0.130969" calcext:value-type="float">
            <text:p>0.130969</text:p>
          </table:table-cell>
          <table:table-cell office:value-type="float" office:value="0.0332305" calcext:value-type="float">
            <text:p>0.03323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22997" calcext:value-type="float">
            <text:p>0.0122997</text:p>
          </table:table-cell>
          <table:table-cell office:value-type="float" office:value="0.0166775" calcext:value-type="float">
            <text:p>0.0166775</text:p>
          </table:table-cell>
          <table:table-cell office:value-type="float" office:value="0.129465" calcext:value-type="float">
            <text:p>0.129465</text:p>
          </table:table-cell>
          <table:table-cell office:value-type="float" office:value="0.0347157" calcext:value-type="float">
            <text:p>0.03471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32685" calcext:value-type="float">
            <text:p>0.0132685</text:p>
          </table:table-cell>
          <table:table-cell office:value-type="float" office:value="0.0146734" calcext:value-type="float">
            <text:p>0.0146734</text:p>
          </table:table-cell>
          <table:table-cell office:value-type="float" office:value="0.129881" calcext:value-type="float">
            <text:p>0.129881</text:p>
          </table:table-cell>
          <table:table-cell office:value-type="float" office:value="0.0380776" calcext:value-type="float">
            <text:p>0.03807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131114" calcext:value-type="float">
            <text:p>0.0131114</text:p>
          </table:table-cell>
          <table:table-cell office:value-type="float" office:value="0.0148585" calcext:value-type="float">
            <text:p>0.0148585</text:p>
          </table:table-cell>
          <table:table-cell office:value-type="float" office:value="0.130282" calcext:value-type="float">
            <text:p>0.130282</text:p>
          </table:table-cell>
          <table:table-cell office:value-type="float" office:value="0.0382842" calcext:value-type="float">
            <text:p>0.03828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125871" calcext:value-type="float">
            <text:p>0.0125871</text:p>
          </table:table-cell>
          <table:table-cell office:value-type="float" office:value="0.013501" calcext:value-type="float">
            <text:p>0.013501</text:p>
          </table:table-cell>
          <table:table-cell office:value-type="float" office:value="0.130267" calcext:value-type="float">
            <text:p>0.130267</text:p>
          </table:table-cell>
          <table:table-cell office:value-type="float" office:value="0.0391789" calcext:value-type="float">
            <text:p>0.03917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2661" calcext:value-type="float">
            <text:p>0.012661</text:p>
          </table:table-cell>
          <table:table-cell office:value-type="float" office:value="0.0126545" calcext:value-type="float">
            <text:p>0.0126545</text:p>
          </table:table-cell>
          <table:table-cell office:value-type="float" office:value="0.132451" calcext:value-type="float">
            <text:p>0.132451</text:p>
          </table:table-cell>
          <table:table-cell office:value-type="float" office:value="0.0431732" calcext:value-type="float">
            <text:p>0.04317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52394" calcext:value-type="float">
            <text:p>0.0152394</text:p>
          </table:table-cell>
          <table:table-cell office:value-type="float" office:value="0.13091" calcext:value-type="float">
            <text:p>0.13091</text:p>
          </table:table-cell>
          <table:table-cell office:value-type="float" office:value="0.035438" calcext:value-type="float">
            <text:p>0.03543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127063" calcext:value-type="float">
            <text:p>0.0127063</text:p>
          </table:table-cell>
          <table:table-cell office:value-type="float" office:value="0.0129928" calcext:value-type="float">
            <text:p>0.0129928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346849" calcext:value-type="float">
            <text:p>0.03468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124436" calcext:value-type="float">
            <text:p>0.0124436</text:p>
          </table:table-cell>
          <table:table-cell office:value-type="float" office:value="0.0134436" calcext:value-type="float">
            <text:p>0.0134436</text:p>
          </table:table-cell>
          <table:table-cell office:value-type="float" office:value="0.132743" calcext:value-type="float">
            <text:p>0.132743</text:p>
          </table:table-cell>
          <table:table-cell office:value-type="float" office:value="0.034872" calcext:value-type="float">
            <text:p>0.0348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123905" calcext:value-type="float">
            <text:p>0.0123905</text:p>
          </table:table-cell>
          <table:table-cell office:value-type="float" office:value="0.0154509" calcext:value-type="float">
            <text:p>0.0154509</text:p>
          </table:table-cell>
          <table:table-cell office:value-type="float" office:value="0.131444" calcext:value-type="float">
            <text:p>0.131444</text:p>
          </table:table-cell>
          <table:table-cell office:value-type="float" office:value="0.035021" calcext:value-type="float">
            <text:p>0.0350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22916" calcext:value-type="float">
            <text:p>0.0122916</text:p>
          </table:table-cell>
          <table:table-cell office:value-type="float" office:value="0.0141601" calcext:value-type="float">
            <text:p>0.0141601</text:p>
          </table:table-cell>
          <table:table-cell office:value-type="float" office:value="0.132085" calcext:value-type="float">
            <text:p>0.132085</text:p>
          </table:table-cell>
          <table:table-cell office:value-type="float" office:value="0.0367543" calcext:value-type="float">
            <text:p>0.03675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12431" calcext:value-type="float">
            <text:p>0.012431</text:p>
          </table:table-cell>
          <table:table-cell office:value-type="float" office:value="0.0151578" calcext:value-type="float">
            <text:p>0.0151578</text:p>
          </table:table-cell>
          <table:table-cell office:value-type="float" office:value="0.130961" calcext:value-type="float">
            <text:p>0.130961</text:p>
          </table:table-cell>
          <table:table-cell office:value-type="float" office:value="0.0368992" calcext:value-type="float">
            <text:p>0.03689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141025" calcext:value-type="float">
            <text:p>0.0141025</text:p>
          </table:table-cell>
          <table:table-cell office:value-type="float" office:value="0.0138793" calcext:value-type="float">
            <text:p>0.0138793</text:p>
          </table:table-cell>
          <table:table-cell office:value-type="float" office:value="0.134253" calcext:value-type="float">
            <text:p>0.134253</text:p>
          </table:table-cell>
          <table:table-cell office:value-type="float" office:value="0.0357988" calcext:value-type="float">
            <text:p>0.035798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131981" calcext:value-type="float">
            <text:p>0.0131981</text:p>
          </table:table-cell>
          <table:table-cell office:value-type="float" office:value="0.0131577" calcext:value-type="float">
            <text:p>0.0131577</text:p>
          </table:table-cell>
          <table:table-cell office:value-type="float" office:value="0.137849" calcext:value-type="float">
            <text:p>0.137849</text:p>
          </table:table-cell>
          <table:table-cell office:value-type="float" office:value="0.0348954" calcext:value-type="float">
            <text:p>0.034895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130854" calcext:value-type="float">
            <text:p>0.0130854</text:p>
          </table:table-cell>
          <table:table-cell office:value-type="float" office:value="0.0139925" calcext:value-type="float">
            <text:p>0.0139925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03807" calcext:value-type="float">
            <text:p>0.038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135299" calcext:value-type="float">
            <text:p>0.0135299</text:p>
          </table:table-cell>
          <table:table-cell office:value-type="float" office:value="0.013783" calcext:value-type="float">
            <text:p>0.013783</text:p>
          </table:table-cell>
          <table:table-cell office:value-type="float" office:value="0.135141" calcext:value-type="float">
            <text:p>0.135141</text:p>
          </table:table-cell>
          <table:table-cell office:value-type="float" office:value="0.0354032" calcext:value-type="float">
            <text:p>0.03540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3633" calcext:value-type="float">
            <text:p>0.013633</text:p>
          </table:table-cell>
          <table:table-cell office:value-type="float" office:value="0.0142644" calcext:value-type="float">
            <text:p>0.0142644</text:p>
          </table:table-cell>
          <table:table-cell office:value-type="float" office:value="0.135898" calcext:value-type="float">
            <text:p>0.135898</text:p>
          </table:table-cell>
          <table:table-cell office:value-type="float" office:value="0.0353356" calcext:value-type="float">
            <text:p>0.03533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129707" calcext:value-type="float">
            <text:p>0.0129707</text:p>
          </table:table-cell>
          <table:table-cell office:value-type="float" office:value="0.0131246" calcext:value-type="float">
            <text:p>0.0131246</text:p>
          </table:table-cell>
          <table:table-cell office:value-type="float" office:value="0.135173" calcext:value-type="float">
            <text:p>0.135173</text:p>
          </table:table-cell>
          <table:table-cell office:value-type="float" office:value="0.036253" calcext:value-type="float">
            <text:p>0.0362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135122" calcext:value-type="float">
            <text:p>0.0135122</text:p>
          </table:table-cell>
          <table:table-cell office:value-type="float" office:value="0.0139791" calcext:value-type="float">
            <text:p>0.0139791</text:p>
          </table:table-cell>
          <table:table-cell office:value-type="float" office:value="0.126348" calcext:value-type="float">
            <text:p>0.126348</text:p>
          </table:table-cell>
          <table:table-cell office:value-type="float" office:value="0.0351761" calcext:value-type="float">
            <text:p>0.03517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145966" calcext:value-type="float">
            <text:p>0.0145966</text:p>
          </table:table-cell>
          <table:table-cell office:value-type="float" office:value="0.0132992" calcext:value-type="float">
            <text:p>0.0132992</text:p>
          </table:table-cell>
          <table:table-cell office:value-type="float" office:value="0.12958" calcext:value-type="float">
            <text:p>0.12958</text:p>
          </table:table-cell>
          <table:table-cell office:value-type="float" office:value="0.035999" calcext:value-type="float">
            <text:p>0.0359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31718" calcext:value-type="float">
            <text:p>0.0131718</text:p>
          </table:table-cell>
          <table:table-cell office:value-type="float" office:value="0.013755" calcext:value-type="float">
            <text:p>0.013755</text:p>
          </table:table-cell>
          <table:table-cell office:value-type="float" office:value="0.131542" calcext:value-type="float">
            <text:p>0.131542</text:p>
          </table:table-cell>
          <table:table-cell office:value-type="float" office:value="0.034764" calcext:value-type="float">
            <text:p>0.0347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135688" calcext:value-type="float">
            <text:p>0.0135688</text:p>
          </table:table-cell>
          <table:table-cell office:value-type="float" office:value="0.0137026" calcext:value-type="float">
            <text:p>0.0137026</text:p>
          </table:table-cell>
          <table:table-cell office:value-type="float" office:value="0.131139" calcext:value-type="float">
            <text:p>0.131139</text:p>
          </table:table-cell>
          <table:table-cell office:value-type="float" office:value="0.0340719" calcext:value-type="float">
            <text:p>0.03407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131135" calcext:value-type="float">
            <text:p>0.0131135</text:p>
          </table:table-cell>
          <table:table-cell office:value-type="float" office:value="0.0132007" calcext:value-type="float">
            <text:p>0.0132007</text:p>
          </table:table-cell>
          <table:table-cell office:value-type="float" office:value="0.129693" calcext:value-type="float">
            <text:p>0.129693</text:p>
          </table:table-cell>
          <table:table-cell office:value-type="float" office:value="0.0342665" calcext:value-type="float">
            <text:p>0.034266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133349" calcext:value-type="float">
            <text:p>0.0133349</text:p>
          </table:table-cell>
          <table:table-cell office:value-type="float" office:value="0.0137618" calcext:value-type="float">
            <text:p>0.0137618</text:p>
          </table:table-cell>
          <table:table-cell office:value-type="float" office:value="0.13738" calcext:value-type="float">
            <text:p>0.13738</text:p>
          </table:table-cell>
          <table:table-cell office:value-type="float" office:value="0.0352377" calcext:value-type="float">
            <text:p>0.035237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131721" calcext:value-type="float">
            <text:p>0.0131721</text:p>
          </table:table-cell>
          <table:table-cell office:value-type="float" office:value="0.0150857" calcext:value-type="float">
            <text:p>0.0150857</text:p>
          </table:table-cell>
          <table:table-cell office:value-type="float" office:value="0.134936" calcext:value-type="float">
            <text:p>0.134936</text:p>
          </table:table-cell>
          <table:table-cell office:value-type="float" office:value="0.0353749" calcext:value-type="float">
            <text:p>0.03537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66238" calcext:value-type="float">
            <text:p>0.0166238</text:p>
          </table:table-cell>
          <table:table-cell office:value-type="float" office:value="0.0134616" calcext:value-type="float">
            <text:p>0.0134616</text:p>
          </table:table-cell>
          <table:table-cell office:value-type="float" office:value="0.135026" calcext:value-type="float">
            <text:p>0.135026</text:p>
          </table:table-cell>
          <table:table-cell office:value-type="float" office:value="0.0392196" calcext:value-type="float">
            <text:p>0.03921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144718" calcext:value-type="float">
            <text:p>0.0144718</text:p>
          </table:table-cell>
          <table:table-cell office:value-type="float" office:value="0.0131955" calcext:value-type="float">
            <text:p>0.0131955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383057" calcext:value-type="float">
            <text:p>0.03830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134536" calcext:value-type="float">
            <text:p>0.0134536</text:p>
          </table:table-cell>
          <table:table-cell office:value-type="float" office:value="0.0135326" calcext:value-type="float">
            <text:p>0.0135326</text:p>
          </table:table-cell>
          <table:table-cell office:value-type="float" office:value="0.13085" calcext:value-type="float">
            <text:p>0.13085</text:p>
          </table:table-cell>
          <table:table-cell office:value-type="float" office:value="0.0392753" calcext:value-type="float">
            <text:p>0.03927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159125" calcext:value-type="float">
            <text:p>0.0159125</text:p>
          </table:table-cell>
          <table:table-cell office:value-type="float" office:value="0.0135881" calcext:value-type="float">
            <text:p>0.0135881</text:p>
          </table:table-cell>
          <table:table-cell office:value-type="float" office:value="0.131269" calcext:value-type="float">
            <text:p>0.131269</text:p>
          </table:table-cell>
          <table:table-cell office:value-type="float" office:value="0.036056" calcext:value-type="float">
            <text:p>0.0360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161581" calcext:value-type="float">
            <text:p>0.0161581</text:p>
          </table:table-cell>
          <table:table-cell office:value-type="float" office:value="0.0132297" calcext:value-type="float">
            <text:p>0.0132297</text:p>
          </table:table-cell>
          <table:table-cell office:value-type="float" office:value="0.131542" calcext:value-type="float">
            <text:p>0.131542</text:p>
          </table:table-cell>
          <table:table-cell office:value-type="float" office:value="0.0360692" calcext:value-type="float">
            <text:p>0.03606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27665" calcext:value-type="float">
            <text:p>0.0127665</text:p>
          </table:table-cell>
          <table:table-cell office:value-type="float" office:value="0.0147311" calcext:value-type="float">
            <text:p>0.0147311</text:p>
          </table:table-cell>
          <table:table-cell office:value-type="float" office:value="0.132183" calcext:value-type="float">
            <text:p>0.132183</text:p>
          </table:table-cell>
          <table:table-cell office:value-type="float" office:value="0.0332194" calcext:value-type="float">
            <text:p>0.03321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123497" calcext:value-type="float">
            <text:p>0.0123497</text:p>
          </table:table-cell>
          <table:table-cell office:value-type="float" office:value="0.0123716" calcext:value-type="float">
            <text:p>0.0123716</text:p>
          </table:table-cell>
          <table:table-cell office:value-type="float" office:value="0.136146" calcext:value-type="float">
            <text:p>0.136146</text:p>
          </table:table-cell>
          <table:table-cell office:value-type="float" office:value="0.0346291" calcext:value-type="float">
            <text:p>0.03462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130261" calcext:value-type="float">
            <text:p>0.0130261</text:p>
          </table:table-cell>
          <table:table-cell office:value-type="float" office:value="0.0141301" calcext:value-type="float">
            <text:p>0.0141301</text:p>
          </table:table-cell>
          <table:table-cell office:value-type="float" office:value="0.135397" calcext:value-type="float">
            <text:p>0.135397</text:p>
          </table:table-cell>
          <table:table-cell office:value-type="float" office:value="0.0351165" calcext:value-type="float">
            <text:p>0.03511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133077" calcext:value-type="float">
            <text:p>0.0133077</text:p>
          </table:table-cell>
          <table:table-cell office:value-type="float" office:value="0.0139415" calcext:value-type="float">
            <text:p>0.0139415</text:p>
          </table:table-cell>
          <table:table-cell office:value-type="float" office:value="0.134798" calcext:value-type="float">
            <text:p>0.134798</text:p>
          </table:table-cell>
          <table:table-cell office:value-type="float" office:value="0.0342695" calcext:value-type="float">
            <text:p>0.03426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130332" calcext:value-type="float">
            <text:p>0.0130332</text:p>
          </table:table-cell>
          <table:table-cell office:value-type="float" office:value="0.0131594" calcext:value-type="float">
            <text:p>0.0131594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0.0347081" calcext:value-type="float">
            <text:p>0.03470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3063" calcext:value-type="float">
            <text:p>0.013063</text:p>
          </table:table-cell>
          <table:table-cell office:value-type="float" office:value="0.0140584" calcext:value-type="float">
            <text:p>0.0140584</text:p>
          </table:table-cell>
          <table:table-cell office:value-type="float" office:value="0.139771" calcext:value-type="float">
            <text:p>0.139771</text:p>
          </table:table-cell>
          <table:table-cell office:value-type="float" office:value="0.0356523" calcext:value-type="float">
            <text:p>0.03565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134461" calcext:value-type="float">
            <text:p>0.0134461</text:p>
          </table:table-cell>
          <table:table-cell office:value-type="float" office:value="0.0136919" calcext:value-type="float">
            <text:p>0.0136919</text:p>
          </table:table-cell>
          <table:table-cell office:value-type="float" office:value="0.136447" calcext:value-type="float">
            <text:p>0.136447</text:p>
          </table:table-cell>
          <table:table-cell office:value-type="float" office:value="0.0352988" calcext:value-type="float">
            <text:p>0.03529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138798" calcext:value-type="float">
            <text:p>0.0138798</text:p>
          </table:table-cell>
          <table:table-cell office:value-type="float" office:value="0.0129706" calcext:value-type="float">
            <text:p>0.0129706</text:p>
          </table:table-cell>
          <table:table-cell office:value-type="float" office:value="0.135773" calcext:value-type="float">
            <text:p>0.135773</text:p>
          </table:table-cell>
          <table:table-cell office:value-type="float" office:value="0.0360773" calcext:value-type="float">
            <text:p>0.03607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125461" calcext:value-type="float">
            <text:p>0.0125461</text:p>
          </table:table-cell>
          <table:table-cell office:value-type="float" office:value="0.0134076" calcext:value-type="float">
            <text:p>0.0134076</text:p>
          </table:table-cell>
          <table:table-cell office:value-type="float" office:value="0.13495" calcext:value-type="float">
            <text:p>0.13495</text:p>
          </table:table-cell>
          <table:table-cell office:value-type="float" office:value="0.036734" calcext:value-type="float">
            <text:p>0.0367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124104" calcext:value-type="float">
            <text:p>0.0124104</text:p>
          </table:table-cell>
          <table:table-cell office:value-type="float" office:value="0.012839" calcext:value-type="float">
            <text:p>0.012839</text:p>
          </table:table-cell>
          <table:table-cell office:value-type="float" office:value="0.139616" calcext:value-type="float">
            <text:p>0.139616</text:p>
          </table:table-cell>
          <table:table-cell office:value-type="float" office:value="0.03612" calcext:value-type="float">
            <text:p>0.036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125168" calcext:value-type="float">
            <text:p>0.0125168</text:p>
          </table:table-cell>
          <table:table-cell office:value-type="float" office:value="0.013539" calcext:value-type="float">
            <text:p>0.013539</text:p>
          </table:table-cell>
          <table:table-cell office:value-type="float" office:value="0.135236" calcext:value-type="float">
            <text:p>0.135236</text:p>
          </table:table-cell>
          <table:table-cell office:value-type="float" office:value="0.0366758" calcext:value-type="float">
            <text:p>0.03667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121041" calcext:value-type="float">
            <text:p>0.0121041</text:p>
          </table:table-cell>
          <table:table-cell office:value-type="float" office:value="0.0132336" calcext:value-type="float">
            <text:p>0.0132336</text:p>
          </table:table-cell>
          <table:table-cell office:value-type="float" office:value="0.136591" calcext:value-type="float">
            <text:p>0.136591</text:p>
          </table:table-cell>
          <table:table-cell office:value-type="float" office:value="0.0350727" calcext:value-type="float">
            <text:p>0.03507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4783" calcext:value-type="float">
            <text:p>0.014783</text:p>
          </table:table-cell>
          <table:table-cell office:value-type="float" office:value="0.0162618" calcext:value-type="float">
            <text:p>0.0162618</text:p>
          </table:table-cell>
          <table:table-cell office:value-type="float" office:value="0.139859" calcext:value-type="float">
            <text:p>0.139859</text:p>
          </table:table-cell>
          <table:table-cell office:value-type="float" office:value="0.0362303" calcext:value-type="float">
            <text:p>0.03623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44687" calcext:value-type="float">
            <text:p>0.0144687</text:p>
          </table:table-cell>
          <table:table-cell office:value-type="float" office:value="0.135658" calcext:value-type="float">
            <text:p>0.135658</text:p>
          </table:table-cell>
          <table:table-cell office:value-type="float" office:value="0.0373176" calcext:value-type="float">
            <text:p>0.03731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124283" calcext:value-type="float">
            <text:p>0.0124283</text:p>
          </table:table-cell>
          <table:table-cell office:value-type="float" office:value="0.0157064" calcext:value-type="float">
            <text:p>0.0157064</text:p>
          </table:table-cell>
          <table:table-cell office:value-type="float" office:value="0.134298" calcext:value-type="float">
            <text:p>0.134298</text:p>
          </table:table-cell>
          <table:table-cell office:value-type="float" office:value="0.0336298" calcext:value-type="float">
            <text:p>0.033629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28526" calcext:value-type="float">
            <text:p>0.0128526</text:p>
          </table:table-cell>
          <table:table-cell office:value-type="float" office:value="0.014088" calcext:value-type="float">
            <text:p>0.014088</text:p>
          </table:table-cell>
          <table:table-cell office:value-type="float" office:value="0.134149" calcext:value-type="float">
            <text:p>0.134149</text:p>
          </table:table-cell>
          <table:table-cell office:value-type="float" office:value="0.0353096" calcext:value-type="float">
            <text:p>0.03530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137412" calcext:value-type="float">
            <text:p>0.0137412</text:p>
          </table:table-cell>
          <table:table-cell office:value-type="float" office:value="0.0139595" calcext:value-type="float">
            <text:p>0.0139595</text:p>
          </table:table-cell>
          <table:table-cell office:value-type="float" office:value="0.126891" calcext:value-type="float">
            <text:p>0.126891</text:p>
          </table:table-cell>
          <table:table-cell office:value-type="float" office:value="0.0355551" calcext:value-type="float">
            <text:p>0.03555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130967" calcext:value-type="float">
            <text:p>0.0130967</text:p>
          </table:table-cell>
          <table:table-cell office:value-type="float" office:value="0.0139853" calcext:value-type="float">
            <text:p>0.0139853</text:p>
          </table:table-cell>
          <table:table-cell office:value-type="float" office:value="0.130923" calcext:value-type="float">
            <text:p>0.130923</text:p>
          </table:table-cell>
          <table:table-cell office:value-type="float" office:value="0.0373903" calcext:value-type="float">
            <text:p>0.03739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130905" calcext:value-type="float">
            <text:p>0.0130905</text:p>
          </table:table-cell>
          <table:table-cell office:value-type="float" office:value="0.0143685" calcext:value-type="float">
            <text:p>0.0143685</text:p>
          </table:table-cell>
          <table:table-cell office:value-type="float" office:value="0.129177" calcext:value-type="float">
            <text:p>0.129177</text:p>
          </table:table-cell>
          <table:table-cell office:value-type="float" office:value="0.0359371" calcext:value-type="float">
            <text:p>0.03593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161608" calcext:value-type="float">
            <text:p>0.0161608</text:p>
          </table:table-cell>
          <table:table-cell office:value-type="float" office:value="0.0137413" calcext:value-type="float">
            <text:p>0.0137413</text:p>
          </table:table-cell>
          <table:table-cell office:value-type="float" office:value="0.129115" calcext:value-type="float">
            <text:p>0.129115</text:p>
          </table:table-cell>
          <table:table-cell office:value-type="float" office:value="0.0335956" calcext:value-type="float">
            <text:p>0.03359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41853" calcext:value-type="float">
            <text:p>0.0141853</text:p>
          </table:table-cell>
          <table:table-cell office:value-type="float" office:value="0.0135211" calcext:value-type="float">
            <text:p>0.0135211</text:p>
          </table:table-cell>
          <table:table-cell office:value-type="float" office:value="0.133243" calcext:value-type="float">
            <text:p>0.133243</text:p>
          </table:table-cell>
          <table:table-cell office:value-type="float" office:value="0.0358008" calcext:value-type="float">
            <text:p>0.03580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129545" calcext:value-type="float">
            <text:p>0.0129545</text:p>
          </table:table-cell>
          <table:table-cell office:value-type="float" office:value="0.0149199" calcext:value-type="float">
            <text:p>0.0149199</text:p>
          </table:table-cell>
          <table:table-cell office:value-type="float" office:value="0.129229" calcext:value-type="float">
            <text:p>0.129229</text:p>
          </table:table-cell>
          <table:table-cell office:value-type="float" office:value="0.0375068" calcext:value-type="float">
            <text:p>0.03750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122975" calcext:value-type="float">
            <text:p>0.0122975</text:p>
          </table:table-cell>
          <table:table-cell office:value-type="float" office:value="0.0140965" calcext:value-type="float">
            <text:p>0.0140965</text:p>
          </table:table-cell>
          <table:table-cell office:value-type="float" office:value="0.129401" calcext:value-type="float">
            <text:p>0.129401</text:p>
          </table:table-cell>
          <table:table-cell office:value-type="float" office:value="0.0398163" calcext:value-type="float">
            <text:p>0.039816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123883" calcext:value-type="float">
            <text:p>0.0123883</text:p>
          </table:table-cell>
          <table:table-cell office:value-type="float" office:value="0.0143916" calcext:value-type="float">
            <text:p>0.0143916</text:p>
          </table:table-cell>
          <table:table-cell office:value-type="float" office:value="0.130199" calcext:value-type="float">
            <text:p>0.130199</text:p>
          </table:table-cell>
          <table:table-cell office:value-type="float" office:value="0.0361117" calcext:value-type="float">
            <text:p>0.036111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128221" calcext:value-type="float">
            <text:p>0.0128221</text:p>
          </table:table-cell>
          <table:table-cell office:value-type="float" office:value="0.0141737" calcext:value-type="float">
            <text:p>0.0141737</text:p>
          </table:table-cell>
          <table:table-cell office:value-type="float" office:value="0.133007" calcext:value-type="float">
            <text:p>0.133007</text:p>
          </table:table-cell>
          <table:table-cell office:value-type="float" office:value="0.0373713" calcext:value-type="float">
            <text:p>0.03737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119315" calcext:value-type="float">
            <text:p>0.0119315</text:p>
          </table:table-cell>
          <table:table-cell office:value-type="float" office:value="0.0123177" calcext:value-type="float">
            <text:p>0.0123177</text:p>
          </table:table-cell>
          <table:table-cell office:value-type="float" office:value="0.139798" calcext:value-type="float">
            <text:p>0.139798</text:p>
          </table:table-cell>
          <table:table-cell office:value-type="float" office:value="0.0382156" calcext:value-type="float">
            <text:p>0.03821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124148" calcext:value-type="float">
            <text:p>0.0124148</text:p>
          </table:table-cell>
          <table:table-cell office:value-type="float" office:value="0.0135005" calcext:value-type="float">
            <text:p>0.0135005</text:p>
          </table:table-cell>
          <table:table-cell office:value-type="float" office:value="0.135619" calcext:value-type="float">
            <text:p>0.135619</text:p>
          </table:table-cell>
          <table:table-cell office:value-type="float" office:value="0.0414632" calcext:value-type="float">
            <text:p>0.04146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123213" calcext:value-type="float">
            <text:p>0.0123213</text:p>
          </table:table-cell>
          <table:table-cell office:value-type="float" office:value="0.0137277" calcext:value-type="float">
            <text:p>0.0137277</text:p>
          </table:table-cell>
          <table:table-cell office:value-type="float" office:value="0.135419" calcext:value-type="float">
            <text:p>0.135419</text:p>
          </table:table-cell>
          <table:table-cell office:value-type="float" office:value="0.0358048" calcext:value-type="float">
            <text:p>0.03580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12341" calcext:value-type="float">
            <text:p>0.012341</text:p>
          </table:table-cell>
          <table:table-cell office:value-type="float" office:value="0.0160114" calcext:value-type="float">
            <text:p>0.0160114</text:p>
          </table:table-cell>
          <table:table-cell office:value-type="float" office:value="0.135009" calcext:value-type="float">
            <text:p>0.135009</text:p>
          </table:table-cell>
          <table:table-cell office:value-type="float" office:value="0.0370591" calcext:value-type="float">
            <text:p>0.03705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124405" calcext:value-type="float">
            <text:p>0.0124405</text:p>
          </table:table-cell>
          <table:table-cell office:value-type="float" office:value="0.017496" calcext:value-type="float">
            <text:p>0.017496</text:p>
          </table:table-cell>
          <table:table-cell office:value-type="float" office:value="0.134787" calcext:value-type="float">
            <text:p>0.134787</text:p>
          </table:table-cell>
          <table:table-cell office:value-type="float" office:value="0.03836" calcext:value-type="float">
            <text:p>0.038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124297" calcext:value-type="float">
            <text:p>0.0124297</text:p>
          </table:table-cell>
          <table:table-cell office:value-type="float" office:value="0.0133368" calcext:value-type="float">
            <text:p>0.0133368</text:p>
          </table:table-cell>
          <table:table-cell office:value-type="float" office:value="0.134987" calcext:value-type="float">
            <text:p>0.134987</text:p>
          </table:table-cell>
          <table:table-cell office:value-type="float" office:value="0.0383301" calcext:value-type="float">
            <text:p>0.03833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123126" calcext:value-type="float">
            <text:p>0.0123126</text:p>
          </table:table-cell>
          <table:table-cell office:value-type="float" office:value="0.0148113" calcext:value-type="float">
            <text:p>0.0148113</text:p>
          </table:table-cell>
          <table:table-cell office:value-type="float" office:value="0.139857" calcext:value-type="float">
            <text:p>0.139857</text:p>
          </table:table-cell>
          <table:table-cell office:value-type="float" office:value="0.0373331" calcext:value-type="float">
            <text:p>0.03733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126986" calcext:value-type="float">
            <text:p>0.0126986</text:p>
          </table:table-cell>
          <table:table-cell office:value-type="float" office:value="0.0137206" calcext:value-type="float">
            <text:p>0.0137206</text:p>
          </table:table-cell>
          <table:table-cell office:value-type="float" office:value="0.139785" calcext:value-type="float">
            <text:p>0.139785</text:p>
          </table:table-cell>
          <table:table-cell office:value-type="float" office:value="0.0375989" calcext:value-type="float">
            <text:p>0.037598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124938" calcext:value-type="float">
            <text:p>0.0124938</text:p>
          </table:table-cell>
          <table:table-cell office:value-type="float" office:value="0.0137158" calcext:value-type="float">
            <text:p>0.0137158</text:p>
          </table:table-cell>
          <table:table-cell office:value-type="float" office:value="0.135336" calcext:value-type="float">
            <text:p>0.135336</text:p>
          </table:table-cell>
          <table:table-cell office:value-type="float" office:value="0.0368113" calcext:value-type="float">
            <text:p>0.03681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127447" calcext:value-type="float">
            <text:p>0.0127447</text:p>
          </table:table-cell>
          <table:table-cell office:value-type="float" office:value="0.0126102" calcext:value-type="float">
            <text:p>0.0126102</text:p>
          </table:table-cell>
          <table:table-cell office:value-type="float" office:value="0.134568" calcext:value-type="float">
            <text:p>0.134568</text:p>
          </table:table-cell>
          <table:table-cell office:value-type="float" office:value="0.0370713" calcext:value-type="float">
            <text:p>0.03707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131686" calcext:value-type="float">
            <text:p>0.0131686</text:p>
          </table:table-cell>
          <table:table-cell office:value-type="float" office:value="0.0136541" calcext:value-type="float">
            <text:p>0.0136541</text:p>
          </table:table-cell>
          <table:table-cell office:value-type="float" office:value="0.137158" calcext:value-type="float">
            <text:p>0.137158</text:p>
          </table:table-cell>
          <table:table-cell office:value-type="float" office:value="0.0370932" calcext:value-type="float">
            <text:p>0.037093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159602" calcext:value-type="float">
            <text:p>0.0159602</text:p>
          </table:table-cell>
          <table:table-cell office:value-type="float" office:value="0.0136275" calcext:value-type="float">
            <text:p>0.0136275</text:p>
          </table:table-cell>
          <table:table-cell office:value-type="float" office:value="0.13812" calcext:value-type="float">
            <text:p>0.13812</text:p>
          </table:table-cell>
          <table:table-cell office:value-type="float" office:value="0.0379719" calcext:value-type="float">
            <text:p>0.03797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166033" calcext:value-type="float">
            <text:p>0.0166033</text:p>
          </table:table-cell>
          <table:table-cell office:value-type="float" office:value="0.0143582" calcext:value-type="float">
            <text:p>0.0143582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0.0372787" calcext:value-type="float">
            <text:p>0.037278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147712" calcext:value-type="float">
            <text:p>0.0147712</text:p>
          </table:table-cell>
          <table:table-cell office:value-type="float" office:value="0.0135333" calcext:value-type="float">
            <text:p>0.0135333</text:p>
          </table:table-cell>
          <table:table-cell office:value-type="float" office:value="0.130594" calcext:value-type="float">
            <text:p>0.130594</text:p>
          </table:table-cell>
          <table:table-cell office:value-type="float" office:value="0.0369576" calcext:value-type="float">
            <text:p>0.036957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127869" calcext:value-type="float">
            <text:p>0.0127869</text:p>
          </table:table-cell>
          <table:table-cell office:value-type="float" office:value="0.0135671" calcext:value-type="float">
            <text:p>0.0135671</text:p>
          </table:table-cell>
          <table:table-cell office:value-type="float" office:value="0.132158" calcext:value-type="float">
            <text:p>0.132158</text:p>
          </table:table-cell>
          <table:table-cell office:value-type="float" office:value="0.0364576" calcext:value-type="float">
            <text:p>0.03645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126248" calcext:value-type="float">
            <text:p>0.0126248</text:p>
          </table:table-cell>
          <table:table-cell office:value-type="float" office:value="0.0135102" calcext:value-type="float">
            <text:p>0.0135102</text:p>
          </table:table-cell>
          <table:table-cell office:value-type="float" office:value="0.129636" calcext:value-type="float">
            <text:p>0.129636</text:p>
          </table:table-cell>
          <table:table-cell office:value-type="float" office:value="0.0404143" calcext:value-type="float">
            <text:p>0.040414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12488" calcext:value-type="float">
            <text:p>0.012488</text:p>
          </table:table-cell>
          <table:table-cell office:value-type="float" office:value="0.0130122" calcext:value-type="float">
            <text:p>0.0130122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036537" calcext:value-type="float">
            <text:p>0.03653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124777" calcext:value-type="float">
            <text:p>0.0124777</text:p>
          </table:table-cell>
          <table:table-cell office:value-type="float" office:value="0.014648" calcext:value-type="float">
            <text:p>0.014648</text:p>
          </table:table-cell>
          <table:table-cell office:value-type="float" office:value="0.131808" calcext:value-type="float">
            <text:p>0.131808</text:p>
          </table:table-cell>
          <table:table-cell office:value-type="float" office:value="0.0390617" calcext:value-type="float">
            <text:p>0.03906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12567" calcext:value-type="float">
            <text:p>0.012567</text:p>
          </table:table-cell>
          <table:table-cell office:value-type="float" office:value="0.0127654" calcext:value-type="float">
            <text:p>0.0127654</text:p>
          </table:table-cell>
          <table:table-cell office:value-type="float" office:value="0.132569" calcext:value-type="float">
            <text:p>0.132569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2402" calcext:value-type="float">
            <text:p>0.012402</text:p>
          </table:table-cell>
          <table:table-cell office:value-type="float" office:value="0.0129961" calcext:value-type="float">
            <text:p>0.0129961</text:p>
          </table:table-cell>
          <table:table-cell office:value-type="float" office:value="0.130811" calcext:value-type="float">
            <text:p>0.130811</text:p>
          </table:table-cell>
          <table:table-cell office:value-type="float" office:value="0.0357076" calcext:value-type="float">
            <text:p>0.03570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123841" calcext:value-type="float">
            <text:p>0.0123841</text:p>
          </table:table-cell>
          <table:table-cell office:value-type="float" office:value="0.0145266" calcext:value-type="float">
            <text:p>0.0145266</text:p>
          </table:table-cell>
          <table:table-cell office:value-type="float" office:value="0.130989" calcext:value-type="float">
            <text:p>0.130989</text:p>
          </table:table-cell>
          <table:table-cell office:value-type="float" office:value="0.0355603" calcext:value-type="float">
            <text:p>0.03556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12506" calcext:value-type="float">
            <text:p>0.012506</text:p>
          </table:table-cell>
          <table:table-cell office:value-type="float" office:value="0.0156844" calcext:value-type="float">
            <text:p>0.0156844</text:p>
          </table:table-cell>
          <table:table-cell office:value-type="float" office:value="0.135541" calcext:value-type="float">
            <text:p>0.135541</text:p>
          </table:table-cell>
          <table:table-cell office:value-type="float" office:value="0.0356637" calcext:value-type="float">
            <text:p>0.03566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31448" calcext:value-type="float">
            <text:p>0.0131448</text:p>
          </table:table-cell>
          <table:table-cell office:value-type="float" office:value="0.135608" calcext:value-type="float">
            <text:p>0.135608</text:p>
          </table:table-cell>
          <table:table-cell office:value-type="float" office:value="0.0369313" calcext:value-type="float">
            <text:p>0.03693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127541" calcext:value-type="float">
            <text:p>0.0127541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134613" calcext:value-type="float">
            <text:p>0.134613</text:p>
          </table:table-cell>
          <table:table-cell office:value-type="float" office:value="0.034232" calcext:value-type="float">
            <text:p>0.03423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123456" calcext:value-type="float">
            <text:p>0.0123456</text:p>
          </table:table-cell>
          <table:table-cell office:value-type="float" office:value="0.0151146" calcext:value-type="float">
            <text:p>0.0151146</text:p>
          </table:table-cell>
          <table:table-cell office:value-type="float" office:value="0.13465" calcext:value-type="float">
            <text:p>0.13465</text:p>
          </table:table-cell>
          <table:table-cell office:value-type="float" office:value="0.032822" calcext:value-type="float">
            <text:p>0.0328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123782" calcext:value-type="float">
            <text:p>0.0123782</text:p>
          </table:table-cell>
          <table:table-cell office:value-type="float" office:value="0.014677" calcext:value-type="float">
            <text:p>0.014677</text:p>
          </table:table-cell>
          <table:table-cell office:value-type="float" office:value="0.138956" calcext:value-type="float">
            <text:p>0.138956</text:p>
          </table:table-cell>
          <table:table-cell office:value-type="float" office:value="0.0342163" calcext:value-type="float">
            <text:p>0.034216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12427" calcext:value-type="float">
            <text:p>0.012427</text:p>
          </table:table-cell>
          <table:table-cell office:value-type="float" office:value="0.0134544" calcext:value-type="float">
            <text:p>0.0134544</text:p>
          </table:table-cell>
          <table:table-cell office:value-type="float" office:value="0.128067" calcext:value-type="float">
            <text:p>0.128067</text:p>
          </table:table-cell>
          <table:table-cell office:value-type="float" office:value="0.0339685" calcext:value-type="float">
            <text:p>0.033968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125041" calcext:value-type="float">
            <text:p>0.0125041</text:p>
          </table:table-cell>
          <table:table-cell office:value-type="float" office:value="0.015566" calcext:value-type="float">
            <text:p>0.015566</text:p>
          </table:table-cell>
          <table:table-cell office:value-type="float" office:value="0.128544" calcext:value-type="float">
            <text:p>0.128544</text:p>
          </table:table-cell>
          <table:table-cell office:value-type="float" office:value="0.038394" calcext:value-type="float">
            <text:p>0.0383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129076" calcext:value-type="float">
            <text:p>0.0129076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129568" calcext:value-type="float">
            <text:p>0.129568</text:p>
          </table:table-cell>
          <table:table-cell office:value-type="float" office:value="0.0342457" calcext:value-type="float">
            <text:p>0.034245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122052" calcext:value-type="float">
            <text:p>0.0122052</text:p>
          </table:table-cell>
          <table:table-cell office:value-type="float" office:value="0.0134775" calcext:value-type="float">
            <text:p>0.0134775</text:p>
          </table:table-cell>
          <table:table-cell office:value-type="float" office:value="0.129219" calcext:value-type="float">
            <text:p>0.129219</text:p>
          </table:table-cell>
          <table:table-cell office:value-type="float" office:value="0.0357537" calcext:value-type="float">
            <text:p>0.03575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127769" calcext:value-type="float">
            <text:p>0.0127769</text:p>
          </table:table-cell>
          <table:table-cell office:value-type="float" office:value="0.0129184" calcext:value-type="float">
            <text:p>0.0129184</text:p>
          </table:table-cell>
          <table:table-cell office:value-type="float" office:value="0.129933" calcext:value-type="float">
            <text:p>0.129933</text:p>
          </table:table-cell>
          <table:table-cell office:value-type="float" office:value="0.0353362" calcext:value-type="float">
            <text:p>0.035336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125546" calcext:value-type="float">
            <text:p>0.0125546</text:p>
          </table:table-cell>
          <table:table-cell office:value-type="float" office:value="0.014195" calcext:value-type="float">
            <text:p>0.014195</text:p>
          </table:table-cell>
          <table:table-cell office:value-type="float" office:value="0.128654" calcext:value-type="float">
            <text:p>0.128654</text:p>
          </table:table-cell>
          <table:table-cell office:value-type="float" office:value="0.0366101" calcext:value-type="float">
            <text:p>0.03661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128157" calcext:value-type="float">
            <text:p>0.0128157</text:p>
          </table:table-cell>
          <table:table-cell office:value-type="float" office:value="0.0119175" calcext:value-type="float">
            <text:p>0.0119175</text:p>
          </table:table-cell>
          <table:table-cell office:value-type="float" office:value="0.132814" calcext:value-type="float">
            <text:p>0.132814</text:p>
          </table:table-cell>
          <table:table-cell office:value-type="float" office:value="0.0330564" calcext:value-type="float">
            <text:p>0.033056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125713" calcext:value-type="float">
            <text:p>0.0125713</text:p>
          </table:table-cell>
          <table:table-cell office:value-type="float" office:value="0.0132982" calcext:value-type="float">
            <text:p>0.0132982</text:p>
          </table:table-cell>
          <table:table-cell office:value-type="float" office:value="0.134941" calcext:value-type="float">
            <text:p>0.134941</text:p>
          </table:table-cell>
          <table:table-cell office:value-type="float" office:value="0.0347487" calcext:value-type="float">
            <text:p>0.034748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123946" calcext:value-type="float">
            <text:p>0.0123946</text:p>
          </table:table-cell>
          <table:table-cell office:value-type="float" office:value="0.0126571" calcext:value-type="float">
            <text:p>0.0126571</text:p>
          </table:table-cell>
          <table:table-cell office:value-type="float" office:value="0.134318" calcext:value-type="float">
            <text:p>0.134318</text:p>
          </table:table-cell>
          <table:table-cell office:value-type="float" office:value="0.0354522" calcext:value-type="float">
            <text:p>0.03545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123195" calcext:value-type="float">
            <text:p>0.0123195</text:p>
          </table:table-cell>
          <table:table-cell office:value-type="float" office:value="0.0144449" calcext:value-type="float">
            <text:p>0.0144449</text:p>
          </table:table-cell>
          <table:table-cell office:value-type="float" office:value="0.133843" calcext:value-type="float">
            <text:p>0.133843</text:p>
          </table:table-cell>
          <table:table-cell office:value-type="float" office:value="0.0347258" calcext:value-type="float">
            <text:p>0.03472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124971" calcext:value-type="float">
            <text:p>0.0124971</text:p>
          </table:table-cell>
          <table:table-cell office:value-type="float" office:value="0.0140252" calcext:value-type="float">
            <text:p>0.0140252</text:p>
          </table:table-cell>
          <table:table-cell office:value-type="float" office:value="0.135785" calcext:value-type="float">
            <text:p>0.135785</text:p>
          </table:table-cell>
          <table:table-cell office:value-type="float" office:value="0.0351132" calcext:value-type="float">
            <text:p>0.03511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126044" calcext:value-type="float">
            <text:p>0.0126044</text:p>
          </table:table-cell>
          <table:table-cell office:value-type="float" office:value="0.0129752" calcext:value-type="float">
            <text:p>0.0129752</text:p>
          </table:table-cell>
          <table:table-cell office:value-type="float" office:value="0.135095" calcext:value-type="float">
            <text:p>0.135095</text:p>
          </table:table-cell>
          <table:table-cell office:value-type="float" office:value="0.0369207" calcext:value-type="float">
            <text:p>0.03692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123266" calcext:value-type="float">
            <text:p>0.0123266</text:p>
          </table:table-cell>
          <table:table-cell office:value-type="float" office:value="0.0141994" calcext:value-type="float">
            <text:p>0.0141994</text:p>
          </table:table-cell>
          <table:table-cell office:value-type="float" office:value="0.135204" calcext:value-type="float">
            <text:p>0.135204</text:p>
          </table:table-cell>
          <table:table-cell office:value-type="float" office:value="0.0344331" calcext:value-type="float">
            <text:p>0.034433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12238" calcext:value-type="float">
            <text:p>0.012238</text:p>
          </table:table-cell>
          <table:table-cell office:value-type="float" office:value="0.0156352" calcext:value-type="float">
            <text:p>0.0156352</text:p>
          </table:table-cell>
          <table:table-cell office:value-type="float" office:value="0.136283" calcext:value-type="float">
            <text:p>0.136283</text:p>
          </table:table-cell>
          <table:table-cell office:value-type="float" office:value="0.0341228" calcext:value-type="float">
            <text:p>0.03412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148122" calcext:value-type="float">
            <text:p>0.0148122</text:p>
          </table:table-cell>
          <table:table-cell office:value-type="float" office:value="0.012946" calcext:value-type="float">
            <text:p>0.012946</text:p>
          </table:table-cell>
          <table:table-cell office:value-type="float" office:value="0.137352" calcext:value-type="float">
            <text:p>0.137352</text:p>
          </table:table-cell>
          <table:table-cell office:value-type="float" office:value="0.0357084" calcext:value-type="float">
            <text:p>0.03570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136565" calcext:value-type="float">
            <text:p>0.0136565</text:p>
          </table:table-cell>
          <table:table-cell office:value-type="float" office:value="0.0144578" calcext:value-type="float">
            <text:p>0.0144578</text:p>
          </table:table-cell>
          <table:table-cell office:value-type="float" office:value="0.126856" calcext:value-type="float">
            <text:p>0.126856</text:p>
          </table:table-cell>
          <table:table-cell office:value-type="float" office:value="0.0362249" calcext:value-type="float">
            <text:p>0.03622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123558" calcext:value-type="float">
            <text:p>0.0123558</text:p>
          </table:table-cell>
          <table:table-cell office:value-type="float" office:value="0.0138345" calcext:value-type="float">
            <text:p>0.0138345</text:p>
          </table:table-cell>
          <table:table-cell office:value-type="float" office:value="0.129686" calcext:value-type="float">
            <text:p>0.129686</text:p>
          </table:table-cell>
          <table:table-cell office:value-type="float" office:value="0.0349468" calcext:value-type="float">
            <text:p>0.034946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124317" calcext:value-type="float">
            <text:p>0.0124317</text:p>
          </table:table-cell>
          <table:table-cell office:value-type="float" office:value="0.0136072" calcext:value-type="float">
            <text:p>0.0136072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0356649" calcext:value-type="float">
            <text:p>0.035664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123965" calcext:value-type="float">
            <text:p>0.0123965</text:p>
          </table:table-cell>
          <table:table-cell office:value-type="float" office:value="0.0151473" calcext:value-type="float">
            <text:p>0.0151473</text:p>
          </table:table-cell>
          <table:table-cell office:value-type="float" office:value="0.129129" calcext:value-type="float">
            <text:p>0.129129</text:p>
          </table:table-cell>
          <table:table-cell office:value-type="float" office:value="0.0367364" calcext:value-type="float">
            <text:p>0.03673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24996" calcext:value-type="float">
            <text:p>0.0124996</text:p>
          </table:table-cell>
          <table:table-cell office:value-type="float" office:value="0.0130722" calcext:value-type="float">
            <text:p>0.0130722</text:p>
          </table:table-cell>
          <table:table-cell office:value-type="float" office:value="0.129801" calcext:value-type="float">
            <text:p>0.129801</text:p>
          </table:table-cell>
          <table:table-cell office:value-type="float" office:value="0.0355533" calcext:value-type="float">
            <text:p>0.03555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123842" calcext:value-type="float">
            <text:p>0.0123842</text:p>
          </table:table-cell>
          <table:table-cell office:value-type="float" office:value="0.0126989" calcext:value-type="float">
            <text:p>0.0126989</text:p>
          </table:table-cell>
          <table:table-cell office:value-type="float" office:value="0.129371" calcext:value-type="float">
            <text:p>0.129371</text:p>
          </table:table-cell>
          <table:table-cell office:value-type="float" office:value="0.0366992" calcext:value-type="float">
            <text:p>0.03669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123744" calcext:value-type="float">
            <text:p>0.0123744</text:p>
          </table:table-cell>
          <table:table-cell office:value-type="float" office:value="0.0132613" calcext:value-type="float">
            <text:p>0.0132613</text:p>
          </table:table-cell>
          <table:table-cell office:value-type="float" office:value="0.131392" calcext:value-type="float">
            <text:p>0.131392</text:p>
          </table:table-cell>
          <table:table-cell office:value-type="float" office:value="0.037617" calcext:value-type="float">
            <text:p>0.0376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124906" calcext:value-type="float">
            <text:p>0.0124906</text:p>
          </table:table-cell>
          <table:table-cell office:value-type="float" office:value="0.0129488" calcext:value-type="float">
            <text:p>0.0129488</text:p>
          </table:table-cell>
          <table:table-cell office:value-type="float" office:value="0.131751" calcext:value-type="float">
            <text:p>0.131751</text:p>
          </table:table-cell>
          <table:table-cell office:value-type="float" office:value="0.0356707" calcext:value-type="float">
            <text:p>0.03567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146186" calcext:value-type="float">
            <text:p>0.0146186</text:p>
          </table:table-cell>
          <table:table-cell office:value-type="float" office:value="0.0144428" calcext:value-type="float">
            <text:p>0.0144428</text:p>
          </table:table-cell>
          <table:table-cell office:value-type="float" office:value="0.130665" calcext:value-type="float">
            <text:p>0.130665</text:p>
          </table:table-cell>
          <table:table-cell office:value-type="float" office:value="0.0349679" calcext:value-type="float">
            <text:p>0.03496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128484" calcext:value-type="float">
            <text:p>0.0128484</text:p>
          </table:table-cell>
          <table:table-cell office:value-type="float" office:value="0.0149245" calcext:value-type="float">
            <text:p>0.0149245</text:p>
          </table:table-cell>
          <table:table-cell office:value-type="float" office:value="0.129678" calcext:value-type="float">
            <text:p>0.129678</text:p>
          </table:table-cell>
          <table:table-cell office:value-type="float" office:value="0.0362645" calcext:value-type="float">
            <text:p>0.03626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27118" calcext:value-type="float">
            <text:p>0.0127118</text:p>
          </table:table-cell>
          <table:table-cell office:value-type="float" office:value="0.0145377" calcext:value-type="float">
            <text:p>0.0145377</text:p>
          </table:table-cell>
          <table:table-cell office:value-type="float" office:value="0.132674" calcext:value-type="float">
            <text:p>0.132674</text:p>
          </table:table-cell>
          <table:table-cell office:value-type="float" office:value="0.0348906" calcext:value-type="float">
            <text:p>0.03489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123333" calcext:value-type="float">
            <text:p>0.0123333</text:p>
          </table:table-cell>
          <table:table-cell office:value-type="float" office:value="0.0132508" calcext:value-type="float">
            <text:p>0.0132508</text:p>
          </table:table-cell>
          <table:table-cell office:value-type="float" office:value="0.134525" calcext:value-type="float">
            <text:p>0.134525</text:p>
          </table:table-cell>
          <table:table-cell office:value-type="float" office:value="0.0336083" calcext:value-type="float">
            <text:p>0.033608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123629" calcext:value-type="float">
            <text:p>0.0123629</text:p>
          </table:table-cell>
          <table:table-cell office:value-type="float" office:value="0.0136403" calcext:value-type="float">
            <text:p>0.0136403</text:p>
          </table:table-cell>
          <table:table-cell office:value-type="float" office:value="0.134258" calcext:value-type="float">
            <text:p>0.134258</text:p>
          </table:table-cell>
          <table:table-cell office:value-type="float" office:value="0.0340482" calcext:value-type="float">
            <text:p>0.034048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137512" calcext:value-type="float">
            <text:p>0.0137512</text:p>
          </table:table-cell>
          <table:table-cell office:value-type="float" office:value="0.0130623" calcext:value-type="float">
            <text:p>0.0130623</text:p>
          </table:table-cell>
          <table:table-cell office:value-type="float" office:value="0.135054" calcext:value-type="float">
            <text:p>0.135054</text:p>
          </table:table-cell>
          <table:table-cell office:value-type="float" office:value="0.034539" calcext:value-type="float">
            <text:p>0.0345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142603" calcext:value-type="float">
            <text:p>0.0142603</text:p>
          </table:table-cell>
          <table:table-cell office:value-type="float" office:value="0.0142343" calcext:value-type="float">
            <text:p>0.0142343</text:p>
          </table:table-cell>
          <table:table-cell office:value-type="float" office:value="0.136136" calcext:value-type="float">
            <text:p>0.136136</text:p>
          </table:table-cell>
          <table:table-cell office:value-type="float" office:value="0.0343181" calcext:value-type="float">
            <text:p>0.034318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137718" calcext:value-type="float">
            <text:p>0.0137718</text:p>
          </table:table-cell>
          <table:table-cell office:value-type="float" office:value="0.0141542" calcext:value-type="float">
            <text:p>0.0141542</text:p>
          </table:table-cell>
          <table:table-cell office:value-type="float" office:value="0.135586" calcext:value-type="float">
            <text:p>0.135586</text:p>
          </table:table-cell>
          <table:table-cell office:value-type="float" office:value="0.0367256" calcext:value-type="float">
            <text:p>0.03672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125703" calcext:value-type="float">
            <text:p>0.0125703</text:p>
          </table:table-cell>
          <table:table-cell office:value-type="float" office:value="0.0138256" calcext:value-type="float">
            <text:p>0.0138256</text:p>
          </table:table-cell>
          <table:table-cell office:value-type="float" office:value="0.137139" calcext:value-type="float">
            <text:p>0.137139</text:p>
          </table:table-cell>
          <table:table-cell office:value-type="float" office:value="0.0354099" calcext:value-type="float">
            <text:p>0.03540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124338" calcext:value-type="float">
            <text:p>0.0124338</text:p>
          </table:table-cell>
          <table:table-cell office:value-type="float" office:value="0.0133807" calcext:value-type="float">
            <text:p>0.0133807</text:p>
          </table:table-cell>
          <table:table-cell office:value-type="float" office:value="0.128634" calcext:value-type="float">
            <text:p>0.128634</text:p>
          </table:table-cell>
          <table:table-cell office:value-type="float" office:value="0.0356966" calcext:value-type="float">
            <text:p>0.035696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124059" calcext:value-type="float">
            <text:p>0.0124059</text:p>
          </table:table-cell>
          <table:table-cell office:value-type="float" office:value="0.0138606" calcext:value-type="float">
            <text:p>0.0138606</text:p>
          </table:table-cell>
          <table:table-cell office:value-type="float" office:value="0.129996" calcext:value-type="float">
            <text:p>0.129996</text:p>
          </table:table-cell>
          <table:table-cell office:value-type="float" office:value="0.0330638" calcext:value-type="float">
            <text:p>0.033063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139502" calcext:value-type="float">
            <text:p>0.0139502</text:p>
          </table:table-cell>
          <table:table-cell office:value-type="float" office:value="0.0140887" calcext:value-type="float">
            <text:p>0.0140887</text:p>
          </table:table-cell>
          <table:table-cell office:value-type="float" office:value="0.130461" calcext:value-type="float">
            <text:p>0.130461</text:p>
          </table:table-cell>
          <table:table-cell office:value-type="float" office:value="0.0351026" calcext:value-type="float">
            <text:p>0.03510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132886" calcext:value-type="float">
            <text:p>0.0132886</text:p>
          </table:table-cell>
          <table:table-cell office:value-type="float" office:value="0.0175486" calcext:value-type="float">
            <text:p>0.0175486</text:p>
          </table:table-cell>
          <table:table-cell office:value-type="float" office:value="0.130078" calcext:value-type="float">
            <text:p>0.130078</text:p>
          </table:table-cell>
          <table:table-cell office:value-type="float" office:value="0.0362109" calcext:value-type="float">
            <text:p>0.036210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128995" calcext:value-type="float">
            <text:p>0.0128995</text:p>
          </table:table-cell>
          <table:table-cell office:value-type="float" office:value="0.0146014" calcext:value-type="float">
            <text:p>0.0146014</text:p>
          </table:table-cell>
          <table:table-cell office:value-type="float" office:value="0.129555" calcext:value-type="float">
            <text:p>0.129555</text:p>
          </table:table-cell>
          <table:table-cell office:value-type="float" office:value="0.0370667" calcext:value-type="float">
            <text:p>0.03706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13378" calcext:value-type="float">
            <text:p>0.013378</text:p>
          </table:table-cell>
          <table:table-cell office:value-type="float" office:value="0.0137332" calcext:value-type="float">
            <text:p>0.0137332</text:p>
          </table:table-cell>
          <table:table-cell office:value-type="float" office:value="0.132607" calcext:value-type="float">
            <text:p>0.132607</text:p>
          </table:table-cell>
          <table:table-cell office:value-type="float" office:value="0.0346082" calcext:value-type="float">
            <text:p>0.03460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128398" calcext:value-type="float">
            <text:p>0.0128398</text:p>
          </table:table-cell>
          <table:table-cell office:value-type="float" office:value="0.0176903" calcext:value-type="float">
            <text:p>0.0176903</text:p>
          </table:table-cell>
          <table:table-cell office:value-type="float" office:value="0.129799" calcext:value-type="float">
            <text:p>0.129799</text:p>
          </table:table-cell>
          <table:table-cell office:value-type="float" office:value="0.0355355" calcext:value-type="float">
            <text:p>0.035535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131265" calcext:value-type="float">
            <text:p>0.0131265</text:p>
          </table:table-cell>
          <table:table-cell office:value-type="float" office:value="0.0157178" calcext:value-type="float">
            <text:p>0.0157178</text:p>
          </table:table-cell>
          <table:table-cell office:value-type="float" office:value="0.130341" calcext:value-type="float">
            <text:p>0.130341</text:p>
          </table:table-cell>
          <table:table-cell office:value-type="float" office:value="0.0367474" calcext:value-type="float">
            <text:p>0.03674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136497" calcext:value-type="float">
            <text:p>0.0136497</text:p>
          </table:table-cell>
          <table:table-cell office:value-type="float" office:value="0.0142075" calcext:value-type="float">
            <text:p>0.0142075</text:p>
          </table:table-cell>
          <table:table-cell office:value-type="float" office:value="0.130169" calcext:value-type="float">
            <text:p>0.130169</text:p>
          </table:table-cell>
          <table:table-cell office:value-type="float" office:value="0.0361032" calcext:value-type="float">
            <text:p>0.036103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124277" calcext:value-type="float">
            <text:p>0.0124277</text:p>
          </table:table-cell>
          <table:table-cell office:value-type="float" office:value="0.013343" calcext:value-type="float">
            <text:p>0.013343</text:p>
          </table:table-cell>
          <table:table-cell office:value-type="float" office:value="0.130437" calcext:value-type="float">
            <text:p>0.130437</text:p>
          </table:table-cell>
          <table:table-cell office:value-type="float" office:value="0.0357155" calcext:value-type="float">
            <text:p>0.03571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132901" calcext:value-type="float">
            <text:p>0.0132901</text:p>
          </table:table-cell>
          <table:table-cell office:value-type="float" office:value="0.0128871" calcext:value-type="float">
            <text:p>0.0128871</text:p>
          </table:table-cell>
          <table:table-cell office:value-type="float" office:value="0.12992" calcext:value-type="float">
            <text:p>0.12992</text:p>
          </table:table-cell>
          <table:table-cell office:value-type="float" office:value="0.0357223" calcext:value-type="float">
            <text:p>0.03572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128924" calcext:value-type="float">
            <text:p>0.0128924</text:p>
          </table:table-cell>
          <table:table-cell office:value-type="float" office:value="0.0151716" calcext:value-type="float">
            <text:p>0.0151716</text:p>
          </table:table-cell>
          <table:table-cell office:value-type="float" office:value="0.129484" calcext:value-type="float">
            <text:p>0.129484</text:p>
          </table:table-cell>
          <table:table-cell office:value-type="float" office:value="0.0361861" calcext:value-type="float">
            <text:p>0.036186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126422" calcext:value-type="float">
            <text:p>0.0126422</text:p>
          </table:table-cell>
          <table:table-cell office:value-type="float" office:value="0.0155834" calcext:value-type="float">
            <text:p>0.0155834</text:p>
          </table:table-cell>
          <table:table-cell office:value-type="float" office:value="0.129659" calcext:value-type="float">
            <text:p>0.129659</text:p>
          </table:table-cell>
          <table:table-cell office:value-type="float" office:value="0.0359596" calcext:value-type="float">
            <text:p>0.035959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125096" calcext:value-type="float">
            <text:p>0.0125096</text:p>
          </table:table-cell>
          <table:table-cell office:value-type="float" office:value="0.0141471" calcext:value-type="float">
            <text:p>0.0141471</text:p>
          </table:table-cell>
          <table:table-cell office:value-type="float" office:value="0.130578" calcext:value-type="float">
            <text:p>0.130578</text:p>
          </table:table-cell>
          <table:table-cell office:value-type="float" office:value="0.0359859" calcext:value-type="float">
            <text:p>0.03598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126841" calcext:value-type="float">
            <text:p>0.0126841</text:p>
          </table:table-cell>
          <table:table-cell office:value-type="float" office:value="0.0127438" calcext:value-type="float">
            <text:p>0.0127438</text:p>
          </table:table-cell>
          <table:table-cell office:value-type="float" office:value="0.129337" calcext:value-type="float">
            <text:p>0.129337</text:p>
          </table:table-cell>
          <table:table-cell office:value-type="float" office:value="0.0387388" calcext:value-type="float">
            <text:p>0.038738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136511" calcext:value-type="float">
            <text:p>0.0136511</text:p>
          </table:table-cell>
          <table:table-cell office:value-type="float" office:value="0.0135235" calcext:value-type="float">
            <text:p>0.0135235</text:p>
          </table:table-cell>
          <table:table-cell office:value-type="float" office:value="0.132842" calcext:value-type="float">
            <text:p>0.132842</text:p>
          </table:table-cell>
          <table:table-cell office:value-type="float" office:value="0.0371809" calcext:value-type="float">
            <text:p>0.037180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130006" calcext:value-type="float">
            <text:p>0.0130006</text:p>
          </table:table-cell>
          <table:table-cell office:value-type="float" office:value="0.0143559" calcext:value-type="float">
            <text:p>0.0143559</text:p>
          </table:table-cell>
          <table:table-cell office:value-type="float" office:value="0.132461" calcext:value-type="float">
            <text:p>0.132461</text:p>
          </table:table-cell>
          <table:table-cell office:value-type="float" office:value="0.039833" calcext:value-type="float">
            <text:p>0.03983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126692" calcext:value-type="float">
            <text:p>0.0126692</text:p>
          </table:table-cell>
          <table:table-cell office:value-type="float" office:value="0.0135375" calcext:value-type="float">
            <text:p>0.0135375</text:p>
          </table:table-cell>
          <table:table-cell office:value-type="float" office:value="0.138609" calcext:value-type="float">
            <text:p>0.138609</text:p>
          </table:table-cell>
          <table:table-cell office:value-type="float" office:value="0.0401113" calcext:value-type="float">
            <text:p>0.04011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121341" calcext:value-type="float">
            <text:p>0.0121341</text:p>
          </table:table-cell>
          <table:table-cell office:value-type="float" office:value="0.0124329" calcext:value-type="float">
            <text:p>0.0124329</text:p>
          </table:table-cell>
          <table:table-cell office:value-type="float" office:value="0.132502" calcext:value-type="float">
            <text:p>0.132502</text:p>
          </table:table-cell>
          <table:table-cell office:value-type="float" office:value="0.0359035" calcext:value-type="float">
            <text:p>0.035903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122747" calcext:value-type="float">
            <text:p>0.0122747</text:p>
          </table:table-cell>
          <table:table-cell office:value-type="float" office:value="0.0132842" calcext:value-type="float">
            <text:p>0.0132842</text:p>
          </table:table-cell>
          <table:table-cell office:value-type="float" office:value="0.131245" calcext:value-type="float">
            <text:p>0.131245</text:p>
          </table:table-cell>
          <table:table-cell office:value-type="float" office:value="0.0381165" calcext:value-type="float">
            <text:p>0.038116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12562" calcext:value-type="float">
            <text:p>0.012562</text:p>
          </table:table-cell>
          <table:table-cell office:value-type="float" office:value="0.0131434" calcext:value-type="float">
            <text:p>0.0131434</text:p>
          </table:table-cell>
          <table:table-cell office:value-type="float" office:value="0.132416" calcext:value-type="float">
            <text:p>0.132416</text:p>
          </table:table-cell>
          <table:table-cell office:value-type="float" office:value="0.0432338" calcext:value-type="float">
            <text:p>0.04323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123801" calcext:value-type="float">
            <text:p>0.0123801</text:p>
          </table:table-cell>
          <table:table-cell office:value-type="float" office:value="0.0147995" calcext:value-type="float">
            <text:p>0.0147995</text:p>
          </table:table-cell>
          <table:table-cell office:value-type="float" office:value="0.141437" calcext:value-type="float">
            <text:p>0.141437</text:p>
          </table:table-cell>
          <table:table-cell office:value-type="float" office:value="0.039434" calcext:value-type="float">
            <text:p>0.03943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24347" calcext:value-type="float">
            <text:p>0.0124347</text:p>
          </table:table-cell>
          <table:table-cell office:value-type="float" office:value="0.0143027" calcext:value-type="float">
            <text:p>0.0143027</text:p>
          </table:table-cell>
          <table:table-cell office:value-type="float" office:value="0.13853" calcext:value-type="float">
            <text:p>0.13853</text:p>
          </table:table-cell>
          <table:table-cell office:value-type="float" office:value="0.0380371" calcext:value-type="float">
            <text:p>0.03803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124218" calcext:value-type="float">
            <text:p>0.0124218</text:p>
          </table:table-cell>
          <table:table-cell office:value-type="float" office:value="0.0127115" calcext:value-type="float">
            <text:p>0.0127115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0.0384108" calcext:value-type="float">
            <text:p>0.03841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124428" calcext:value-type="float">
            <text:p>0.0124428</text:p>
          </table:table-cell>
          <table:table-cell office:value-type="float" office:value="0.0131414" calcext:value-type="float">
            <text:p>0.0131414</text:p>
          </table:table-cell>
          <table:table-cell office:value-type="float" office:value="0.133896" calcext:value-type="float">
            <text:p>0.133896</text:p>
          </table:table-cell>
          <table:table-cell office:value-type="float" office:value="0.0378644" calcext:value-type="float">
            <text:p>0.03786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39325" calcext:value-type="float">
            <text:p>0.0139325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0.13421" calcext:value-type="float">
            <text:p>0.13421</text:p>
          </table:table-cell>
          <table:table-cell office:value-type="float" office:value="0.0408601" calcext:value-type="float">
            <text:p>0.04086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127313" calcext:value-type="float">
            <text:p>0.0127313</text:p>
          </table:table-cell>
          <table:table-cell office:value-type="float" office:value="0.0127515" calcext:value-type="float">
            <text:p>0.0127515</text:p>
          </table:table-cell>
          <table:table-cell office:value-type="float" office:value="0.129124" calcext:value-type="float">
            <text:p>0.129124</text:p>
          </table:table-cell>
          <table:table-cell office:value-type="float" office:value="0.0395817" calcext:value-type="float">
            <text:p>0.03958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126568" calcext:value-type="float">
            <text:p>0.0126568</text:p>
          </table:table-cell>
          <table:table-cell office:value-type="float" office:value="0.0129808" calcext:value-type="float">
            <text:p>0.0129808</text:p>
          </table:table-cell>
          <table:table-cell office:value-type="float" office:value="0.129454" calcext:value-type="float">
            <text:p>0.129454</text:p>
          </table:table-cell>
          <table:table-cell office:value-type="float" office:value="0.0393568" calcext:value-type="float">
            <text:p>0.03935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123776" calcext:value-type="float">
            <text:p>0.0123776</text:p>
          </table:table-cell>
          <table:table-cell office:value-type="float" office:value="0.0153494" calcext:value-type="float">
            <text:p>0.0153494</text:p>
          </table:table-cell>
          <table:table-cell office:value-type="float" office:value="0.131249" calcext:value-type="float">
            <text:p>0.131249</text:p>
          </table:table-cell>
          <table:table-cell office:value-type="float" office:value="0.0381715" calcext:value-type="float">
            <text:p>0.03817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127635" calcext:value-type="float">
            <text:p>0.0127635</text:p>
          </table:table-cell>
          <table:table-cell office:value-type="float" office:value="0.0135624" calcext:value-type="float">
            <text:p>0.0135624</text:p>
          </table:table-cell>
          <table:table-cell office:value-type="float" office:value="0.130811" calcext:value-type="float">
            <text:p>0.130811</text:p>
          </table:table-cell>
          <table:table-cell office:value-type="float" office:value="0.0386274" calcext:value-type="float">
            <text:p>0.038627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128365" calcext:value-type="float">
            <text:p>0.0128365</text:p>
          </table:table-cell>
          <table:table-cell office:value-type="float" office:value="0.0142034" calcext:value-type="float">
            <text:p>0.0142034</text:p>
          </table:table-cell>
          <table:table-cell office:value-type="float" office:value="0.130925" calcext:value-type="float">
            <text:p>0.130925</text:p>
          </table:table-cell>
          <table:table-cell office:value-type="float" office:value="0.0385135" calcext:value-type="float">
            <text:p>0.03851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127434" calcext:value-type="float">
            <text:p>0.0127434</text:p>
          </table:table-cell>
          <table:table-cell office:value-type="float" office:value="0.0153264" calcext:value-type="float">
            <text:p>0.0153264</text:p>
          </table:table-cell>
          <table:table-cell office:value-type="float" office:value="0.134027" calcext:value-type="float">
            <text:p>0.134027</text:p>
          </table:table-cell>
          <table:table-cell office:value-type="float" office:value="0.0372447" calcext:value-type="float">
            <text:p>0.03724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125105" calcext:value-type="float">
            <text:p>0.0125105</text:p>
          </table:table-cell>
          <table:table-cell office:value-type="float" office:value="0.0146582" calcext:value-type="float">
            <text:p>0.0146582</text:p>
          </table:table-cell>
          <table:table-cell office:value-type="float" office:value="0.136067" calcext:value-type="float">
            <text:p>0.136067</text:p>
          </table:table-cell>
          <table:table-cell office:value-type="float" office:value="0.0376244" calcext:value-type="float">
            <text:p>0.03762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125886" calcext:value-type="float">
            <text:p>0.0125886</text:p>
          </table:table-cell>
          <table:table-cell office:value-type="float" office:value="0.0124017" calcext:value-type="float">
            <text:p>0.0124017</text:p>
          </table:table-cell>
          <table:table-cell office:value-type="float" office:value="0.135077" calcext:value-type="float">
            <text:p>0.135077</text:p>
          </table:table-cell>
          <table:table-cell office:value-type="float" office:value="0.0387719" calcext:value-type="float">
            <text:p>0.038771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126892" calcext:value-type="float">
            <text:p>0.0126892</text:p>
          </table:table-cell>
          <table:table-cell office:value-type="float" office:value="0.0139282" calcext:value-type="float">
            <text:p>0.0139282</text:p>
          </table:table-cell>
          <table:table-cell office:value-type="float" office:value="0.137022" calcext:value-type="float">
            <text:p>0.137022</text:p>
          </table:table-cell>
          <table:table-cell office:value-type="float" office:value="0.0390932" calcext:value-type="float">
            <text:p>0.039093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125019" calcext:value-type="float">
            <text:p>0.0125019</text:p>
          </table:table-cell>
          <table:table-cell office:value-type="float" office:value="0.0137842" calcext:value-type="float">
            <text:p>0.0137842</text:p>
          </table:table-cell>
          <table:table-cell office:value-type="float" office:value="0.139059" calcext:value-type="float">
            <text:p>0.139059</text:p>
          </table:table-cell>
          <table:table-cell office:value-type="float" office:value="0.0366141" calcext:value-type="float">
            <text:p>0.036614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126293" calcext:value-type="float">
            <text:p>0.0126293</text:p>
          </table:table-cell>
          <table:table-cell office:value-type="float" office:value="0.014833" calcext:value-type="float">
            <text:p>0.014833</text:p>
          </table:table-cell>
          <table:table-cell office:value-type="float" office:value="0.135346" calcext:value-type="float">
            <text:p>0.135346</text:p>
          </table:table-cell>
          <table:table-cell office:value-type="float" office:value="0.0366492" calcext:value-type="float">
            <text:p>0.03664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24867" calcext:value-type="float">
            <text:p>0.0124867</text:p>
          </table:table-cell>
          <table:table-cell office:value-type="float" office:value="0.0136157" calcext:value-type="float">
            <text:p>0.0136157</text:p>
          </table:table-cell>
          <table:table-cell office:value-type="float" office:value="0.134546" calcext:value-type="float">
            <text:p>0.134546</text:p>
          </table:table-cell>
          <table:table-cell office:value-type="float" office:value="0.0341595" calcext:value-type="float">
            <text:p>0.03415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122976" calcext:value-type="float">
            <text:p>0.0122976</text:p>
          </table:table-cell>
          <table:table-cell office:value-type="float" office:value="0.0145756" calcext:value-type="float">
            <text:p>0.0145756</text:p>
          </table:table-cell>
          <table:table-cell office:value-type="float" office:value="0.135199" calcext:value-type="float">
            <text:p>0.135199</text:p>
          </table:table-cell>
          <table:table-cell office:value-type="float" office:value="0.0357474" calcext:value-type="float">
            <text:p>0.03574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124509" calcext:value-type="float">
            <text:p>0.0124509</text:p>
          </table:table-cell>
          <table:table-cell office:value-type="float" office:value="0.0125633" calcext:value-type="float">
            <text:p>0.0125633</text:p>
          </table:table-cell>
          <table:table-cell office:value-type="float" office:value="0.128147" calcext:value-type="float">
            <text:p>0.128147</text:p>
          </table:table-cell>
          <table:table-cell office:value-type="float" office:value="0.0399669" calcext:value-type="float">
            <text:p>0.039966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12449" calcext:value-type="float">
            <text:p>0.012449</text:p>
          </table:table-cell>
          <table:table-cell office:value-type="float" office:value="0.0118967" calcext:value-type="float">
            <text:p>0.0118967</text:p>
          </table:table-cell>
          <table:table-cell office:value-type="float" office:value="0.129135" calcext:value-type="float">
            <text:p>0.129135</text:p>
          </table:table-cell>
          <table:table-cell office:value-type="float" office:value="0.0369534" calcext:value-type="float">
            <text:p>0.036953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128274" calcext:value-type="float">
            <text:p>0.0128274</text:p>
          </table:table-cell>
          <table:table-cell office:value-type="float" office:value="0.0138082" calcext:value-type="float">
            <text:p>0.0138082</text:p>
          </table:table-cell>
          <table:table-cell office:value-type="float" office:value="0.132248" calcext:value-type="float">
            <text:p>0.132248</text:p>
          </table:table-cell>
          <table:table-cell office:value-type="float" office:value="0.0387848" calcext:value-type="float">
            <text:p>0.03878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131222" calcext:value-type="float">
            <text:p>0.0131222</text:p>
          </table:table-cell>
          <table:table-cell office:value-type="float" office:value="0.014555" calcext:value-type="float">
            <text:p>0.014555</text:p>
          </table:table-cell>
          <table:table-cell office:value-type="float" office:value="0.131108" calcext:value-type="float">
            <text:p>0.131108</text:p>
          </table:table-cell>
          <table:table-cell office:value-type="float" office:value="0.0368769" calcext:value-type="float">
            <text:p>0.036876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129987" calcext:value-type="float">
            <text:p>0.0129987</text:p>
          </table:table-cell>
          <table:table-cell office:value-type="float" office:value="0.0148747" calcext:value-type="float">
            <text:p>0.0148747</text:p>
          </table:table-cell>
          <table:table-cell office:value-type="float" office:value="0.131141" calcext:value-type="float">
            <text:p>0.131141</text:p>
          </table:table-cell>
          <table:table-cell office:value-type="float" office:value="0.037208" calcext:value-type="float">
            <text:p>0.0372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124454" calcext:value-type="float">
            <text:p>0.0124454</text:p>
          </table:table-cell>
          <table:table-cell office:value-type="float" office:value="0.0140256" calcext:value-type="float">
            <text:p>0.0140256</text:p>
          </table:table-cell>
          <table:table-cell office:value-type="float" office:value="0.130045" calcext:value-type="float">
            <text:p>0.130045</text:p>
          </table:table-cell>
          <table:table-cell office:value-type="float" office:value="0.034921" calcext:value-type="float">
            <text:p>0.03492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123501" calcext:value-type="float">
            <text:p>0.0123501</text:p>
          </table:table-cell>
          <table:table-cell office:value-type="float" office:value="0.0137755" calcext:value-type="float">
            <text:p>0.0137755</text:p>
          </table:table-cell>
          <table:table-cell office:value-type="float" office:value="0.130461" calcext:value-type="float">
            <text:p>0.130461</text:p>
          </table:table-cell>
          <table:table-cell office:value-type="float" office:value="0.0371801" calcext:value-type="float">
            <text:p>0.03718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124651" calcext:value-type="float">
            <text:p>0.0124651</text:p>
          </table:table-cell>
          <table:table-cell office:value-type="float" office:value="0.0147296" calcext:value-type="float">
            <text:p>0.0147296</text:p>
          </table:table-cell>
          <table:table-cell office:value-type="float" office:value="0.130509" calcext:value-type="float">
            <text:p>0.130509</text:p>
          </table:table-cell>
          <table:table-cell office:value-type="float" office:value="0.0371917" calcext:value-type="float">
            <text:p>0.03719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124346" calcext:value-type="float">
            <text:p>0.0124346</text:p>
          </table:table-cell>
          <table:table-cell office:value-type="float" office:value="0.0169394" calcext:value-type="float">
            <text:p>0.0169394</text:p>
          </table:table-cell>
          <table:table-cell office:value-type="float" office:value="0.129434" calcext:value-type="float">
            <text:p>0.129434</text:p>
          </table:table-cell>
          <table:table-cell office:value-type="float" office:value="0.0359935" calcext:value-type="float">
            <text:p>0.035993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123846" calcext:value-type="float">
            <text:p>0.0123846</text:p>
          </table:table-cell>
          <table:table-cell office:value-type="float" office:value="0.0147401" calcext:value-type="float">
            <text:p>0.0147401</text:p>
          </table:table-cell>
          <table:table-cell office:value-type="float" office:value="0.130777" calcext:value-type="float">
            <text:p>0.130777</text:p>
          </table:table-cell>
          <table:table-cell office:value-type="float" office:value="0.0370526" calcext:value-type="float">
            <text:p>0.03705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12487" calcext:value-type="float">
            <text:p>0.012487</text:p>
          </table:table-cell>
          <table:table-cell office:value-type="float" office:value="0.0151771" calcext:value-type="float">
            <text:p>0.0151771</text:p>
          </table:table-cell>
          <table:table-cell office:value-type="float" office:value="0.134674" calcext:value-type="float">
            <text:p>0.134674</text:p>
          </table:table-cell>
          <table:table-cell office:value-type="float" office:value="0.0356699" calcext:value-type="float">
            <text:p>0.035669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124568" calcext:value-type="float">
            <text:p>0.0124568</text:p>
          </table:table-cell>
          <table:table-cell office:value-type="float" office:value="0.0159828" calcext:value-type="float">
            <text:p>0.0159828</text:p>
          </table:table-cell>
          <table:table-cell office:value-type="float" office:value="0.136296" calcext:value-type="float">
            <text:p>0.136296</text:p>
          </table:table-cell>
          <table:table-cell office:value-type="float" office:value="0.0358233" calcext:value-type="float">
            <text:p>0.035823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124658" calcext:value-type="float">
            <text:p>0.0124658</text:p>
          </table:table-cell>
          <table:table-cell office:value-type="float" office:value="0.013491" calcext:value-type="float">
            <text:p>0.01349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0.0366919" calcext:value-type="float">
            <text:p>0.03669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131666" calcext:value-type="float">
            <text:p>0.0131666</text:p>
          </table:table-cell>
          <table:table-cell office:value-type="float" office:value="0.0146142" calcext:value-type="float">
            <text:p>0.0146142</text:p>
          </table:table-cell>
          <table:table-cell office:value-type="float" office:value="0.136301" calcext:value-type="float">
            <text:p>0.136301</text:p>
          </table:table-cell>
          <table:table-cell office:value-type="float" office:value="0.0363233" calcext:value-type="float">
            <text:p>0.03632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45227" calcext:value-type="float">
            <text:p>0.0145227</text:p>
          </table:table-cell>
          <table:table-cell office:value-type="float" office:value="0.136494" calcext:value-type="float">
            <text:p>0.136494</text:p>
          </table:table-cell>
          <table:table-cell office:value-type="float" office:value="0.0375403" calcext:value-type="float">
            <text:p>0.037540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124714" calcext:value-type="float">
            <text:p>0.0124714</text:p>
          </table:table-cell>
          <table:table-cell office:value-type="float" office:value="0.0139195" calcext:value-type="float">
            <text:p>0.0139195</text:p>
          </table:table-cell>
          <table:table-cell office:value-type="float" office:value="0.135384" calcext:value-type="float">
            <text:p>0.135384</text:p>
          </table:table-cell>
          <table:table-cell office:value-type="float" office:value="0.0330187" calcext:value-type="float">
            <text:p>0.033018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124752" calcext:value-type="float">
            <text:p>0.0124752</text:p>
          </table:table-cell>
          <table:table-cell office:value-type="float" office:value="0.0134014" calcext:value-type="float">
            <text:p>0.0134014</text:p>
          </table:table-cell>
          <table:table-cell office:value-type="float" office:value="0.137958" calcext:value-type="float">
            <text:p>0.137958</text:p>
          </table:table-cell>
          <table:table-cell office:value-type="float" office:value="0.0370841" calcext:value-type="float">
            <text:p>0.03708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131004" calcext:value-type="float">
            <text:p>0.0131004</text:p>
          </table:table-cell>
          <table:table-cell office:value-type="float" office:value="0.013828" calcext:value-type="float">
            <text:p>0.013828</text:p>
          </table:table-cell>
          <table:table-cell office:value-type="float" office:value="0.135889" calcext:value-type="float">
            <text:p>0.135889</text:p>
          </table:table-cell>
          <table:table-cell office:value-type="float" office:value="0.0364354" calcext:value-type="float">
            <text:p>0.03643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25117" calcext:value-type="float">
            <text:p>0.0125117</text:p>
          </table:table-cell>
          <table:table-cell office:value-type="float" office:value="0.0147945" calcext:value-type="float">
            <text:p>0.0147945</text:p>
          </table:table-cell>
          <table:table-cell office:value-type="float" office:value="0.135735" calcext:value-type="float">
            <text:p>0.135735</text:p>
          </table:table-cell>
          <table:table-cell office:value-type="float" office:value="0.035394" calcext:value-type="float">
            <text:p>0.0353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125819" calcext:value-type="float">
            <text:p>0.0125819</text:p>
          </table:table-cell>
          <table:table-cell office:value-type="float" office:value="0.0126811" calcext:value-type="float">
            <text:p>0.0126811</text:p>
          </table:table-cell>
          <table:table-cell office:value-type="float" office:value="0.131934" calcext:value-type="float">
            <text:p>0.131934</text:p>
          </table:table-cell>
          <table:table-cell office:value-type="float" office:value="0.0379431" calcext:value-type="float">
            <text:p>0.03794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126449" calcext:value-type="float">
            <text:p>0.0126449</text:p>
          </table:table-cell>
          <table:table-cell office:value-type="float" office:value="0.0129942" calcext:value-type="float">
            <text:p>0.0129942</text:p>
          </table:table-cell>
          <table:table-cell office:value-type="float" office:value="0.127343" calcext:value-type="float">
            <text:p>0.127343</text:p>
          </table:table-cell>
          <table:table-cell office:value-type="float" office:value="0.0361028" calcext:value-type="float">
            <text:p>0.036102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148616" calcext:value-type="float">
            <text:p>0.0148616</text:p>
          </table:table-cell>
          <table:table-cell office:value-type="float" office:value="0.0130899" calcext:value-type="float">
            <text:p>0.0130899</text:p>
          </table:table-cell>
          <table:table-cell office:value-type="float" office:value="0.129927" calcext:value-type="float">
            <text:p>0.129927</text:p>
          </table:table-cell>
          <table:table-cell office:value-type="float" office:value="0.0359534" calcext:value-type="float">
            <text:p>0.035953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136464" calcext:value-type="float">
            <text:p>0.0136464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128376" calcext:value-type="float">
            <text:p>0.128376</text:p>
          </table:table-cell>
          <table:table-cell office:value-type="float" office:value="0.0329985" calcext:value-type="float">
            <text:p>0.032998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125977" calcext:value-type="float">
            <text:p>0.0125977</text:p>
          </table:table-cell>
          <table:table-cell office:value-type="float" office:value="0.0138276" calcext:value-type="float">
            <text:p>0.0138276</text:p>
          </table:table-cell>
          <table:table-cell office:value-type="float" office:value="0.126695" calcext:value-type="float">
            <text:p>0.126695</text:p>
          </table:table-cell>
          <table:table-cell office:value-type="float" office:value="0.0360202" calcext:value-type="float">
            <text:p>0.03602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73408" calcext:value-type="float">
            <text:p>0.0173408</text:p>
          </table:table-cell>
          <table:table-cell office:value-type="float" office:value="0.128843" calcext:value-type="float">
            <text:p>0.128843</text:p>
          </table:table-cell>
          <table:table-cell office:value-type="float" office:value="0.035289" calcext:value-type="float">
            <text:p>0.03528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140539" calcext:value-type="float">
            <text:p>0.0140539</text:p>
          </table:table-cell>
          <table:table-cell office:value-type="float" office:value="0.0133916" calcext:value-type="float">
            <text:p>0.0133916</text:p>
          </table:table-cell>
          <table:table-cell office:value-type="float" office:value="0.128174" calcext:value-type="float">
            <text:p>0.128174</text:p>
          </table:table-cell>
          <table:table-cell office:value-type="float" office:value="0.036207" calcext:value-type="float">
            <text:p>0.0362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125263" calcext:value-type="float">
            <text:p>0.0125263</text:p>
          </table:table-cell>
          <table:table-cell office:value-type="float" office:value="0.0129719" calcext:value-type="float">
            <text:p>0.0129719</text:p>
          </table:table-cell>
          <table:table-cell office:value-type="float" office:value="0.134009" calcext:value-type="float">
            <text:p>0.134009</text:p>
          </table:table-cell>
          <table:table-cell office:value-type="float" office:value="0.0357005" calcext:value-type="float">
            <text:p>0.03570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121798" calcext:value-type="float">
            <text:p>0.0121798</text:p>
          </table:table-cell>
          <table:table-cell office:value-type="float" office:value="0.0132133" calcext:value-type="float">
            <text:p>0.0132133</text:p>
          </table:table-cell>
          <table:table-cell office:value-type="float" office:value="0.136495" calcext:value-type="float">
            <text:p>0.136495</text:p>
          </table:table-cell>
          <table:table-cell office:value-type="float" office:value="0.0364121" calcext:value-type="float">
            <text:p>0.036412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138521" calcext:value-type="float">
            <text:p>0.0138521</text:p>
          </table:table-cell>
          <table:table-cell office:value-type="float" office:value="0.0139423" calcext:value-type="float">
            <text:p>0.0139423</text:p>
          </table:table-cell>
          <table:table-cell office:value-type="float" office:value="0.128293" calcext:value-type="float">
            <text:p>0.128293</text:p>
          </table:table-cell>
          <table:table-cell office:value-type="float" office:value="0.0362809" calcext:value-type="float">
            <text:p>0.036280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135418" calcext:value-type="float">
            <text:p>0.0135418</text:p>
          </table:table-cell>
          <table:table-cell office:value-type="float" office:value="0.0139001" calcext:value-type="float">
            <text:p>0.0139001</text:p>
          </table:table-cell>
          <table:table-cell office:value-type="float" office:value="0.128538" calcext:value-type="float">
            <text:p>0.128538</text:p>
          </table:table-cell>
          <table:table-cell office:value-type="float" office:value="0.0360858" calcext:value-type="float">
            <text:p>0.03608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125229" calcext:value-type="float">
            <text:p>0.0125229</text:p>
          </table:table-cell>
          <table:table-cell office:value-type="float" office:value="0.0142411" calcext:value-type="float">
            <text:p>0.0142411</text:p>
          </table:table-cell>
          <table:table-cell office:value-type="float" office:value="0.128596" calcext:value-type="float">
            <text:p>0.128596</text:p>
          </table:table-cell>
          <table:table-cell office:value-type="float" office:value="0.0360131" calcext:value-type="float">
            <text:p>0.036013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128243" calcext:value-type="float">
            <text:p>0.0128243</text:p>
          </table:table-cell>
          <table:table-cell office:value-type="float" office:value="0.0135843" calcext:value-type="float">
            <text:p>0.0135843</text:p>
          </table:table-cell>
          <table:table-cell office:value-type="float" office:value="0.129147" calcext:value-type="float">
            <text:p>0.129147</text:p>
          </table:table-cell>
          <table:table-cell office:value-type="float" office:value="0.0366622" calcext:value-type="float">
            <text:p>0.036662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125782" calcext:value-type="float">
            <text:p>0.0125782</text:p>
          </table:table-cell>
          <table:table-cell office:value-type="float" office:value="0.0132677" calcext:value-type="float">
            <text:p>0.0132677</text:p>
          </table:table-cell>
          <table:table-cell office:value-type="float" office:value="0.128693" calcext:value-type="float">
            <text:p>0.128693</text:p>
          </table:table-cell>
          <table:table-cell office:value-type="float" office:value="0.0355017" calcext:value-type="float">
            <text:p>0.03550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125487" calcext:value-type="float">
            <text:p>0.0125487</text:p>
          </table:table-cell>
          <table:table-cell office:value-type="float" office:value="0.013645" calcext:value-type="float">
            <text:p>0.013645</text:p>
          </table:table-cell>
          <table:table-cell office:value-type="float" office:value="0.127038" calcext:value-type="float">
            <text:p>0.127038</text:p>
          </table:table-cell>
          <table:table-cell office:value-type="float" office:value="0.0364305" calcext:value-type="float">
            <text:p>0.03643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123248" calcext:value-type="float">
            <text:p>0.0123248</text:p>
          </table:table-cell>
          <table:table-cell office:value-type="float" office:value="0.0138477" calcext:value-type="float">
            <text:p>0.0138477</text:p>
          </table:table-cell>
          <table:table-cell office:value-type="float" office:value="0.130078" calcext:value-type="float">
            <text:p>0.130078</text:p>
          </table:table-cell>
          <table:table-cell office:value-type="float" office:value="0.0371494" calcext:value-type="float">
            <text:p>0.037149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125307" calcext:value-type="float">
            <text:p>0.0125307</text:p>
          </table:table-cell>
          <table:table-cell office:value-type="float" office:value="0.013366" calcext:value-type="float">
            <text:p>0.013366</text:p>
          </table:table-cell>
          <table:table-cell office:value-type="float" office:value="0.144326" calcext:value-type="float">
            <text:p>0.144326</text:p>
          </table:table-cell>
          <table:table-cell office:value-type="float" office:value="0.0356609" calcext:value-type="float">
            <text:p>0.035660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130984" calcext:value-type="float">
            <text:p>0.0130984</text:p>
          </table:table-cell>
          <table:table-cell office:value-type="float" office:value="0.0128198" calcext:value-type="float">
            <text:p>0.0128198</text:p>
          </table:table-cell>
          <table:table-cell office:value-type="float" office:value="0.15059" calcext:value-type="float">
            <text:p>0.15059</text:p>
          </table:table-cell>
          <table:table-cell office:value-type="float" office:value="0.0358846" calcext:value-type="float">
            <text:p>0.035884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125411" calcext:value-type="float">
            <text:p>0.0125411</text:p>
          </table:table-cell>
          <table:table-cell office:value-type="float" office:value="0.0136118" calcext:value-type="float">
            <text:p>0.0136118</text:p>
          </table:table-cell>
          <table:table-cell office:value-type="float" office:value="0.154855" calcext:value-type="float">
            <text:p>0.154855</text:p>
          </table:table-cell>
          <table:table-cell office:value-type="float" office:value="0.0357783" calcext:value-type="float">
            <text:p>0.035778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13091" calcext:value-type="float">
            <text:p>0.013091</text:p>
          </table:table-cell>
          <table:table-cell office:value-type="float" office:value="0.0148118" calcext:value-type="float">
            <text:p>0.0148118</text:p>
          </table:table-cell>
          <table:table-cell office:value-type="float" office:value="0.152331" calcext:value-type="float">
            <text:p>0.152331</text:p>
          </table:table-cell>
          <table:table-cell office:value-type="float" office:value="0.0363805" calcext:value-type="float">
            <text:p>0.036380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132065" calcext:value-type="float">
            <text:p>0.0132065</text:p>
          </table:table-cell>
          <table:table-cell office:value-type="float" office:value="0.0125278" calcext:value-type="float">
            <text:p>0.0125278</text:p>
          </table:table-cell>
          <table:table-cell office:value-type="float" office:value="0.148931" calcext:value-type="float">
            <text:p>0.148931</text:p>
          </table:table-cell>
          <table:table-cell office:value-type="float" office:value="0.0336638" calcext:value-type="float">
            <text:p>0.033663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129241" calcext:value-type="float">
            <text:p>0.0129241</text:p>
          </table:table-cell>
          <table:table-cell office:value-type="float" office:value="0.0142909" calcext:value-type="float">
            <text:p>0.0142909</text:p>
          </table:table-cell>
          <table:table-cell office:value-type="float" office:value="0.132349" calcext:value-type="float">
            <text:p>0.132349</text:p>
          </table:table-cell>
          <table:table-cell office:value-type="float" office:value="0.0357189" calcext:value-type="float">
            <text:p>0.035718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135798" calcext:value-type="float">
            <text:p>0.0135798</text:p>
          </table:table-cell>
          <table:table-cell office:value-type="float" office:value="0.0129067" calcext:value-type="float">
            <text:p>0.0129067</text:p>
          </table:table-cell>
          <table:table-cell office:value-type="float" office:value="0.134987" calcext:value-type="float">
            <text:p>0.134987</text:p>
          </table:table-cell>
          <table:table-cell office:value-type="float" office:value="0.035987" calcext:value-type="float">
            <text:p>0.03598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125393" calcext:value-type="float">
            <text:p>0.0125393</text:p>
          </table:table-cell>
          <table:table-cell office:value-type="float" office:value="0.0135317" calcext:value-type="float">
            <text:p>0.0135317</text:p>
          </table:table-cell>
          <table:table-cell office:value-type="float" office:value="0.131802" calcext:value-type="float">
            <text:p>0.131802</text:p>
          </table:table-cell>
          <table:table-cell office:value-type="float" office:value="0.0357355" calcext:value-type="float">
            <text:p>0.035735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124334" calcext:value-type="float">
            <text:p>0.0124334</text:p>
          </table:table-cell>
          <table:table-cell office:value-type="float" office:value="0.0151271" calcext:value-type="float">
            <text:p>0.0151271</text:p>
          </table:table-cell>
          <table:table-cell office:value-type="float" office:value="0.130956" calcext:value-type="float">
            <text:p>0.130956</text:p>
          </table:table-cell>
          <table:table-cell office:value-type="float" office:value="0.03561" calcext:value-type="float">
            <text:p>0.0356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121208" calcext:value-type="float">
            <text:p>0.0121208</text:p>
          </table:table-cell>
          <table:table-cell office:value-type="float" office:value="0.0139564" calcext:value-type="float">
            <text:p>0.0139564</text:p>
          </table:table-cell>
          <table:table-cell office:value-type="float" office:value="0.128141" calcext:value-type="float">
            <text:p>0.128141</text:p>
          </table:table-cell>
          <table:table-cell office:value-type="float" office:value="0.0366853" calcext:value-type="float">
            <text:p>0.036685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124433" calcext:value-type="float">
            <text:p>0.0124433</text:p>
          </table:table-cell>
          <table:table-cell office:value-type="float" office:value="0.0135816" calcext:value-type="float">
            <text:p>0.0135816</text:p>
          </table:table-cell>
          <table:table-cell office:value-type="float" office:value="0.129302" calcext:value-type="float">
            <text:p>0.129302</text:p>
          </table:table-cell>
          <table:table-cell office:value-type="float" office:value="0.0360496" calcext:value-type="float">
            <text:p>0.036049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132246" calcext:value-type="float">
            <text:p>0.0132246</text:p>
          </table:table-cell>
          <table:table-cell office:value-type="float" office:value="0.0145224" calcext:value-type="float">
            <text:p>0.0145224</text:p>
          </table:table-cell>
          <table:table-cell office:value-type="float" office:value="0.131125" calcext:value-type="float">
            <text:p>0.131125</text:p>
          </table:table-cell>
          <table:table-cell office:value-type="float" office:value="0.0333039" calcext:value-type="float">
            <text:p>0.03330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138072" calcext:value-type="float">
            <text:p>0.0138072</text:p>
          </table:table-cell>
          <table:table-cell office:value-type="float" office:value="0.0131724" calcext:value-type="float">
            <text:p>0.0131724</text:p>
          </table:table-cell>
          <table:table-cell office:value-type="float" office:value="0.139014" calcext:value-type="float">
            <text:p>0.139014</text:p>
          </table:table-cell>
          <table:table-cell office:value-type="float" office:value="0.0356223" calcext:value-type="float">
            <text:p>0.03562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34379" calcext:value-type="float">
            <text:p>0.0134379</text:p>
          </table:table-cell>
          <table:table-cell office:value-type="float" office:value="0.0140114" calcext:value-type="float">
            <text:p>0.0140114</text:p>
          </table:table-cell>
          <table:table-cell office:value-type="float" office:value="0.136047" calcext:value-type="float">
            <text:p>0.136047</text:p>
          </table:table-cell>
          <table:table-cell office:value-type="float" office:value="0.0373219" calcext:value-type="float">
            <text:p>0.03732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123536" calcext:value-type="float">
            <text:p>0.0123536</text:p>
          </table:table-cell>
          <table:table-cell office:value-type="float" office:value="0.0131897" calcext:value-type="float">
            <text:p>0.0131897</text:p>
          </table:table-cell>
          <table:table-cell office:value-type="float" office:value="0.137973" calcext:value-type="float">
            <text:p>0.137973</text:p>
          </table:table-cell>
          <table:table-cell office:value-type="float" office:value="0.0347715" calcext:value-type="float">
            <text:p>0.03477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124127" calcext:value-type="float">
            <text:p>0.0124127</text:p>
          </table:table-cell>
          <table:table-cell office:value-type="float" office:value="0.0136605" calcext:value-type="float">
            <text:p>0.0136605</text:p>
          </table:table-cell>
          <table:table-cell office:value-type="float" office:value="0.127283" calcext:value-type="float">
            <text:p>0.127283</text:p>
          </table:table-cell>
          <table:table-cell office:value-type="float" office:value="0.0342558" calcext:value-type="float">
            <text:p>0.034255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124556" calcext:value-type="float">
            <text:p>0.0124556</text:p>
          </table:table-cell>
          <table:table-cell office:value-type="float" office:value="0.0132452" calcext:value-type="float">
            <text:p>0.0132452</text:p>
          </table:table-cell>
          <table:table-cell office:value-type="float" office:value="0.128575" calcext:value-type="float">
            <text:p>0.128575</text:p>
          </table:table-cell>
          <table:table-cell office:value-type="float" office:value="0.0368573" calcext:value-type="float">
            <text:p>0.036857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13121" calcext:value-type="float">
            <text:p>0.013121</text:p>
          </table:table-cell>
          <table:table-cell office:value-type="float" office:value="0.0142662" calcext:value-type="float">
            <text:p>0.0142662</text:p>
          </table:table-cell>
          <table:table-cell office:value-type="float" office:value="0.129806" calcext:value-type="float">
            <text:p>0.129806</text:p>
          </table:table-cell>
          <table:table-cell office:value-type="float" office:value="0.0360574" calcext:value-type="float">
            <text:p>0.03605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126795" calcext:value-type="float">
            <text:p>0.0126795</text:p>
          </table:table-cell>
          <table:table-cell office:value-type="float" office:value="0.0131787" calcext:value-type="float">
            <text:p>0.0131787</text:p>
          </table:table-cell>
          <table:table-cell office:value-type="float" office:value="0.12929" calcext:value-type="float">
            <text:p>0.12929</text:p>
          </table:table-cell>
          <table:table-cell office:value-type="float" office:value="0.0379989" calcext:value-type="float">
            <text:p>0.037998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121867" calcext:value-type="float">
            <text:p>0.0121867</text:p>
          </table:table-cell>
          <table:table-cell office:value-type="float" office:value="0.0122747" calcext:value-type="float">
            <text:p>0.0122747</text:p>
          </table:table-cell>
          <table:table-cell office:value-type="float" office:value="0.129483" calcext:value-type="float">
            <text:p>0.129483</text:p>
          </table:table-cell>
          <table:table-cell office:value-type="float" office:value="0.0359092" calcext:value-type="float">
            <text:p>0.035909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149072" calcext:value-type="float">
            <text:p>0.0149072</text:p>
          </table:table-cell>
          <table:table-cell office:value-type="float" office:value="0.0147371" calcext:value-type="float">
            <text:p>0.0147371</text:p>
          </table:table-cell>
          <table:table-cell office:value-type="float" office:value="0.133021" calcext:value-type="float">
            <text:p>0.133021</text:p>
          </table:table-cell>
          <table:table-cell office:value-type="float" office:value="0.036909" calcext:value-type="float">
            <text:p>0.03690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130005" calcext:value-type="float">
            <text:p>0.0130005</text:p>
          </table:table-cell>
          <table:table-cell office:value-type="float" office:value="0.0157657" calcext:value-type="float">
            <text:p>0.0157657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354961" calcext:value-type="float">
            <text:p>0.035496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122351" calcext:value-type="float">
            <text:p>0.0122351</text:p>
          </table:table-cell>
          <table:table-cell office:value-type="float" office:value="0.0146728" calcext:value-type="float">
            <text:p>0.0146728</text:p>
          </table:table-cell>
          <table:table-cell office:value-type="float" office:value="0.134556" calcext:value-type="float">
            <text:p>0.134556</text:p>
          </table:table-cell>
          <table:table-cell office:value-type="float" office:value="0.0344862" calcext:value-type="float">
            <text:p>0.03448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123561" calcext:value-type="float">
            <text:p>0.0123561</text:p>
          </table:table-cell>
          <table:table-cell office:value-type="float" office:value="0.0134887" calcext:value-type="float">
            <text:p>0.0134887</text:p>
          </table:table-cell>
          <table:table-cell office:value-type="float" office:value="0.133953" calcext:value-type="float">
            <text:p>0.133953</text:p>
          </table:table-cell>
          <table:table-cell office:value-type="float" office:value="0.0348786" calcext:value-type="float">
            <text:p>0.034878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128551" calcext:value-type="float">
            <text:p>0.0128551</text:p>
          </table:table-cell>
          <table:table-cell office:value-type="float" office:value="0.0128071" calcext:value-type="float">
            <text:p>0.0128071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0350456" calcext:value-type="float">
            <text:p>0.035045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121087" calcext:value-type="float">
            <text:p>0.0121087</text:p>
          </table:table-cell>
          <table:table-cell office:value-type="float" office:value="0.013596" calcext:value-type="float">
            <text:p>0.013596</text:p>
          </table:table-cell>
          <table:table-cell office:value-type="float" office:value="0.134857" calcext:value-type="float">
            <text:p>0.134857</text:p>
          </table:table-cell>
          <table:table-cell office:value-type="float" office:value="0.0350346" calcext:value-type="float">
            <text:p>0.03503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147259" calcext:value-type="float">
            <text:p>0.0147259</text:p>
          </table:table-cell>
          <table:table-cell office:value-type="float" office:value="0.0139327" calcext:value-type="float">
            <text:p>0.0139327</text:p>
          </table:table-cell>
          <table:table-cell office:value-type="float" office:value="0.134793" calcext:value-type="float">
            <text:p>0.134793</text:p>
          </table:table-cell>
          <table:table-cell office:value-type="float" office:value="0.0352908" calcext:value-type="float">
            <text:p>0.03529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133398" calcext:value-type="float">
            <text:p>0.0133398</text:p>
          </table:table-cell>
          <table:table-cell office:value-type="float" office:value="0.013118" calcext:value-type="float">
            <text:p>0.013118</text:p>
          </table:table-cell>
          <table:table-cell office:value-type="float" office:value="0.13671" calcext:value-type="float">
            <text:p>0.13671</text:p>
          </table:table-cell>
          <table:table-cell office:value-type="float" office:value="0.035625" calcext:value-type="float">
            <text:p>0.0356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128075" calcext:value-type="float">
            <text:p>0.0128075</text:p>
          </table:table-cell>
          <table:table-cell office:value-type="float" office:value="0.0136074" calcext:value-type="float">
            <text:p>0.0136074</text:p>
          </table:table-cell>
          <table:table-cell office:value-type="float" office:value="0.136082" calcext:value-type="float">
            <text:p>0.136082</text:p>
          </table:table-cell>
          <table:table-cell office:value-type="float" office:value="0.0348625" calcext:value-type="float">
            <text:p>0.03486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126795" calcext:value-type="float">
            <text:p>0.0126795</text:p>
          </table:table-cell>
          <table:table-cell office:value-type="float" office:value="0.0141347" calcext:value-type="float">
            <text:p>0.0141347</text:p>
          </table:table-cell>
          <table:table-cell office:value-type="float" office:value="0.134793" calcext:value-type="float">
            <text:p>0.134793</text:p>
          </table:table-cell>
          <table:table-cell office:value-type="float" office:value="0.0376737" calcext:value-type="float">
            <text:p>0.03767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124395" calcext:value-type="float">
            <text:p>0.0124395</text:p>
          </table:table-cell>
          <table:table-cell office:value-type="float" office:value="0.0130569" calcext:value-type="float">
            <text:p>0.0130569</text:p>
          </table:table-cell>
          <table:table-cell office:value-type="float" office:value="0.135348" calcext:value-type="float">
            <text:p>0.135348</text:p>
          </table:table-cell>
          <table:table-cell office:value-type="float" office:value="0.0354999" calcext:value-type="float">
            <text:p>0.035499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124437" calcext:value-type="float">
            <text:p>0.0124437</text:p>
          </table:table-cell>
          <table:table-cell office:value-type="float" office:value="0.0143312" calcext:value-type="float">
            <text:p>0.0143312</text:p>
          </table:table-cell>
          <table:table-cell office:value-type="float" office:value="0.134471" calcext:value-type="float">
            <text:p>0.134471</text:p>
          </table:table-cell>
          <table:table-cell office:value-type="float" office:value="0.0362282" calcext:value-type="float">
            <text:p>0.036228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15995" calcext:value-type="float">
            <text:p>0.015995</text:p>
          </table:table-cell>
          <table:table-cell office:value-type="float" office:value="0.0140925" calcext:value-type="float">
            <text:p>0.0140925</text:p>
          </table:table-cell>
          <table:table-cell office:value-type="float" office:value="0.135365" calcext:value-type="float">
            <text:p>0.135365</text:p>
          </table:table-cell>
          <table:table-cell office:value-type="float" office:value="0.035691" calcext:value-type="float">
            <text:p>0.03569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159555" calcext:value-type="float">
            <text:p>0.0159555</text:p>
          </table:table-cell>
          <table:table-cell office:value-type="float" office:value="0.0132765" calcext:value-type="float">
            <text:p>0.0132765</text:p>
          </table:table-cell>
          <table:table-cell office:value-type="float" office:value="0.134138" calcext:value-type="float">
            <text:p>0.134138</text:p>
          </table:table-cell>
          <table:table-cell office:value-type="float" office:value="0.0358442" calcext:value-type="float">
            <text:p>0.035844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135781" calcext:value-type="float">
            <text:p>0.0135781</text:p>
          </table:table-cell>
          <table:table-cell office:value-type="float" office:value="0.0134461" calcext:value-type="float">
            <text:p>0.0134461</text:p>
          </table:table-cell>
          <table:table-cell office:value-type="float" office:value="0.135073" calcext:value-type="float">
            <text:p>0.135073</text:p>
          </table:table-cell>
          <table:table-cell office:value-type="float" office:value="0.0355705" calcext:value-type="float">
            <text:p>0.035570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123231" calcext:value-type="float">
            <text:p>0.0123231</text:p>
          </table:table-cell>
          <table:table-cell office:value-type="float" office:value="0.0131773" calcext:value-type="float">
            <text:p>0.013177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0349139" calcext:value-type="float">
            <text:p>0.03491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127385" calcext:value-type="float">
            <text:p>0.0127385</text:p>
          </table:table-cell>
          <table:table-cell office:value-type="float" office:value="0.0125436" calcext:value-type="float">
            <text:p>0.0125436</text:p>
          </table:table-cell>
          <table:table-cell office:value-type="float" office:value="0.138701" calcext:value-type="float">
            <text:p>0.138701</text:p>
          </table:table-cell>
          <table:table-cell office:value-type="float" office:value="0.035041" calcext:value-type="float">
            <text:p>0.03504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0146715" calcext:value-type="float">
            <text:p>0.0146715</text:p>
          </table:table-cell>
          <table:table-cell office:value-type="float" office:value="0.13533" calcext:value-type="float">
            <text:p>0.13533</text:p>
          </table:table-cell>
          <table:table-cell office:value-type="float" office:value="0.0370455" calcext:value-type="float">
            <text:p>0.03704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125093" calcext:value-type="float">
            <text:p>0.0125093</text:p>
          </table:table-cell>
          <table:table-cell office:value-type="float" office:value="0.014617" calcext:value-type="float">
            <text:p>0.014617</text:p>
          </table:table-cell>
          <table:table-cell office:value-type="float" office:value="0.138088" calcext:value-type="float">
            <text:p>0.138088</text:p>
          </table:table-cell>
          <table:table-cell office:value-type="float" office:value="0.0364836" calcext:value-type="float">
            <text:p>0.036483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124841" calcext:value-type="float">
            <text:p>0.0124841</text:p>
          </table:table-cell>
          <table:table-cell office:value-type="float" office:value="0.0135856" calcext:value-type="float">
            <text:p>0.0135856</text:p>
          </table:table-cell>
          <table:table-cell office:value-type="float" office:value="0.125331" calcext:value-type="float">
            <text:p>0.125331</text:p>
          </table:table-cell>
          <table:table-cell office:value-type="float" office:value="0.0354545" calcext:value-type="float">
            <text:p>0.03545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155874" calcext:value-type="float">
            <text:p>0.0155874</text:p>
          </table:table-cell>
          <table:table-cell office:value-type="float" office:value="0.0127927" calcext:value-type="float">
            <text:p>0.0127927</text:p>
          </table:table-cell>
          <table:table-cell office:value-type="float" office:value="0.126782" calcext:value-type="float">
            <text:p>0.126782</text:p>
          </table:table-cell>
          <table:table-cell office:value-type="float" office:value="0.035855" calcext:value-type="float">
            <text:p>0.03585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124524" calcext:value-type="float">
            <text:p>0.0124524</text:p>
          </table:table-cell>
          <table:table-cell office:value-type="float" office:value="0.0141243" calcext:value-type="float">
            <text:p>0.0141243</text:p>
          </table:table-cell>
          <table:table-cell office:value-type="float" office:value="0.128361" calcext:value-type="float">
            <text:p>0.128361</text:p>
          </table:table-cell>
          <table:table-cell office:value-type="float" office:value="0.0363197" calcext:value-type="float">
            <text:p>0.036319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150161" calcext:value-type="float">
            <text:p>0.0150161</text:p>
          </table:table-cell>
          <table:table-cell office:value-type="float" office:value="0.0135376" calcext:value-type="float">
            <text:p>0.0135376</text:p>
          </table:table-cell>
          <table:table-cell office:value-type="float" office:value="0.12796" calcext:value-type="float">
            <text:p>0.12796</text:p>
          </table:table-cell>
          <table:table-cell office:value-type="float" office:value="0.0354134" calcext:value-type="float">
            <text:p>0.03541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304025" calcext:value-type="float">
            <text:p>0.0304025</text:p>
          </table:table-cell>
          <table:table-cell office:value-type="float" office:value="0.0126838" calcext:value-type="float">
            <text:p>0.0126838</text:p>
          </table:table-cell>
          <table:table-cell office:value-type="float" office:value="0.12842" calcext:value-type="float">
            <text:p>0.12842</text:p>
          </table:table-cell>
          <table:table-cell office:value-type="float" office:value="0.0364313" calcext:value-type="float">
            <text:p>0.03643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157206" calcext:value-type="float">
            <text:p>0.0157206</text:p>
          </table:table-cell>
          <table:table-cell office:value-type="float" office:value="0.0135626" calcext:value-type="float">
            <text:p>0.0135626</text:p>
          </table:table-cell>
          <table:table-cell office:value-type="float" office:value="0.136183" calcext:value-type="float">
            <text:p>0.136183</text:p>
          </table:table-cell>
          <table:table-cell office:value-type="float" office:value="0.0364831" calcext:value-type="float">
            <text:p>0.036483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123648" calcext:value-type="float">
            <text:p>0.0123648</text:p>
          </table:table-cell>
          <table:table-cell office:value-type="float" office:value="0.0138365" calcext:value-type="float">
            <text:p>0.0138365</text:p>
          </table:table-cell>
          <table:table-cell office:value-type="float" office:value="0.136684" calcext:value-type="float">
            <text:p>0.136684</text:p>
          </table:table-cell>
          <table:table-cell office:value-type="float" office:value="0.0357411" calcext:value-type="float">
            <text:p>0.03574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123834" calcext:value-type="float">
            <text:p>0.0123834</text:p>
          </table:table-cell>
          <table:table-cell office:value-type="float" office:value="0.0142741" calcext:value-type="float">
            <text:p>0.0142741</text:p>
          </table:table-cell>
          <table:table-cell office:value-type="float" office:value="0.135131" calcext:value-type="float">
            <text:p>0.135131</text:p>
          </table:table-cell>
          <table:table-cell office:value-type="float" office:value="0.0359895" calcext:value-type="float">
            <text:p>0.035989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24705" calcext:value-type="float">
            <text:p>0.0124705</text:p>
          </table:table-cell>
          <table:table-cell office:value-type="float" office:value="0.0140333" calcext:value-type="float">
            <text:p>0.0140333</text:p>
          </table:table-cell>
          <table:table-cell office:value-type="float" office:value="0.134342" calcext:value-type="float">
            <text:p>0.134342</text:p>
          </table:table-cell>
          <table:table-cell office:value-type="float" office:value="0.0371679" calcext:value-type="float">
            <text:p>0.037167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126039" calcext:value-type="float">
            <text:p>0.0126039</text:p>
          </table:table-cell>
          <table:table-cell office:value-type="float" office:value="0.0158845" calcext:value-type="float">
            <text:p>0.0158845</text:p>
          </table:table-cell>
          <table:table-cell office:value-type="float" office:value="0.139154" calcext:value-type="float">
            <text:p>0.139154</text:p>
          </table:table-cell>
          <table:table-cell office:value-type="float" office:value="0.0357153" calcext:value-type="float">
            <text:p>0.035715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124438" calcext:value-type="float">
            <text:p>0.0124438</text:p>
          </table:table-cell>
          <table:table-cell office:value-type="float" office:value="0.0140921" calcext:value-type="float">
            <text:p>0.0140921</text:p>
          </table:table-cell>
          <table:table-cell office:value-type="float" office:value="0.13556" calcext:value-type="float">
            <text:p>0.13556</text:p>
          </table:table-cell>
          <table:table-cell office:value-type="float" office:value="0.0361245" calcext:value-type="float">
            <text:p>0.036124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125768" calcext:value-type="float">
            <text:p>0.0125768</text:p>
          </table:table-cell>
          <table:table-cell office:value-type="float" office:value="0.013786" calcext:value-type="float">
            <text:p>0.013786</text:p>
          </table:table-cell>
          <table:table-cell office:value-type="float" office:value="0.136388" calcext:value-type="float">
            <text:p>0.136388</text:p>
          </table:table-cell>
          <table:table-cell office:value-type="float" office:value="0.0371426" calcext:value-type="float">
            <text:p>0.037142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129406" calcext:value-type="float">
            <text:p>0.0129406</text:p>
          </table:table-cell>
          <table:table-cell office:value-type="float" office:value="0.0127486" calcext:value-type="float">
            <text:p>0.0127486</text:p>
          </table:table-cell>
          <table:table-cell office:value-type="float" office:value="0.135654" calcext:value-type="float">
            <text:p>0.135654</text:p>
          </table:table-cell>
          <table:table-cell office:value-type="float" office:value="0.035088" calcext:value-type="float">
            <text:p>0.0350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126463" calcext:value-type="float">
            <text:p>0.0126463</text:p>
          </table:table-cell>
          <table:table-cell office:value-type="float" office:value="0.0144362" calcext:value-type="float">
            <text:p>0.0144362</text:p>
          </table:table-cell>
          <table:table-cell office:value-type="float" office:value="0.137801" calcext:value-type="float">
            <text:p>0.137801</text:p>
          </table:table-cell>
          <table:table-cell office:value-type="float" office:value="0.0352921" calcext:value-type="float">
            <text:p>0.035292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123839" calcext:value-type="float">
            <text:p>0.0123839</text:p>
          </table:table-cell>
          <table:table-cell office:value-type="float" office:value="0.0143516" calcext:value-type="float">
            <text:p>0.0143516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0352127" calcext:value-type="float">
            <text:p>0.035212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154831" calcext:value-type="float">
            <text:p>0.0154831</text:p>
          </table:table-cell>
          <table:table-cell office:value-type="float" office:value="0.0142958" calcext:value-type="float">
            <text:p>0.0142958</text:p>
          </table:table-cell>
          <table:table-cell office:value-type="float" office:value="0.137668" calcext:value-type="float">
            <text:p>0.137668</text:p>
          </table:table-cell>
          <table:table-cell office:value-type="float" office:value="0.0368626" calcext:value-type="float">
            <text:p>0.036862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137148" calcext:value-type="float">
            <text:p>0.0137148</text:p>
          </table:table-cell>
          <table:table-cell office:value-type="float" office:value="0.0147483" calcext:value-type="float">
            <text:p>0.0147483</text:p>
          </table:table-cell>
          <table:table-cell office:value-type="float" office:value="0.125236" calcext:value-type="float">
            <text:p>0.125236</text:p>
          </table:table-cell>
          <table:table-cell office:value-type="float" office:value="0.0353414" calcext:value-type="float">
            <text:p>0.035341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126727" calcext:value-type="float">
            <text:p>0.0126727</text:p>
          </table:table-cell>
          <table:table-cell office:value-type="float" office:value="0.0122135" calcext:value-type="float">
            <text:p>0.0122135</text:p>
          </table:table-cell>
          <table:table-cell office:value-type="float" office:value="0.126934" calcext:value-type="float">
            <text:p>0.126934</text:p>
          </table:table-cell>
          <table:table-cell office:value-type="float" office:value="0.0355371" calcext:value-type="float">
            <text:p>0.035537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127363" calcext:value-type="float">
            <text:p>0.0127363</text:p>
          </table:table-cell>
          <table:table-cell office:value-type="float" office:value="0.0127345" calcext:value-type="float">
            <text:p>0.0127345</text:p>
          </table:table-cell>
          <table:table-cell office:value-type="float" office:value="0.129283" calcext:value-type="float">
            <text:p>0.129283</text:p>
          </table:table-cell>
          <table:table-cell office:value-type="float" office:value="0.0353287" calcext:value-type="float">
            <text:p>0.035328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125203" calcext:value-type="float">
            <text:p>0.0125203</text:p>
          </table:table-cell>
          <table:table-cell office:value-type="float" office:value="0.0135806" calcext:value-type="float">
            <text:p>0.0135806</text:p>
          </table:table-cell>
          <table:table-cell office:value-type="float" office:value="0.128554" calcext:value-type="float">
            <text:p>0.128554</text:p>
          </table:table-cell>
          <table:table-cell office:value-type="float" office:value="0.038376" calcext:value-type="float">
            <text:p>0.03837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129058" calcext:value-type="float">
            <text:p>0.0129058</text:p>
          </table:table-cell>
          <table:table-cell office:value-type="float" office:value="0.0134867" calcext:value-type="float">
            <text:p>0.0134867</text:p>
          </table:table-cell>
          <table:table-cell office:value-type="float" office:value="0.127712" calcext:value-type="float">
            <text:p>0.127712</text:p>
          </table:table-cell>
          <table:table-cell office:value-type="float" office:value="0.0361396" calcext:value-type="float">
            <text:p>0.03613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24571" calcext:value-type="float">
            <text:p>0.0124571</text:p>
          </table:table-cell>
          <table:table-cell office:value-type="float" office:value="0.0129535" calcext:value-type="float">
            <text:p>0.0129535</text:p>
          </table:table-cell>
          <table:table-cell office:value-type="float" office:value="0.12825" calcext:value-type="float">
            <text:p>0.12825</text:p>
          </table:table-cell>
          <table:table-cell office:value-type="float" office:value="0.0365536" calcext:value-type="float">
            <text:p>0.036553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27702" calcext:value-type="float">
            <text:p>0.0127702</text:p>
          </table:table-cell>
          <table:table-cell office:value-type="float" office:value="0.0141699" calcext:value-type="float">
            <text:p>0.0141699</text:p>
          </table:table-cell>
          <table:table-cell office:value-type="float" office:value="0.128752" calcext:value-type="float">
            <text:p>0.128752</text:p>
          </table:table-cell>
          <table:table-cell office:value-type="float" office:value="0.0370133" calcext:value-type="float">
            <text:p>0.037013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127711" calcext:value-type="float">
            <text:p>0.0127711</text:p>
          </table:table-cell>
          <table:table-cell office:value-type="float" office:value="0.013309" calcext:value-type="float">
            <text:p>0.013309</text:p>
          </table:table-cell>
          <table:table-cell office:value-type="float" office:value="0.129063" calcext:value-type="float">
            <text:p>0.129063</text:p>
          </table:table-cell>
          <table:table-cell office:value-type="float" office:value="0.0361912" calcext:value-type="float">
            <text:p>0.03619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36034" calcext:value-type="float">
            <text:p>0.0136034</text:p>
          </table:table-cell>
          <table:table-cell office:value-type="float" office:value="0.0147165" calcext:value-type="float">
            <text:p>0.0147165</text:p>
          </table:table-cell>
          <table:table-cell office:value-type="float" office:value="0.128757" calcext:value-type="float">
            <text:p>0.128757</text:p>
          </table:table-cell>
          <table:table-cell office:value-type="float" office:value="0.0363799" calcext:value-type="float">
            <text:p>0.036379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123306" calcext:value-type="float">
            <text:p>0.0123306</text:p>
          </table:table-cell>
          <table:table-cell office:value-type="float" office:value="0.0143792" calcext:value-type="float">
            <text:p>0.0143792</text:p>
          </table:table-cell>
          <table:table-cell office:value-type="float" office:value="0.127303" calcext:value-type="float">
            <text:p>0.127303</text:p>
          </table:table-cell>
          <table:table-cell office:value-type="float" office:value="0.0422484" calcext:value-type="float">
            <text:p>0.042248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128146" calcext:value-type="float">
            <text:p>0.0128146</text:p>
          </table:table-cell>
          <table:table-cell office:value-type="float" office:value="0.0133464" calcext:value-type="float">
            <text:p>0.0133464</text:p>
          </table:table-cell>
          <table:table-cell office:value-type="float" office:value="0.129245" calcext:value-type="float">
            <text:p>0.129245</text:p>
          </table:table-cell>
          <table:table-cell office:value-type="float" office:value="0.0371958" calcext:value-type="float">
            <text:p>0.037195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129008" calcext:value-type="float">
            <text:p>0.0129008</text:p>
          </table:table-cell>
          <table:table-cell office:value-type="float" office:value="0.013976" calcext:value-type="float">
            <text:p>0.013976</text:p>
          </table:table-cell>
          <table:table-cell office:value-type="float" office:value="0.131793" calcext:value-type="float">
            <text:p>0.131793</text:p>
          </table:table-cell>
          <table:table-cell office:value-type="float" office:value="0.0345323" calcext:value-type="float">
            <text:p>0.034532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123555" calcext:value-type="float">
            <text:p>0.0123555</text:p>
          </table:table-cell>
          <table:table-cell office:value-type="float" office:value="0.0146965" calcext:value-type="float">
            <text:p>0.0146965</text:p>
          </table:table-cell>
          <table:table-cell office:value-type="float" office:value="0.132616" calcext:value-type="float">
            <text:p>0.132616</text:p>
          </table:table-cell>
          <table:table-cell office:value-type="float" office:value="0.0349299" calcext:value-type="float">
            <text:p>0.034929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26581" calcext:value-type="float">
            <text:p>0.0126581</text:p>
          </table:table-cell>
          <table:table-cell office:value-type="float" office:value="0.0128154" calcext:value-type="float">
            <text:p>0.0128154</text:p>
          </table:table-cell>
          <table:table-cell office:value-type="float" office:value="0.127504" calcext:value-type="float">
            <text:p>0.127504</text:p>
          </table:table-cell>
          <table:table-cell office:value-type="float" office:value="0.0360755" calcext:value-type="float">
            <text:p>0.036075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125144" calcext:value-type="float">
            <text:p>0.0125144</text:p>
          </table:table-cell>
          <table:table-cell office:value-type="float" office:value="0.0149783" calcext:value-type="float">
            <text:p>0.0149783</text:p>
          </table:table-cell>
          <table:table-cell office:value-type="float" office:value="0.128485" calcext:value-type="float">
            <text:p>0.128485</text:p>
          </table:table-cell>
          <table:table-cell office:value-type="float" office:value="0.0349369" calcext:value-type="float">
            <text:p>0.034936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126351" calcext:value-type="float">
            <text:p>0.0126351</text:p>
          </table:table-cell>
          <table:table-cell office:value-type="float" office:value="0.014441" calcext:value-type="float">
            <text:p>0.014441</text:p>
          </table:table-cell>
          <table:table-cell office:value-type="float" office:value="0.129983" calcext:value-type="float">
            <text:p>0.129983</text:p>
          </table:table-cell>
          <table:table-cell office:value-type="float" office:value="0.035777" calcext:value-type="float">
            <text:p>0.03577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124996" calcext:value-type="float">
            <text:p>0.0124996</text:p>
          </table:table-cell>
          <table:table-cell office:value-type="float" office:value="0.0127187" calcext:value-type="float">
            <text:p>0.0127187</text:p>
          </table:table-cell>
          <table:table-cell office:value-type="float" office:value="0.128665" calcext:value-type="float">
            <text:p>0.128665</text:p>
          </table:table-cell>
          <table:table-cell office:value-type="float" office:value="0.0357189" calcext:value-type="float">
            <text:p>0.035718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123631" calcext:value-type="float">
            <text:p>0.0123631</text:p>
          </table:table-cell>
          <table:table-cell office:value-type="float" office:value="0.0132625" calcext:value-type="float">
            <text:p>0.0132625</text:p>
          </table:table-cell>
          <table:table-cell office:value-type="float" office:value="0.128378" calcext:value-type="float">
            <text:p>0.128378</text:p>
          </table:table-cell>
          <table:table-cell office:value-type="float" office:value="0.037336" calcext:value-type="float">
            <text:p>0.03733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129741" calcext:value-type="float">
            <text:p>0.0129741</text:p>
          </table:table-cell>
          <table:table-cell office:value-type="float" office:value="0.0141404" calcext:value-type="float">
            <text:p>0.0141404</text:p>
          </table:table-cell>
          <table:table-cell office:value-type="float" office:value="0.128649" calcext:value-type="float">
            <text:p>0.128649</text:p>
          </table:table-cell>
          <table:table-cell office:value-type="float" office:value="0.0359239" calcext:value-type="float">
            <text:p>0.035923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130818" calcext:value-type="float">
            <text:p>0.0130818</text:p>
          </table:table-cell>
          <table:table-cell office:value-type="float" office:value="0.0162278" calcext:value-type="float">
            <text:p>0.0162278</text:p>
          </table:table-cell>
          <table:table-cell office:value-type="float" office:value="0.13034" calcext:value-type="float">
            <text:p>0.13034</text:p>
          </table:table-cell>
          <table:table-cell office:value-type="float" office:value="0.0349302" calcext:value-type="float">
            <text:p>0.034930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128534" calcext:value-type="float">
            <text:p>0.0128534</text:p>
          </table:table-cell>
          <table:table-cell office:value-type="float" office:value="0.0159452" calcext:value-type="float">
            <text:p>0.0159452</text:p>
          </table:table-cell>
          <table:table-cell office:value-type="float" office:value="0.129112" calcext:value-type="float">
            <text:p>0.129112</text:p>
          </table:table-cell>
          <table:table-cell office:value-type="float" office:value="0.0353251" calcext:value-type="float">
            <text:p>0.035325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122888" calcext:value-type="float">
            <text:p>0.0122888</text:p>
          </table:table-cell>
          <table:table-cell office:value-type="float" office:value="0.013851" calcext:value-type="float">
            <text:p>0.013851</text:p>
          </table:table-cell>
          <table:table-cell office:value-type="float" office:value="0.129014" calcext:value-type="float">
            <text:p>0.129014</text:p>
          </table:table-cell>
          <table:table-cell office:value-type="float" office:value="0.0345952" calcext:value-type="float">
            <text:p>0.034595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126012" calcext:value-type="float">
            <text:p>0.0126012</text:p>
          </table:table-cell>
          <table:table-cell office:value-type="float" office:value="0.0169456" calcext:value-type="float">
            <text:p>0.0169456</text:p>
          </table:table-cell>
          <table:table-cell office:value-type="float" office:value="0.128507" calcext:value-type="float">
            <text:p>0.128507</text:p>
          </table:table-cell>
          <table:table-cell office:value-type="float" office:value="0.0347165" calcext:value-type="float">
            <text:p>0.03471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125529" calcext:value-type="float">
            <text:p>0.0125529</text:p>
          </table:table-cell>
          <table:table-cell office:value-type="float" office:value="0.0175565" calcext:value-type="float">
            <text:p>0.0175565</text:p>
          </table:table-cell>
          <table:table-cell office:value-type="float" office:value="0.130979" calcext:value-type="float">
            <text:p>0.130979</text:p>
          </table:table-cell>
          <table:table-cell office:value-type="float" office:value="0.0353471" calcext:value-type="float">
            <text:p>0.035347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128647" calcext:value-type="float">
            <text:p>0.0128647</text:p>
          </table:table-cell>
          <table:table-cell office:value-type="float" office:value="0.0142139" calcext:value-type="float">
            <text:p>0.0142139</text:p>
          </table:table-cell>
          <table:table-cell office:value-type="float" office:value="0.13056" calcext:value-type="float">
            <text:p>0.13056</text:p>
          </table:table-cell>
          <table:table-cell office:value-type="float" office:value="0.0349985" calcext:value-type="float">
            <text:p>0.034998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124052" calcext:value-type="float">
            <text:p>0.0124052</text:p>
          </table:table-cell>
          <table:table-cell office:value-type="float" office:value="0.012776" calcext:value-type="float">
            <text:p>0.012776</text:p>
          </table:table-cell>
          <table:table-cell office:value-type="float" office:value="0.128489" calcext:value-type="float">
            <text:p>0.128489</text:p>
          </table:table-cell>
          <table:table-cell office:value-type="float" office:value="0.0352021" calcext:value-type="float">
            <text:p>0.035202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123358" calcext:value-type="float">
            <text:p>0.0123358</text:p>
          </table:table-cell>
          <table:table-cell office:value-type="float" office:value="0.0127402" calcext:value-type="float">
            <text:p>0.0127402</text:p>
          </table:table-cell>
          <table:table-cell office:value-type="float" office:value="0.133505" calcext:value-type="float">
            <text:p>0.133505</text:p>
          </table:table-cell>
          <table:table-cell office:value-type="float" office:value="0.0366452" calcext:value-type="float">
            <text:p>0.036645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122008" calcext:value-type="float">
            <text:p>0.0122008</text:p>
          </table:table-cell>
          <table:table-cell office:value-type="float" office:value="0.0146144" calcext:value-type="float">
            <text:p>0.0146144</text:p>
          </table:table-cell>
          <table:table-cell office:value-type="float" office:value="0.129931" calcext:value-type="float">
            <text:p>0.129931</text:p>
          </table:table-cell>
          <table:table-cell office:value-type="float" office:value="0.0354455" calcext:value-type="float">
            <text:p>0.035445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123584" calcext:value-type="float">
            <text:p>0.0123584</text:p>
          </table:table-cell>
          <table:table-cell office:value-type="float" office:value="0.0128897" calcext:value-type="float">
            <text:p>0.0128897</text:p>
          </table:table-cell>
          <table:table-cell office:value-type="float" office:value="0.129527" calcext:value-type="float">
            <text:p>0.129527</text:p>
          </table:table-cell>
          <table:table-cell office:value-type="float" office:value="0.0359043" calcext:value-type="float">
            <text:p>0.03590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123994" calcext:value-type="float">
            <text:p>0.0123994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130061" calcext:value-type="float">
            <text:p>0.130061</text:p>
          </table:table-cell>
          <table:table-cell office:value-type="float" office:value="0.0369897" calcext:value-type="float">
            <text:p>0.036989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122706" calcext:value-type="float">
            <text:p>0.0122706</text:p>
          </table:table-cell>
          <table:table-cell office:value-type="float" office:value="0.0136366" calcext:value-type="float">
            <text:p>0.0136366</text:p>
          </table:table-cell>
          <table:table-cell office:value-type="float" office:value="0.127882" calcext:value-type="float">
            <text:p>0.127882</text:p>
          </table:table-cell>
          <table:table-cell office:value-type="float" office:value="0.0395085" calcext:value-type="float">
            <text:p>0.039508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125294" calcext:value-type="float">
            <text:p>0.0125294</text:p>
          </table:table-cell>
          <table:table-cell office:value-type="float" office:value="0.0143057" calcext:value-type="float">
            <text:p>0.0143057</text:p>
          </table:table-cell>
          <table:table-cell office:value-type="float" office:value="0.126169" calcext:value-type="float">
            <text:p>0.126169</text:p>
          </table:table-cell>
          <table:table-cell office:value-type="float" office:value="0.0378998" calcext:value-type="float">
            <text:p>0.037899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122763" calcext:value-type="float">
            <text:p>0.0122763</text:p>
          </table:table-cell>
          <table:table-cell office:value-type="float" office:value="0.0137782" calcext:value-type="float">
            <text:p>0.0137782</text:p>
          </table:table-cell>
          <table:table-cell office:value-type="float" office:value="0.128192" calcext:value-type="float">
            <text:p>0.128192</text:p>
          </table:table-cell>
          <table:table-cell office:value-type="float" office:value="0.0356146" calcext:value-type="float">
            <text:p>0.035614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124182" calcext:value-type="float">
            <text:p>0.012418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28439" calcext:value-type="float">
            <text:p>0.128439</text:p>
          </table:table-cell>
          <table:table-cell office:value-type="float" office:value="0.0341842" calcext:value-type="float">
            <text:p>0.034184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124649" calcext:value-type="float">
            <text:p>0.0124649</text:p>
          </table:table-cell>
          <table:table-cell office:value-type="float" office:value="0.0164736" calcext:value-type="float">
            <text:p>0.0164736</text:p>
          </table:table-cell>
          <table:table-cell office:value-type="float" office:value="0.130399" calcext:value-type="float">
            <text:p>0.130399</text:p>
          </table:table-cell>
          <table:table-cell office:value-type="float" office:value="0.0358943" calcext:value-type="float">
            <text:p>0.035894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127179" calcext:value-type="float">
            <text:p>0.0127179</text:p>
          </table:table-cell>
          <table:table-cell office:value-type="float" office:value="0.0140076" calcext:value-type="float">
            <text:p>0.0140076</text:p>
          </table:table-cell>
          <table:table-cell office:value-type="float" office:value="0.130974" calcext:value-type="float">
            <text:p>0.130974</text:p>
          </table:table-cell>
          <table:table-cell office:value-type="float" office:value="0.0355491" calcext:value-type="float">
            <text:p>0.035549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123648" calcext:value-type="float">
            <text:p>0.0123648</text:p>
          </table:table-cell>
          <table:table-cell office:value-type="float" office:value="0.0142779" calcext:value-type="float">
            <text:p>0.0142779</text:p>
          </table:table-cell>
          <table:table-cell office:value-type="float" office:value="0.127073" calcext:value-type="float">
            <text:p>0.127073</text:p>
          </table:table-cell>
          <table:table-cell office:value-type="float" office:value="0.0353702" calcext:value-type="float">
            <text:p>0.035370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123047" calcext:value-type="float">
            <text:p>0.0123047</text:p>
          </table:table-cell>
          <table:table-cell office:value-type="float" office:value="0.012321" calcext:value-type="float">
            <text:p>0.012321</text:p>
          </table:table-cell>
          <table:table-cell office:value-type="float" office:value="0.130217" calcext:value-type="float">
            <text:p>0.130217</text:p>
          </table:table-cell>
          <table:table-cell office:value-type="float" office:value="0.0368168" calcext:value-type="float">
            <text:p>0.036816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127139" calcext:value-type="float">
            <text:p>0.0127139</text:p>
          </table:table-cell>
          <table:table-cell office:value-type="float" office:value="0.0134383" calcext:value-type="float">
            <text:p>0.0134383</text:p>
          </table:table-cell>
          <table:table-cell office:value-type="float" office:value="0.130096" calcext:value-type="float">
            <text:p>0.130096</text:p>
          </table:table-cell>
          <table:table-cell office:value-type="float" office:value="0.0350081" calcext:value-type="float">
            <text:p>0.035008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127181" calcext:value-type="float">
            <text:p>0.0127181</text:p>
          </table:table-cell>
          <table:table-cell office:value-type="float" office:value="0.0139528" calcext:value-type="float">
            <text:p>0.0139528</text:p>
          </table:table-cell>
          <table:table-cell office:value-type="float" office:value="0.129544" calcext:value-type="float">
            <text:p>0.129544</text:p>
          </table:table-cell>
          <table:table-cell office:value-type="float" office:value="0.0357145" calcext:value-type="float">
            <text:p>0.035714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12671" calcext:value-type="float">
            <text:p>0.012671</text:p>
          </table:table-cell>
          <table:table-cell office:value-type="float" office:value="0.0136341" calcext:value-type="float">
            <text:p>0.0136341</text:p>
          </table:table-cell>
          <table:table-cell office:value-type="float" office:value="0.126291" calcext:value-type="float">
            <text:p>0.126291</text:p>
          </table:table-cell>
          <table:table-cell office:value-type="float" office:value="0.0367443" calcext:value-type="float">
            <text:p>0.036744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123441" calcext:value-type="float">
            <text:p>0.0123441</text:p>
          </table:table-cell>
          <table:table-cell office:value-type="float" office:value="0.0135084" calcext:value-type="float">
            <text:p>0.0135084</text:p>
          </table:table-cell>
          <table:table-cell office:value-type="float" office:value="0.129192" calcext:value-type="float">
            <text:p>0.129192</text:p>
          </table:table-cell>
          <table:table-cell office:value-type="float" office:value="0.0360672" calcext:value-type="float">
            <text:p>0.036067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124311" calcext:value-type="float">
            <text:p>0.0124311</text:p>
          </table:table-cell>
          <table:table-cell office:value-type="float" office:value="0.0145757" calcext:value-type="float">
            <text:p>0.0145757</text:p>
          </table:table-cell>
          <table:table-cell office:value-type="float" office:value="0.137811" calcext:value-type="float">
            <text:p>0.137811</text:p>
          </table:table-cell>
          <table:table-cell office:value-type="float" office:value="0.0358509" calcext:value-type="float">
            <text:p>0.035850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127063" calcext:value-type="float">
            <text:p>0.0127063</text:p>
          </table:table-cell>
          <table:table-cell office:value-type="float" office:value="0.012673" calcext:value-type="float">
            <text:p>0.012673</text:p>
          </table:table-cell>
          <table:table-cell office:value-type="float" office:value="0.137538" calcext:value-type="float">
            <text:p>0.137538</text:p>
          </table:table-cell>
          <table:table-cell office:value-type="float" office:value="0.0379141" calcext:value-type="float">
            <text:p>0.037914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124111" calcext:value-type="float">
            <text:p>0.0124111</text:p>
          </table:table-cell>
          <table:table-cell office:value-type="float" office:value="0.0134855" calcext:value-type="float">
            <text:p>0.0134855</text:p>
          </table:table-cell>
          <table:table-cell office:value-type="float" office:value="0.135568" calcext:value-type="float">
            <text:p>0.135568</text:p>
          </table:table-cell>
          <table:table-cell office:value-type="float" office:value="0.0344704" calcext:value-type="float">
            <text:p>0.034470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125404" calcext:value-type="float">
            <text:p>0.0125404</text:p>
          </table:table-cell>
          <table:table-cell office:value-type="float" office:value="0.0128689" calcext:value-type="float">
            <text:p>0.0128689</text:p>
          </table:table-cell>
          <table:table-cell office:value-type="float" office:value="0.133883" calcext:value-type="float">
            <text:p>0.133883</text:p>
          </table:table-cell>
          <table:table-cell office:value-type="float" office:value="0.0352531" calcext:value-type="float">
            <text:p>0.035253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138101" calcext:value-type="float">
            <text:p>0.0138101</text:p>
          </table:table-cell>
          <table:table-cell office:value-type="float" office:value="0.0163339" calcext:value-type="float">
            <text:p>0.0163339</text:p>
          </table:table-cell>
          <table:table-cell office:value-type="float" office:value="0.133727" calcext:value-type="float">
            <text:p>0.133727</text:p>
          </table:table-cell>
          <table:table-cell office:value-type="float" office:value="0.0354478" calcext:value-type="float">
            <text:p>0.035447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124674" calcext:value-type="float">
            <text:p>0.0124674</text:p>
          </table:table-cell>
          <table:table-cell office:value-type="float" office:value="0.0158567" calcext:value-type="float">
            <text:p>0.0158567</text:p>
          </table:table-cell>
          <table:table-cell office:value-type="float" office:value="0.132541" calcext:value-type="float">
            <text:p>0.132541</text:p>
          </table:table-cell>
          <table:table-cell office:value-type="float" office:value="0.0351527" calcext:value-type="float">
            <text:p>0.03515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128548" calcext:value-type="float">
            <text:p>0.0128548</text:p>
          </table:table-cell>
          <table:table-cell office:value-type="float" office:value="0.0147473" calcext:value-type="float">
            <text:p>0.0147473</text:p>
          </table:table-cell>
          <table:table-cell office:value-type="float" office:value="0.133008" calcext:value-type="float">
            <text:p>0.133008</text:p>
          </table:table-cell>
          <table:table-cell office:value-type="float" office:value="0.0345597" calcext:value-type="float">
            <text:p>0.034559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131226" calcext:value-type="float">
            <text:p>0.0131226</text:p>
          </table:table-cell>
          <table:table-cell office:value-type="float" office:value="0.0129803" calcext:value-type="float">
            <text:p>0.0129803</text:p>
          </table:table-cell>
          <table:table-cell office:value-type="float" office:value="0.133899" calcext:value-type="float">
            <text:p>0.133899</text:p>
          </table:table-cell>
          <table:table-cell office:value-type="float" office:value="0.0350198" calcext:value-type="float">
            <text:p>0.035019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127977" calcext:value-type="float">
            <text:p>0.0127977</text:p>
          </table:table-cell>
          <table:table-cell office:value-type="float" office:value="0.0140381" calcext:value-type="float">
            <text:p>0.0140381</text:p>
          </table:table-cell>
          <table:table-cell office:value-type="float" office:value="0.133753" calcext:value-type="float">
            <text:p>0.133753</text:p>
          </table:table-cell>
          <table:table-cell office:value-type="float" office:value="0.0349104" calcext:value-type="float">
            <text:p>0.034910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136164" calcext:value-type="float">
            <text:p>0.0136164</text:p>
          </table:table-cell>
          <table:table-cell office:value-type="float" office:value="0.0140451" calcext:value-type="float">
            <text:p>0.0140451</text:p>
          </table:table-cell>
          <table:table-cell office:value-type="float" office:value="0.13694" calcext:value-type="float">
            <text:p>0.13694</text:p>
          </table:table-cell>
          <table:table-cell office:value-type="float" office:value="0.0354563" calcext:value-type="float">
            <text:p>0.035456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128564" calcext:value-type="float">
            <text:p>0.0128564</text:p>
          </table:table-cell>
          <table:table-cell office:value-type="float" office:value="0.0132143" calcext:value-type="float">
            <text:p>0.0132143</text:p>
          </table:table-cell>
          <table:table-cell office:value-type="float" office:value="0.137396" calcext:value-type="float">
            <text:p>0.137396</text:p>
          </table:table-cell>
          <table:table-cell office:value-type="float" office:value="0.0385502" calcext:value-type="float">
            <text:p>0.038550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127683" calcext:value-type="float">
            <text:p>0.0127683</text:p>
          </table:table-cell>
          <table:table-cell office:value-type="float" office:value="0.0123842" calcext:value-type="float">
            <text:p>0.0123842</text:p>
          </table:table-cell>
          <table:table-cell office:value-type="float" office:value="0.137532" calcext:value-type="float">
            <text:p>0.137532</text:p>
          </table:table-cell>
          <table:table-cell office:value-type="float" office:value="0.0355164" calcext:value-type="float">
            <text:p>0.035516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133884" calcext:value-type="float">
            <text:p>0.0133884</text:p>
          </table:table-cell>
          <table:table-cell office:value-type="float" office:value="0.0158413" calcext:value-type="float">
            <text:p>0.0158413</text:p>
          </table:table-cell>
          <table:table-cell office:value-type="float" office:value="0.134281" calcext:value-type="float">
            <text:p>0.134281</text:p>
          </table:table-cell>
          <table:table-cell office:value-type="float" office:value="0.0351963" calcext:value-type="float">
            <text:p>0.035196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134759" calcext:value-type="float">
            <text:p>0.0134759</text:p>
          </table:table-cell>
          <table:table-cell office:value-type="float" office:value="0.0165548" calcext:value-type="float">
            <text:p>0.0165548</text:p>
          </table:table-cell>
          <table:table-cell office:value-type="float" office:value="0.134203" calcext:value-type="float">
            <text:p>0.134203</text:p>
          </table:table-cell>
          <table:table-cell office:value-type="float" office:value="0.0355341" calcext:value-type="float">
            <text:p>0.035534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13807" calcext:value-type="float">
            <text:p>0.013807</text:p>
          </table:table-cell>
          <table:table-cell office:value-type="float" office:value="0.0138926" calcext:value-type="float">
            <text:p>0.0138926</text:p>
          </table:table-cell>
          <table:table-cell office:value-type="float" office:value="0.134149" calcext:value-type="float">
            <text:p>0.134149</text:p>
          </table:table-cell>
          <table:table-cell office:value-type="float" office:value="0.0366073" calcext:value-type="float">
            <text:p>0.036607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135093" calcext:value-type="float">
            <text:p>0.0135093</text:p>
          </table:table-cell>
          <table:table-cell office:value-type="float" office:value="0.0140729" calcext:value-type="float">
            <text:p>0.0140729</text:p>
          </table:table-cell>
          <table:table-cell office:value-type="float" office:value="0.134982" calcext:value-type="float">
            <text:p>0.134982</text:p>
          </table:table-cell>
          <table:table-cell office:value-type="float" office:value="0.0364771" calcext:value-type="float">
            <text:p>0.036477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135422" calcext:value-type="float">
            <text:p>0.0135422</text:p>
          </table:table-cell>
          <table:table-cell office:value-type="float" office:value="0.0134176" calcext:value-type="float">
            <text:p>0.0134176</text:p>
          </table:table-cell>
          <table:table-cell office:value-type="float" office:value="0.134385" calcext:value-type="float">
            <text:p>0.134385</text:p>
          </table:table-cell>
          <table:table-cell office:value-type="float" office:value="0.0361421" calcext:value-type="float">
            <text:p>0.03614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134634" calcext:value-type="float">
            <text:p>0.0134634</text:p>
          </table:table-cell>
          <table:table-cell office:value-type="float" office:value="0.0135321" calcext:value-type="float">
            <text:p>0.0135321</text:p>
          </table:table-cell>
          <table:table-cell office:value-type="float" office:value="0.134527" calcext:value-type="float">
            <text:p>0.134527</text:p>
          </table:table-cell>
          <table:table-cell office:value-type="float" office:value="0.0386937" calcext:value-type="float">
            <text:p>0.038693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133693" calcext:value-type="float">
            <text:p>0.0133693</text:p>
          </table:table-cell>
          <table:table-cell office:value-type="float" office:value="0.0134495" calcext:value-type="float">
            <text:p>0.0134495</text:p>
          </table:table-cell>
          <table:table-cell office:value-type="float" office:value="0.135773" calcext:value-type="float">
            <text:p>0.135773</text:p>
          </table:table-cell>
          <table:table-cell office:value-type="float" office:value="0.0435709" calcext:value-type="float">
            <text:p>0.043570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130753" calcext:value-type="float">
            <text:p>0.0130753</text:p>
          </table:table-cell>
          <table:table-cell office:value-type="float" office:value="0.0171854" calcext:value-type="float">
            <text:p>0.0171854</text:p>
          </table:table-cell>
          <table:table-cell office:value-type="float" office:value="0.134962" calcext:value-type="float">
            <text:p>0.134962</text:p>
          </table:table-cell>
          <table:table-cell office:value-type="float" office:value="0.037138" calcext:value-type="float">
            <text:p>0.03713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131034" calcext:value-type="float">
            <text:p>0.0131034</text:p>
          </table:table-cell>
          <table:table-cell office:value-type="float" office:value="0.0143329" calcext:value-type="float">
            <text:p>0.0143329</text:p>
          </table:table-cell>
          <table:table-cell office:value-type="float" office:value="0.134034" calcext:value-type="float">
            <text:p>0.134034</text:p>
          </table:table-cell>
          <table:table-cell office:value-type="float" office:value="0.0328239" calcext:value-type="float">
            <text:p>0.032823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13439" calcext:value-type="float">
            <text:p>0.013439</text:p>
          </table:table-cell>
          <table:table-cell office:value-type="float" office:value="0.0137448" calcext:value-type="float">
            <text:p>0.0137448</text:p>
          </table:table-cell>
          <table:table-cell office:value-type="float" office:value="0.128032" calcext:value-type="float">
            <text:p>0.128032</text:p>
          </table:table-cell>
          <table:table-cell office:value-type="float" office:value="0.0360877" calcext:value-type="float">
            <text:p>0.036087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125428" calcext:value-type="float">
            <text:p>0.0125428</text:p>
          </table:table-cell>
          <table:table-cell office:value-type="float" office:value="0.0148898" calcext:value-type="float">
            <text:p>0.0148898</text:p>
          </table:table-cell>
          <table:table-cell office:value-type="float" office:value="0.130162" calcext:value-type="float">
            <text:p>0.130162</text:p>
          </table:table-cell>
          <table:table-cell office:value-type="float" office:value="0.0330723" calcext:value-type="float">
            <text:p>0.03307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126283" calcext:value-type="float">
            <text:p>0.0126283</text:p>
          </table:table-cell>
          <table:table-cell office:value-type="float" office:value="0.0135218" calcext:value-type="float">
            <text:p>0.0135218</text:p>
          </table:table-cell>
          <table:table-cell office:value-type="float" office:value="0.129483" calcext:value-type="float">
            <text:p>0.129483</text:p>
          </table:table-cell>
          <table:table-cell office:value-type="float" office:value="0.034341" calcext:value-type="float">
            <text:p>0.03434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123247" calcext:value-type="float">
            <text:p>0.0123247</text:p>
          </table:table-cell>
          <table:table-cell office:value-type="float" office:value="0.0128825" calcext:value-type="float">
            <text:p>0.0128825</text:p>
          </table:table-cell>
          <table:table-cell office:value-type="float" office:value="0.129754" calcext:value-type="float">
            <text:p>0.129754</text:p>
          </table:table-cell>
          <table:table-cell office:value-type="float" office:value="0.037243" calcext:value-type="float">
            <text:p>0.03724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123286" calcext:value-type="float">
            <text:p>0.0123286</text:p>
          </table:table-cell>
          <table:table-cell office:value-type="float" office:value="0.0136399" calcext:value-type="float">
            <text:p>0.0136399</text:p>
          </table:table-cell>
          <table:table-cell office:value-type="float" office:value="0.129604" calcext:value-type="float">
            <text:p>0.129604</text:p>
          </table:table-cell>
          <table:table-cell office:value-type="float" office:value="0.0346771" calcext:value-type="float">
            <text:p>0.034677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123201" calcext:value-type="float">
            <text:p>0.0123201</text:p>
          </table:table-cell>
          <table:table-cell office:value-type="float" office:value="0.0128027" calcext:value-type="float">
            <text:p>0.0128027</text:p>
          </table:table-cell>
          <table:table-cell office:value-type="float" office:value="0.128021" calcext:value-type="float">
            <text:p>0.128021</text:p>
          </table:table-cell>
          <table:table-cell office:value-type="float" office:value="0.0339267" calcext:value-type="float">
            <text:p>0.033926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123955" calcext:value-type="float">
            <text:p>0.0123955</text:p>
          </table:table-cell>
          <table:table-cell office:value-type="float" office:value="0.0132029" calcext:value-type="float">
            <text:p>0.0132029</text:p>
          </table:table-cell>
          <table:table-cell office:value-type="float" office:value="0.129595" calcext:value-type="float">
            <text:p>0.129595</text:p>
          </table:table-cell>
          <table:table-cell office:value-type="float" office:value="0.0358587" calcext:value-type="float">
            <text:p>0.035858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124399" calcext:value-type="float">
            <text:p>0.0124399</text:p>
          </table:table-cell>
          <table:table-cell office:value-type="float" office:value="0.0129509" calcext:value-type="float">
            <text:p>0.0129509</text:p>
          </table:table-cell>
          <table:table-cell office:value-type="float" office:value="0.129441" calcext:value-type="float">
            <text:p>0.129441</text:p>
          </table:table-cell>
          <table:table-cell office:value-type="float" office:value="0.0365895" calcext:value-type="float">
            <text:p>0.036589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124971" calcext:value-type="float">
            <text:p>0.0124971</text:p>
          </table:table-cell>
          <table:table-cell office:value-type="float" office:value="0.0129021" calcext:value-type="float">
            <text:p>0.0129021</text:p>
          </table:table-cell>
          <table:table-cell office:value-type="float" office:value="0.129066" calcext:value-type="float">
            <text:p>0.129066</text:p>
          </table:table-cell>
          <table:table-cell office:value-type="float" office:value="0.0362791" calcext:value-type="float">
            <text:p>0.036279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124805" calcext:value-type="float">
            <text:p>0.0124805</text:p>
          </table:table-cell>
          <table:table-cell office:value-type="float" office:value="0.0133667" calcext:value-type="float">
            <text:p>0.0133667</text:p>
          </table:table-cell>
          <table:table-cell office:value-type="float" office:value="0.134554" calcext:value-type="float">
            <text:p>0.134554</text:p>
          </table:table-cell>
          <table:table-cell office:value-type="float" office:value="0.0356854" calcext:value-type="float">
            <text:p>0.035685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131515" calcext:value-type="float">
            <text:p>0.0131515</text:p>
          </table:table-cell>
          <table:table-cell office:value-type="float" office:value="0.0143276" calcext:value-type="float">
            <text:p>0.0143276</text:p>
          </table:table-cell>
          <table:table-cell office:value-type="float" office:value="0.136037" calcext:value-type="float">
            <text:p>0.136037</text:p>
          </table:table-cell>
          <table:table-cell office:value-type="float" office:value="0.0364183" calcext:value-type="float">
            <text:p>0.036418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126548" calcext:value-type="float">
            <text:p>0.0126548</text:p>
          </table:table-cell>
          <table:table-cell office:value-type="float" office:value="0.0132607" calcext:value-type="float">
            <text:p>0.0132607</text:p>
          </table:table-cell>
          <table:table-cell office:value-type="float" office:value="0.133216" calcext:value-type="float">
            <text:p>0.133216</text:p>
          </table:table-cell>
          <table:table-cell office:value-type="float" office:value="0.035788" calcext:value-type="float">
            <text:p>0.03578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124906" calcext:value-type="float">
            <text:p>0.0124906</text:p>
          </table:table-cell>
          <table:table-cell office:value-type="float" office:value="0.0140652" calcext:value-type="float">
            <text:p>0.0140652</text:p>
          </table:table-cell>
          <table:table-cell office:value-type="float" office:value="0.133289" calcext:value-type="float">
            <text:p>0.133289</text:p>
          </table:table-cell>
          <table:table-cell office:value-type="float" office:value="0.0364422" calcext:value-type="float">
            <text:p>0.036442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125646" calcext:value-type="float">
            <text:p>0.0125646</text:p>
          </table:table-cell>
          <table:table-cell office:value-type="float" office:value="0.0135567" calcext:value-type="float">
            <text:p>0.0135567</text:p>
          </table:table-cell>
          <table:table-cell office:value-type="float" office:value="0.133912" calcext:value-type="float">
            <text:p>0.133912</text:p>
          </table:table-cell>
          <table:table-cell office:value-type="float" office:value="0.0362092" calcext:value-type="float">
            <text:p>0.036209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140407" calcext:value-type="float">
            <text:p>0.0140407</text:p>
          </table:table-cell>
          <table:table-cell office:value-type="float" office:value="0.0141742" calcext:value-type="float">
            <text:p>0.0141742</text:p>
          </table:table-cell>
          <table:table-cell office:value-type="float" office:value="0.133931" calcext:value-type="float">
            <text:p>0.133931</text:p>
          </table:table-cell>
          <table:table-cell office:value-type="float" office:value="0.0374786" calcext:value-type="float">
            <text:p>0.037478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30717" calcext:value-type="float">
            <text:p>0.0130717</text:p>
          </table:table-cell>
          <table:table-cell office:value-type="float" office:value="0.0161608" calcext:value-type="float">
            <text:p>0.0161608</text:p>
          </table:table-cell>
          <table:table-cell office:value-type="float" office:value="0.13378" calcext:value-type="float">
            <text:p>0.13378</text:p>
          </table:table-cell>
          <table:table-cell office:value-type="float" office:value="0.032719" calcext:value-type="float">
            <text:p>0.03271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2499" calcext:value-type="float">
            <text:p>0.012499</text:p>
          </table:table-cell>
          <table:table-cell office:value-type="float" office:value="0.0140508" calcext:value-type="float">
            <text:p>0.0140508</text:p>
          </table:table-cell>
          <table:table-cell office:value-type="float" office:value="0.138488" calcext:value-type="float">
            <text:p>0.138488</text:p>
          </table:table-cell>
          <table:table-cell office:value-type="float" office:value="0.0341899" calcext:value-type="float">
            <text:p>0.034189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125796" calcext:value-type="float">
            <text:p>0.0125796</text:p>
          </table:table-cell>
          <table:table-cell office:value-type="float" office:value="0.0198355" calcext:value-type="float">
            <text:p>0.0198355</text:p>
          </table:table-cell>
          <table:table-cell office:value-type="float" office:value="0.132759" calcext:value-type="float">
            <text:p>0.132759</text:p>
          </table:table-cell>
          <table:table-cell office:value-type="float" office:value="0.0339324" calcext:value-type="float">
            <text:p>0.03393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123615" calcext:value-type="float">
            <text:p>0.0123615</text:p>
          </table:table-cell>
          <table:table-cell office:value-type="float" office:value="0.0155864" calcext:value-type="float">
            <text:p>0.0155864</text:p>
          </table:table-cell>
          <table:table-cell office:value-type="float" office:value="0.126933" calcext:value-type="float">
            <text:p>0.126933</text:p>
          </table:table-cell>
          <table:table-cell office:value-type="float" office:value="0.036207" calcext:value-type="float">
            <text:p>0.03620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12651" calcext:value-type="float">
            <text:p>0.012651</text:p>
          </table:table-cell>
          <table:table-cell office:value-type="float" office:value="0.0144756" calcext:value-type="float">
            <text:p>0.0144756</text:p>
          </table:table-cell>
          <table:table-cell office:value-type="float" office:value="0.129632" calcext:value-type="float">
            <text:p>0.129632</text:p>
          </table:table-cell>
          <table:table-cell office:value-type="float" office:value="0.0352446" calcext:value-type="float">
            <text:p>0.035244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134845" calcext:value-type="float">
            <text:p>0.0134845</text:p>
          </table:table-cell>
          <table:table-cell office:value-type="float" office:value="0.0142061" calcext:value-type="float">
            <text:p>0.0142061</text:p>
          </table:table-cell>
          <table:table-cell office:value-type="float" office:value="0.13227" calcext:value-type="float">
            <text:p>0.13227</text:p>
          </table:table-cell>
          <table:table-cell office:value-type="float" office:value="0.0358524" calcext:value-type="float">
            <text:p>0.035852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127022" calcext:value-type="float">
            <text:p>0.0127022</text:p>
          </table:table-cell>
          <table:table-cell office:value-type="float" office:value="0.0135236" calcext:value-type="float">
            <text:p>0.0135236</text:p>
          </table:table-cell>
          <table:table-cell office:value-type="float" office:value="0.134212" calcext:value-type="float">
            <text:p>0.134212</text:p>
          </table:table-cell>
          <table:table-cell office:value-type="float" office:value="0.0345214" calcext:value-type="float">
            <text:p>0.03452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23719" calcext:value-type="float">
            <text:p>0.0123719</text:p>
          </table:table-cell>
          <table:table-cell office:value-type="float" office:value="0.0162845" calcext:value-type="float">
            <text:p>0.0162845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0357818" calcext:value-type="float">
            <text:p>0.03578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124868" calcext:value-type="float">
            <text:p>0.0124868</text:p>
          </table:table-cell>
          <table:table-cell office:value-type="float" office:value="0.0150024" calcext:value-type="float">
            <text:p>0.0150024</text:p>
          </table:table-cell>
          <table:table-cell office:value-type="float" office:value="0.133167" calcext:value-type="float">
            <text:p>0.133167</text:p>
          </table:table-cell>
          <table:table-cell office:value-type="float" office:value="0.0358762" calcext:value-type="float">
            <text:p>0.035876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128452" calcext:value-type="float">
            <text:p>0.0128452</text:p>
          </table:table-cell>
          <table:table-cell office:value-type="float" office:value="0.0142843" calcext:value-type="float">
            <text:p>0.0142843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0348297" calcext:value-type="float">
            <text:p>0.03482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22687" calcext:value-type="float">
            <text:p>0.0122687</text:p>
          </table:table-cell>
          <table:table-cell office:value-type="float" office:value="0.0131562" calcext:value-type="float">
            <text:p>0.0131562</text:p>
          </table:table-cell>
          <table:table-cell office:value-type="float" office:value="0.127579" calcext:value-type="float">
            <text:p>0.127579</text:p>
          </table:table-cell>
          <table:table-cell office:value-type="float" office:value="0.0343786" calcext:value-type="float">
            <text:p>0.034378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124371" calcext:value-type="float">
            <text:p>0.0124371</text:p>
          </table:table-cell>
          <table:table-cell office:value-type="float" office:value="0.0155098" calcext:value-type="float">
            <text:p>0.0155098</text:p>
          </table:table-cell>
          <table:table-cell office:value-type="float" office:value="0.128119" calcext:value-type="float">
            <text:p>0.128119</text:p>
          </table:table-cell>
          <table:table-cell office:value-type="float" office:value="0.0346135" calcext:value-type="float">
            <text:p>0.034613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28328" calcext:value-type="float">
            <text:p>0.0128328</text:p>
          </table:table-cell>
          <table:table-cell office:value-type="float" office:value="0.0143698" calcext:value-type="float">
            <text:p>0.0143698</text:p>
          </table:table-cell>
          <table:table-cell office:value-type="float" office:value="0.128312" calcext:value-type="float">
            <text:p>0.128312</text:p>
          </table:table-cell>
          <table:table-cell office:value-type="float" office:value="0.0349063" calcext:value-type="float">
            <text:p>0.034906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134165" calcext:value-type="float">
            <text:p>0.0134165</text:p>
          </table:table-cell>
          <table:table-cell office:value-type="float" office:value="0.0140502" calcext:value-type="float">
            <text:p>0.0140502</text:p>
          </table:table-cell>
          <table:table-cell office:value-type="float" office:value="0.127847" calcext:value-type="float">
            <text:p>0.127847</text:p>
          </table:table-cell>
          <table:table-cell office:value-type="float" office:value="0.0346797" calcext:value-type="float">
            <text:p>0.034679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122959" calcext:value-type="float">
            <text:p>0.0122959</text:p>
          </table:table-cell>
          <table:table-cell office:value-type="float" office:value="0.0136742" calcext:value-type="float">
            <text:p>0.0136742</text:p>
          </table:table-cell>
          <table:table-cell office:value-type="float" office:value="0.12792" calcext:value-type="float">
            <text:p>0.12792</text:p>
          </table:table-cell>
          <table:table-cell office:value-type="float" office:value="0.0360246" calcext:value-type="float">
            <text:p>0.036024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123483" calcext:value-type="float">
            <text:p>0.0123483</text:p>
          </table:table-cell>
          <table:table-cell office:value-type="float" office:value="0.0150893" calcext:value-type="float">
            <text:p>0.0150893</text:p>
          </table:table-cell>
          <table:table-cell office:value-type="float" office:value="0.127408" calcext:value-type="float">
            <text:p>0.127408</text:p>
          </table:table-cell>
          <table:table-cell office:value-type="float" office:value="0.0354985" calcext:value-type="float">
            <text:p>0.03549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136791" calcext:value-type="float">
            <text:p>0.0136791</text:p>
          </table:table-cell>
          <table:table-cell office:value-type="float" office:value="0.0141217" calcext:value-type="float">
            <text:p>0.0141217</text:p>
          </table:table-cell>
          <table:table-cell office:value-type="float" office:value="0.128451" calcext:value-type="float">
            <text:p>0.128451</text:p>
          </table:table-cell>
          <table:table-cell office:value-type="float" office:value="0.0387124" calcext:value-type="float">
            <text:p>0.038712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136634" calcext:value-type="float">
            <text:p>0.0136634</text:p>
          </table:table-cell>
          <table:table-cell office:value-type="float" office:value="0.0133764" calcext:value-type="float">
            <text:p>0.0133764</text:p>
          </table:table-cell>
          <table:table-cell office:value-type="float" office:value="0.130865" calcext:value-type="float">
            <text:p>0.130865</text:p>
          </table:table-cell>
          <table:table-cell office:value-type="float" office:value="0.0351947" calcext:value-type="float">
            <text:p>0.035194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125025" calcext:value-type="float">
            <text:p>0.0125025</text:p>
          </table:table-cell>
          <table:table-cell office:value-type="float" office:value="0.0131301" calcext:value-type="float">
            <text:p>0.0131301</text:p>
          </table:table-cell>
          <table:table-cell office:value-type="float" office:value="0.128639" calcext:value-type="float">
            <text:p>0.128639</text:p>
          </table:table-cell>
          <table:table-cell office:value-type="float" office:value="0.0340609" calcext:value-type="float">
            <text:p>0.034060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12369" calcext:value-type="float">
            <text:p>0.012369</text:p>
          </table:table-cell>
          <table:table-cell office:value-type="float" office:value="0.0134201" calcext:value-type="float">
            <text:p>0.0134201</text:p>
          </table:table-cell>
          <table:table-cell office:value-type="float" office:value="0.127444" calcext:value-type="float">
            <text:p>0.127444</text:p>
          </table:table-cell>
          <table:table-cell office:value-type="float" office:value="0.0354247" calcext:value-type="float">
            <text:p>0.03542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153652" calcext:value-type="float">
            <text:p>0.0153652</text:p>
          </table:table-cell>
          <table:table-cell office:value-type="float" office:value="0.127716" calcext:value-type="float">
            <text:p>0.127716</text:p>
          </table:table-cell>
          <table:table-cell office:value-type="float" office:value="0.0352146" calcext:value-type="float">
            <text:p>0.035214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41044" calcext:value-type="float">
            <text:p>0.0141044</text:p>
          </table:table-cell>
          <table:table-cell office:value-type="float" office:value="0.0144265" calcext:value-type="float">
            <text:p>0.0144265</text:p>
          </table:table-cell>
          <table:table-cell office:value-type="float" office:value="0.129237" calcext:value-type="float">
            <text:p>0.129237</text:p>
          </table:table-cell>
          <table:table-cell office:value-type="float" office:value="0.0349624" calcext:value-type="float">
            <text:p>0.034962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32419" calcext:value-type="float">
            <text:p>0.0132419</text:p>
          </table:table-cell>
          <table:table-cell office:value-type="float" office:value="0.0156326" calcext:value-type="float">
            <text:p>0.0156326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360996" calcext:value-type="float">
            <text:p>0.036099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23172" calcext:value-type="float">
            <text:p>0.0123172</text:p>
          </table:table-cell>
          <table:table-cell office:value-type="float" office:value="0.0137006" calcext:value-type="float">
            <text:p>0.0137006</text:p>
          </table:table-cell>
          <table:table-cell office:value-type="float" office:value="0.127933" calcext:value-type="float">
            <text:p>0.127933</text:p>
          </table:table-cell>
          <table:table-cell office:value-type="float" office:value="0.0365232" calcext:value-type="float">
            <text:p>0.036523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29298" calcext:value-type="float">
            <text:p>0.0129298</text:p>
          </table:table-cell>
          <table:table-cell office:value-type="float" office:value="0.0134616" calcext:value-type="float">
            <text:p>0.0134616</text:p>
          </table:table-cell>
          <table:table-cell office:value-type="float" office:value="0.127757" calcext:value-type="float">
            <text:p>0.127757</text:p>
          </table:table-cell>
          <table:table-cell office:value-type="float" office:value="0.0350483" calcext:value-type="float">
            <text:p>0.035048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24739" calcext:value-type="float">
            <text:p>0.0124739</text:p>
          </table:table-cell>
          <table:table-cell office:value-type="float" office:value="0.0142248" calcext:value-type="float">
            <text:p>0.0142248</text:p>
          </table:table-cell>
          <table:table-cell office:value-type="float" office:value="0.131784" calcext:value-type="float">
            <text:p>0.131784</text:p>
          </table:table-cell>
          <table:table-cell office:value-type="float" office:value="0.0372032" calcext:value-type="float">
            <text:p>0.037203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25984" calcext:value-type="float">
            <text:p>0.0125984</text:p>
          </table:table-cell>
          <table:table-cell office:value-type="float" office:value="0.0127943" calcext:value-type="float">
            <text:p>0.0127943</text:p>
          </table:table-cell>
          <table:table-cell office:value-type="float" office:value="0.132414" calcext:value-type="float">
            <text:p>0.132414</text:p>
          </table:table-cell>
          <table:table-cell office:value-type="float" office:value="0.0396221" calcext:value-type="float">
            <text:p>0.039622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24121" calcext:value-type="float">
            <text:p>0.0124121</text:p>
          </table:table-cell>
          <table:table-cell office:value-type="float" office:value="0.0141426" calcext:value-type="float">
            <text:p>0.0141426</text:p>
          </table:table-cell>
          <table:table-cell office:value-type="float" office:value="0.130721" calcext:value-type="float">
            <text:p>0.130721</text:p>
          </table:table-cell>
          <table:table-cell office:value-type="float" office:value="0.0361038" calcext:value-type="float">
            <text:p>0.036103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130343" calcext:value-type="float">
            <text:p>0.0130343</text:p>
          </table:table-cell>
          <table:table-cell office:value-type="float" office:value="0.0137595" calcext:value-type="float">
            <text:p>0.0137595</text:p>
          </table:table-cell>
          <table:table-cell office:value-type="float" office:value="0.133102" calcext:value-type="float">
            <text:p>0.133102</text:p>
          </table:table-cell>
          <table:table-cell office:value-type="float" office:value="0.035815" calcext:value-type="float">
            <text:p>0.0358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31421" calcext:value-type="float">
            <text:p>0.0131421</text:p>
          </table:table-cell>
          <table:table-cell office:value-type="float" office:value="0.0139409" calcext:value-type="float">
            <text:p>0.0139409</text:p>
          </table:table-cell>
          <table:table-cell office:value-type="float" office:value="0.135051" calcext:value-type="float">
            <text:p>0.135051</text:p>
          </table:table-cell>
          <table:table-cell office:value-type="float" office:value="0.0347249" calcext:value-type="float">
            <text:p>0.0347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0T22:40:13.792781800</meta:creation-date>
    <meta:generator>LibreOffice/25.8.6.2$Windows_X86_64 LibreOffice_project/b4b39682cd9868fa725bc664aff94278d315bd04</meta:generator>
    <dc:date>2026-05-20T22:48:13.196234600</dc:date>
    <meta:editing-duration>PT7M58S</meta:editing-duration>
    <meta:editing-cycles>4</meta:editing-cycles>
    <meta:document-statistic meta:table-count="1" meta:cell-count="250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796cm" svg:y="0.315cm" chart:style-name="ch2">
          <text:p>Performance of different implementations over time at 1000 boids</text:p>
        </chart:title>
        <chart:legend chart:legend-position="end" svg:x="10.916cm" svg:y="3.24cm" style:legend-expansion="high" chart:style-name="ch3"/>
        <chart:plot-area chart:style-name="ch4" svg:x="1.321cm" svg:y="1.83cm" svg:width="9.275cm" svg:height="6.019cm">
          <chart:coordinate-region svg:x="2.272cm" svg:y="2.032cm" svg:width="8.324cm" svg:height="4.858cm"/>
          <chart:axis chart:dimension="x" chart:name="primary-x" chart:style-name="ch5" chartooo:axis-type="auto">
            <chartooo:date-scale/>
            <chart:title svg:x="4.86cm" svg:y="8.029cm" chart:style-name="ch2">
              <text:p><text:span text:style-name="T1">Frame number</text:span></text:p>
            </chart:title>
            <chart:categories table:cell-range-address="Sheet1.A2:Sheet1.A501"/>
          </chart:axis>
          <chart:axis chart:dimension="y" chart:name="primary-y" chart:style-name="ch5">
            <chart:title svg:x="0.451cm" svg:y="6.308cm" chart:style-name="ch6">
              <text:p><text:span text:style-name="T1">Deltatime (seconds)</text:span></text:p>
            </chart:title>
            <chart:grid chart:style-name="ch7" chart:class="major"/>
          </chart:axis>
          <chart:series chart:style-name="ch8" chart:values-cell-range-address="Sheet1.B2:Sheet1.B501" chart:label-cell-address="Sheet1.B1:Sheet1.B1" chart:class="chart:line">
            <chart:data-point chart:repeated="500"/>
          </chart:series>
          <chart:series chart:style-name="ch9" chart:values-cell-range-address="Sheet1.C2:Sheet1.C501" chart:label-cell-address="Sheet1.C1:Sheet1.C1" chart:class="chart:line">
            <chart:data-point chart:repeated="500"/>
          </chart:series>
          <chart:series chart:style-name="ch10" chart:values-cell-range-address="Sheet1.D2:Sheet1.D501" chart:label-cell-address="Sheet1.D1:Sheet1.D1" chart:class="chart:line">
            <chart:data-point chart:repeated="500"/>
          </chart:series>
          <chart:series chart:style-name="ch11" chart:values-cell-range-address="Sheet1.E2:Sheet1.E501" chart:label-cell-address="Sheet1.E1:Sheet1.E1" chart:class="chart:line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B1:Sheet1.B1</svg:desc>
                </draw:g>
              </table:table-cell>
              <table:table-cell office:value-type="string">
                <text:p>Compute</text:p>
                <draw:g>
                  <svg:desc>Sheet1.C1:Sheet1.C1</svg:desc>
                </draw:g>
              </table:table-cell>
              <table:table-cell office:value-type="string">
                <text:p>Iterative</text:p>
                <draw:g>
                  <svg:desc>Sheet1.D1:Sheet1.D1</svg:desc>
                </draw:g>
              </table:table-cell>
              <table:table-cell office:value-type="string">
                <text:p>Iterative with sectioning (Depth 3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501</svg:desc>
                </draw:g>
              </table:table-cell>
              <table:table-cell office:value-type="float" office:value="0.044343">
                <text:p>0.044343</text:p>
                <draw:g>
                  <svg:desc>Sheet1.B2:Sheet1.B501</svg:desc>
                </draw:g>
              </table:table-cell>
              <table:table-cell office:value-type="float" office:value="0.0499045">
                <text:p>0.0499045</text:p>
                <draw:g>
                  <svg:desc>Sheet1.C2:Sheet1.C501</svg:desc>
                </draw:g>
              </table:table-cell>
              <table:table-cell office:value-type="float" office:value="0.181339">
                <text:p>0.181339</text:p>
                <draw:g>
                  <svg:desc>Sheet1.D2:Sheet1.D501</svg:desc>
                </draw:g>
              </table:table-cell>
              <table:table-cell office:value-type="float" office:value="0.0718664">
                <text:p>0.0718664</text:p>
                <draw:g>
                  <svg:desc>Sheet1.E2:Sheet1.E5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4847">
                <text:p>0.014847</text:p>
              </table:table-cell>
              <table:table-cell office:value-type="float" office:value="0.0191642">
                <text:p>0.0191642</text:p>
              </table:table-cell>
              <table:table-cell office:value-type="float" office:value="0.143422">
                <text:p>0.143422</text:p>
              </table:table-cell>
              <table:table-cell office:value-type="float" office:value="0.0335079">
                <text:p>0.03350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29295">
                <text:p>0.0129295</text:p>
              </table:table-cell>
              <table:table-cell office:value-type="float" office:value="0.0176971">
                <text:p>0.0176971</text:p>
              </table:table-cell>
              <table:table-cell office:value-type="float" office:value="0.138638">
                <text:p>0.138638</text:p>
              </table:table-cell>
              <table:table-cell office:value-type="float" office:value="0.0344416">
                <text:p>0.03444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40218">
                <text:p>0.0140218</text:p>
              </table:table-cell>
              <table:table-cell office:value-type="float" office:value="0.0135229">
                <text:p>0.0135229</text:p>
              </table:table-cell>
              <table:table-cell office:value-type="float" office:value="0.141046">
                <text:p>0.141046</text:p>
              </table:table-cell>
              <table:table-cell office:value-type="float" office:value="0.0339939">
                <text:p>0.03399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29377">
                <text:p>0.0129377</text:p>
              </table:table-cell>
              <table:table-cell office:value-type="float" office:value="0.0140455">
                <text:p>0.0140455</text:p>
              </table:table-cell>
              <table:table-cell office:value-type="float" office:value="0.137933">
                <text:p>0.137933</text:p>
              </table:table-cell>
              <table:table-cell office:value-type="float" office:value="0.0342012">
                <text:p>0.03420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26736">
                <text:p>0.0126736</text:p>
              </table:table-cell>
              <table:table-cell office:value-type="float" office:value="0.0136923">
                <text:p>0.0136923</text:p>
              </table:table-cell>
              <table:table-cell office:value-type="float" office:value="0.136933">
                <text:p>0.136933</text:p>
              </table:table-cell>
              <table:table-cell office:value-type="float" office:value="0.034461">
                <text:p>0.0344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25821">
                <text:p>0.0125821</text:p>
              </table:table-cell>
              <table:table-cell office:value-type="float" office:value="0.0137138">
                <text:p>0.0137138</text:p>
              </table:table-cell>
              <table:table-cell office:value-type="float" office:value="0.131402">
                <text:p>0.131402</text:p>
              </table:table-cell>
              <table:table-cell office:value-type="float" office:value="0.0360686">
                <text:p>0.03606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26218">
                <text:p>0.0126218</text:p>
              </table:table-cell>
              <table:table-cell office:value-type="float" office:value="0.0174065">
                <text:p>0.0174065</text:p>
              </table:table-cell>
              <table:table-cell office:value-type="float" office:value="0.135093">
                <text:p>0.135093</text:p>
              </table:table-cell>
              <table:table-cell office:value-type="float" office:value="0.0344104">
                <text:p>0.03441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30131">
                <text:p>0.0130131</text:p>
              </table:table-cell>
              <table:table-cell office:value-type="float" office:value="0.0139205">
                <text:p>0.0139205</text:p>
              </table:table-cell>
              <table:table-cell office:value-type="float" office:value="0.136429">
                <text:p>0.136429</text:p>
              </table:table-cell>
              <table:table-cell office:value-type="float" office:value="0.0343726">
                <text:p>0.03437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35457">
                <text:p>0.0135457</text:p>
              </table:table-cell>
              <table:table-cell office:value-type="float" office:value="0.0141869">
                <text:p>0.0141869</text:p>
              </table:table-cell>
              <table:table-cell office:value-type="float" office:value="0.140266">
                <text:p>0.140266</text:p>
              </table:table-cell>
              <table:table-cell office:value-type="float" office:value="0.0344366">
                <text:p>0.03443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26628">
                <text:p>0.0126628</text:p>
              </table:table-cell>
              <table:table-cell office:value-type="float" office:value="0.013034">
                <text:p>0.013034</text:p>
              </table:table-cell>
              <table:table-cell office:value-type="float" office:value="0.14572">
                <text:p>0.14572</text:p>
              </table:table-cell>
              <table:table-cell office:value-type="float" office:value="0.0357969">
                <text:p>0.03579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23898">
                <text:p>0.0123898</text:p>
              </table:table-cell>
              <table:table-cell office:value-type="float" office:value="0.0140482">
                <text:p>0.0140482</text:p>
              </table:table-cell>
              <table:table-cell office:value-type="float" office:value="0.152434">
                <text:p>0.152434</text:p>
              </table:table-cell>
              <table:table-cell office:value-type="float" office:value="0.0351571">
                <text:p>0.03515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25358">
                <text:p>0.0125358</text:p>
              </table:table-cell>
              <table:table-cell office:value-type="float" office:value="0.01476">
                <text:p>0.01476</text:p>
              </table:table-cell>
              <table:table-cell office:value-type="float" office:value="0.139865">
                <text:p>0.139865</text:p>
              </table:table-cell>
              <table:table-cell office:value-type="float" office:value="0.0343952">
                <text:p>0.03439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25983">
                <text:p>0.0125983</text:p>
              </table:table-cell>
              <table:table-cell office:value-type="float" office:value="0.0133174">
                <text:p>0.0133174</text:p>
              </table:table-cell>
              <table:table-cell office:value-type="float" office:value="0.139639">
                <text:p>0.139639</text:p>
              </table:table-cell>
              <table:table-cell office:value-type="float" office:value="0.0344335">
                <text:p>0.03443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53314">
                <text:p>0.0153314</text:p>
              </table:table-cell>
              <table:table-cell office:value-type="float" office:value="0.0147209">
                <text:p>0.0147209</text:p>
              </table:table-cell>
              <table:table-cell office:value-type="float" office:value="0.140146">
                <text:p>0.140146</text:p>
              </table:table-cell>
              <table:table-cell office:value-type="float" office:value="0.0363799">
                <text:p>0.03637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36971">
                <text:p>0.0136971</text:p>
              </table:table-cell>
              <table:table-cell office:value-type="float" office:value="0.0131668">
                <text:p>0.0131668</text:p>
              </table:table-cell>
              <table:table-cell office:value-type="float" office:value="0.138371">
                <text:p>0.138371</text:p>
              </table:table-cell>
              <table:table-cell office:value-type="float" office:value="0.0333271">
                <text:p>0.03332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25977">
                <text:p>0.0125977</text:p>
              </table:table-cell>
              <table:table-cell office:value-type="float" office:value="0.015973">
                <text:p>0.015973</text:p>
              </table:table-cell>
              <table:table-cell office:value-type="float" office:value="0.137858">
                <text:p>0.137858</text:p>
              </table:table-cell>
              <table:table-cell office:value-type="float" office:value="0.0356706">
                <text:p>0.03567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23549">
                <text:p>0.0123549</text:p>
              </table:table-cell>
              <table:table-cell office:value-type="float" office:value="0.0145395">
                <text:p>0.0145395</text:p>
              </table:table-cell>
              <table:table-cell office:value-type="float" office:value="0.134372">
                <text:p>0.134372</text:p>
              </table:table-cell>
              <table:table-cell office:value-type="float" office:value="0.0359087">
                <text:p>0.03590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22018">
                <text:p>0.0122018</text:p>
              </table:table-cell>
              <table:table-cell office:value-type="float" office:value="0.0136144">
                <text:p>0.0136144</text:p>
              </table:table-cell>
              <table:table-cell office:value-type="float" office:value="0.136341">
                <text:p>0.136341</text:p>
              </table:table-cell>
              <table:table-cell office:value-type="float" office:value="0.0355728">
                <text:p>0.03557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24857">
                <text:p>0.0124857</text:p>
              </table:table-cell>
              <table:table-cell office:value-type="float" office:value="0.0148176">
                <text:p>0.0148176</text:p>
              </table:table-cell>
              <table:table-cell office:value-type="float" office:value="0.135749">
                <text:p>0.135749</text:p>
              </table:table-cell>
              <table:table-cell office:value-type="float" office:value="0.0350228">
                <text:p>0.03502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24754">
                <text:p>0.0124754</text:p>
              </table:table-cell>
              <table:table-cell office:value-type="float" office:value="0.0131862">
                <text:p>0.0131862</text:p>
              </table:table-cell>
              <table:table-cell office:value-type="float" office:value="0.138336">
                <text:p>0.138336</text:p>
              </table:table-cell>
              <table:table-cell office:value-type="float" office:value="0.0357161">
                <text:p>0.03571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29503">
                <text:p>0.0129503</text:p>
              </table:table-cell>
              <table:table-cell office:value-type="float" office:value="0.0145131">
                <text:p>0.0145131</text:p>
              </table:table-cell>
              <table:table-cell office:value-type="float" office:value="0.136742">
                <text:p>0.136742</text:p>
              </table:table-cell>
              <table:table-cell office:value-type="float" office:value="0.0357066">
                <text:p>0.03570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25879">
                <text:p>0.0125879</text:p>
              </table:table-cell>
              <table:table-cell office:value-type="float" office:value="0.0134083">
                <text:p>0.0134083</text:p>
              </table:table-cell>
              <table:table-cell office:value-type="float" office:value="0.138799">
                <text:p>0.138799</text:p>
              </table:table-cell>
              <table:table-cell office:value-type="float" office:value="0.0353577">
                <text:p>0.035357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25867">
                <text:p>0.0125867</text:p>
              </table:table-cell>
              <table:table-cell office:value-type="float" office:value="0.0133836">
                <text:p>0.0133836</text:p>
              </table:table-cell>
              <table:table-cell office:value-type="float" office:value="0.138098">
                <text:p>0.138098</text:p>
              </table:table-cell>
              <table:table-cell office:value-type="float" office:value="0.0357064">
                <text:p>0.035706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408">
                <text:p>0.01408</text:p>
              </table:table-cell>
              <table:table-cell office:value-type="float" office:value="0.0140743">
                <text:p>0.0140743</text:p>
              </table:table-cell>
              <table:table-cell office:value-type="float" office:value="0.139776">
                <text:p>0.139776</text:p>
              </table:table-cell>
              <table:table-cell office:value-type="float" office:value="0.0363587">
                <text:p>0.036358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35568">
                <text:p>0.0135568</text:p>
              </table:table-cell>
              <table:table-cell office:value-type="float" office:value="0.016208">
                <text:p>0.016208</text:p>
              </table:table-cell>
              <table:table-cell office:value-type="float" office:value="0.140534">
                <text:p>0.140534</text:p>
              </table:table-cell>
              <table:table-cell office:value-type="float" office:value="0.0362473">
                <text:p>0.03624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3657">
                <text:p>0.013657</text:p>
              </table:table-cell>
              <table:table-cell office:value-type="float" office:value="0.0146332">
                <text:p>0.0146332</text:p>
              </table:table-cell>
              <table:table-cell office:value-type="float" office:value="0.140737">
                <text:p>0.140737</text:p>
              </table:table-cell>
              <table:table-cell office:value-type="float" office:value="0.0361517">
                <text:p>0.036151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2702">
                <text:p>0.012702</text:p>
              </table:table-cell>
              <table:table-cell office:value-type="float" office:value="0.0143415">
                <text:p>0.0143415</text:p>
              </table:table-cell>
              <table:table-cell office:value-type="float" office:value="0.139761">
                <text:p>0.139761</text:p>
              </table:table-cell>
              <table:table-cell office:value-type="float" office:value="0.0356649">
                <text:p>0.035664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123319">
                <text:p>0.0123319</text:p>
              </table:table-cell>
              <table:table-cell office:value-type="float" office:value="0.0150789">
                <text:p>0.0150789</text:p>
              </table:table-cell>
              <table:table-cell office:value-type="float" office:value="0.138146">
                <text:p>0.138146</text:p>
              </table:table-cell>
              <table:table-cell office:value-type="float" office:value="0.0359958">
                <text:p>0.035995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123776">
                <text:p>0.0123776</text:p>
              </table:table-cell>
              <table:table-cell office:value-type="float" office:value="0.0136262">
                <text:p>0.0136262</text:p>
              </table:table-cell>
              <table:table-cell office:value-type="float" office:value="0.191932">
                <text:p>0.191932</text:p>
              </table:table-cell>
              <table:table-cell office:value-type="float" office:value="0.0362538">
                <text:p>0.03625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247">
                <text:p>0.01247</text:p>
              </table:table-cell>
              <table:table-cell office:value-type="float" office:value="0.014902">
                <text:p>0.014902</text:p>
              </table:table-cell>
              <table:table-cell office:value-type="float" office:value="0.175797">
                <text:p>0.175797</text:p>
              </table:table-cell>
              <table:table-cell office:value-type="float" office:value="0.0361717">
                <text:p>0.03617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27864">
                <text:p>0.0127864</text:p>
              </table:table-cell>
              <table:table-cell office:value-type="float" office:value="0.0132708">
                <text:p>0.0132708</text:p>
              </table:table-cell>
              <table:table-cell office:value-type="float" office:value="0.139445">
                <text:p>0.139445</text:p>
              </table:table-cell>
              <table:table-cell office:value-type="float" office:value="0.0366797">
                <text:p>0.03667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26878">
                <text:p>0.0126878</text:p>
              </table:table-cell>
              <table:table-cell office:value-type="float" office:value="0.0149422">
                <text:p>0.0149422</text:p>
              </table:table-cell>
              <table:table-cell office:value-type="float" office:value="0.132084">
                <text:p>0.132084</text:p>
              </table:table-cell>
              <table:table-cell office:value-type="float" office:value="0.0363694">
                <text:p>0.036369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125688">
                <text:p>0.0125688</text:p>
              </table:table-cell>
              <table:table-cell office:value-type="float" office:value="0.0150518">
                <text:p>0.0150518</text:p>
              </table:table-cell>
              <table:table-cell office:value-type="float" office:value="0.133191">
                <text:p>0.133191</text:p>
              </table:table-cell>
              <table:table-cell office:value-type="float" office:value="0.040522">
                <text:p>0.04052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26763">
                <text:p>0.0126763</text:p>
              </table:table-cell>
              <table:table-cell office:value-type="float" office:value="0.0137187">
                <text:p>0.0137187</text:p>
              </table:table-cell>
              <table:table-cell office:value-type="float" office:value="0.131923">
                <text:p>0.131923</text:p>
              </table:table-cell>
              <table:table-cell office:value-type="float" office:value="0.0381785">
                <text:p>0.038178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26176">
                <text:p>0.0126176</text:p>
              </table:table-cell>
              <table:table-cell office:value-type="float" office:value="0.0127735">
                <text:p>0.0127735</text:p>
              </table:table-cell>
              <table:table-cell office:value-type="float" office:value="0.134035">
                <text:p>0.134035</text:p>
              </table:table-cell>
              <table:table-cell office:value-type="float" office:value="0.0381299">
                <text:p>0.03812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125142">
                <text:p>0.0125142</text:p>
              </table:table-cell>
              <table:table-cell office:value-type="float" office:value="0.0142583">
                <text:p>0.0142583</text:p>
              </table:table-cell>
              <table:table-cell office:value-type="float" office:value="0.142849">
                <text:p>0.142849</text:p>
              </table:table-cell>
              <table:table-cell office:value-type="float" office:value="0.0407734">
                <text:p>0.04077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124318">
                <text:p>0.0124318</text:p>
              </table:table-cell>
              <table:table-cell office:value-type="float" office:value="0.0162294">
                <text:p>0.0162294</text:p>
              </table:table-cell>
              <table:table-cell office:value-type="float" office:value="0.139007">
                <text:p>0.139007</text:p>
              </table:table-cell>
              <table:table-cell office:value-type="float" office:value="0.0395005">
                <text:p>0.039500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2737">
                <text:p>0.012737</text:p>
              </table:table-cell>
              <table:table-cell office:value-type="float" office:value="0.0146256">
                <text:p>0.0146256</text:p>
              </table:table-cell>
              <table:table-cell office:value-type="float" office:value="0.14374">
                <text:p>0.14374</text:p>
              </table:table-cell>
              <table:table-cell office:value-type="float" office:value="0.041085">
                <text:p>0.04108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123105">
                <text:p>0.0123105</text:p>
              </table:table-cell>
              <table:table-cell office:value-type="float" office:value="0.012882">
                <text:p>0.012882</text:p>
              </table:table-cell>
              <table:table-cell office:value-type="float" office:value="0.132443">
                <text:p>0.132443</text:p>
              </table:table-cell>
              <table:table-cell office:value-type="float" office:value="0.0390628">
                <text:p>0.03906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25626">
                <text:p>0.0125626</text:p>
              </table:table-cell>
              <table:table-cell office:value-type="float" office:value="0.0159787">
                <text:p>0.0159787</text:p>
              </table:table-cell>
              <table:table-cell office:value-type="float" office:value="0.134855">
                <text:p>0.134855</text:p>
              </table:table-cell>
              <table:table-cell office:value-type="float" office:value="0.0403071">
                <text:p>0.04030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125393">
                <text:p>0.0125393</text:p>
              </table:table-cell>
              <table:table-cell office:value-type="float" office:value="0.0147411">
                <text:p>0.0147411</text:p>
              </table:table-cell>
              <table:table-cell office:value-type="float" office:value="0.138755">
                <text:p>0.138755</text:p>
              </table:table-cell>
              <table:table-cell office:value-type="float" office:value="0.0390665">
                <text:p>0.039066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124863">
                <text:p>0.0124863</text:p>
              </table:table-cell>
              <table:table-cell office:value-type="float" office:value="0.0146873">
                <text:p>0.0146873</text:p>
              </table:table-cell>
              <table:table-cell office:value-type="float" office:value="0.137877">
                <text:p>0.137877</text:p>
              </table:table-cell>
              <table:table-cell office:value-type="float" office:value="0.0396524">
                <text:p>0.03965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123448">
                <text:p>0.0123448</text:p>
              </table:table-cell>
              <table:table-cell office:value-type="float" office:value="0.0164427">
                <text:p>0.0164427</text:p>
              </table:table-cell>
              <table:table-cell office:value-type="float" office:value="0.140665">
                <text:p>0.140665</text:p>
              </table:table-cell>
              <table:table-cell office:value-type="float" office:value="0.040866">
                <text:p>0.04086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124794">
                <text:p>0.0124794</text:p>
              </table:table-cell>
              <table:table-cell office:value-type="float" office:value="0.0144391">
                <text:p>0.0144391</text:p>
              </table:table-cell>
              <table:table-cell office:value-type="float" office:value="0.140998">
                <text:p>0.140998</text:p>
              </table:table-cell>
              <table:table-cell office:value-type="float" office:value="0.040194">
                <text:p>0.04019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2475">
                <text:p>0.012475</text:p>
              </table:table-cell>
              <table:table-cell office:value-type="float" office:value="0.0136096">
                <text:p>0.0136096</text:p>
              </table:table-cell>
              <table:table-cell office:value-type="float" office:value="0.140124">
                <text:p>0.140124</text:p>
              </table:table-cell>
              <table:table-cell office:value-type="float" office:value="0.0382355">
                <text:p>0.038235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26755">
                <text:p>0.0126755</text:p>
              </table:table-cell>
              <table:table-cell office:value-type="float" office:value="0.0143559">
                <text:p>0.0143559</text:p>
              </table:table-cell>
              <table:table-cell office:value-type="float" office:value="0.138074">
                <text:p>0.138074</text:p>
              </table:table-cell>
              <table:table-cell office:value-type="float" office:value="0.0411376">
                <text:p>0.041137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24671">
                <text:p>0.0124671</text:p>
              </table:table-cell>
              <table:table-cell office:value-type="float" office:value="0.0147273">
                <text:p>0.0147273</text:p>
              </table:table-cell>
              <table:table-cell office:value-type="float" office:value="0.136843">
                <text:p>0.136843</text:p>
              </table:table-cell>
              <table:table-cell office:value-type="float" office:value="0.0377819">
                <text:p>0.03778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126053">
                <text:p>0.0126053</text:p>
              </table:table-cell>
              <table:table-cell office:value-type="float" office:value="0.016049">
                <text:p>0.016049</text:p>
              </table:table-cell>
              <table:table-cell office:value-type="float" office:value="0.137482">
                <text:p>0.137482</text:p>
              </table:table-cell>
              <table:table-cell office:value-type="float" office:value="0.0389571">
                <text:p>0.038957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121885">
                <text:p>0.0121885</text:p>
              </table:table-cell>
              <table:table-cell office:value-type="float" office:value="0.0143162">
                <text:p>0.0143162</text:p>
              </table:table-cell>
              <table:table-cell office:value-type="float" office:value="0.137558">
                <text:p>0.137558</text:p>
              </table:table-cell>
              <table:table-cell office:value-type="float" office:value="0.0372842">
                <text:p>0.03728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23617">
                <text:p>0.0123617</text:p>
              </table:table-cell>
              <table:table-cell office:value-type="float" office:value="0.0128488">
                <text:p>0.0128488</text:p>
              </table:table-cell>
              <table:table-cell office:value-type="float" office:value="0.138768">
                <text:p>0.138768</text:p>
              </table:table-cell>
              <table:table-cell office:value-type="float" office:value="0.0364249">
                <text:p>0.03642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126213">
                <text:p>0.0126213</text:p>
              </table:table-cell>
              <table:table-cell office:value-type="float" office:value="0.0144855">
                <text:p>0.0144855</text:p>
              </table:table-cell>
              <table:table-cell office:value-type="float" office:value="0.138331">
                <text:p>0.138331</text:p>
              </table:table-cell>
              <table:table-cell office:value-type="float" office:value="0.0363884">
                <text:p>0.03638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25388">
                <text:p>0.0125388</text:p>
              </table:table-cell>
              <table:table-cell office:value-type="float" office:value="0.012963">
                <text:p>0.012963</text:p>
              </table:table-cell>
              <table:table-cell office:value-type="float" office:value="0.136758">
                <text:p>0.136758</text:p>
              </table:table-cell>
              <table:table-cell office:value-type="float" office:value="0.0344135">
                <text:p>0.034413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123906">
                <text:p>0.0123906</text:p>
              </table:table-cell>
              <table:table-cell office:value-type="float" office:value="0.0130773">
                <text:p>0.0130773</text:p>
              </table:table-cell>
              <table:table-cell office:value-type="float" office:value="0.137369">
                <text:p>0.13736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24217">
                <text:p>0.0124217</text:p>
              </table:table-cell>
              <table:table-cell office:value-type="float" office:value="0.0136139">
                <text:p>0.0136139</text:p>
              </table:table-cell>
              <table:table-cell office:value-type="float" office:value="0.137138">
                <text:p>0.137138</text:p>
              </table:table-cell>
              <table:table-cell office:value-type="float" office:value="0.0340037">
                <text:p>0.034003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128">
                <text:p>0.0128</text:p>
              </table:table-cell>
              <table:table-cell office:value-type="float" office:value="0.0136846">
                <text:p>0.0136846</text:p>
              </table:table-cell>
              <table:table-cell office:value-type="float" office:value="0.13737">
                <text:p>0.13737</text:p>
              </table:table-cell>
              <table:table-cell office:value-type="float" office:value="0.0354385">
                <text:p>0.03543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24567">
                <text:p>0.0124567</text:p>
              </table:table-cell>
              <table:table-cell office:value-type="float" office:value="0.0135734">
                <text:p>0.0135734</text:p>
              </table:table-cell>
              <table:table-cell office:value-type="float" office:value="0.133462">
                <text:p>0.133462</text:p>
              </table:table-cell>
              <table:table-cell office:value-type="float" office:value="0.034725">
                <text:p>0.03472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26613">
                <text:p>0.0126613</text:p>
              </table:table-cell>
              <table:table-cell office:value-type="float" office:value="0.0133441">
                <text:p>0.0133441</text:p>
              </table:table-cell>
              <table:table-cell office:value-type="float" office:value="0.132964">
                <text:p>0.132964</text:p>
              </table:table-cell>
              <table:table-cell office:value-type="float" office:value="0.036257">
                <text:p>0.03625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25239">
                <text:p>0.0125239</text:p>
              </table:table-cell>
              <table:table-cell office:value-type="float" office:value="0.0137958">
                <text:p>0.0137958</text:p>
              </table:table-cell>
              <table:table-cell office:value-type="float" office:value="0.132583">
                <text:p>0.132583</text:p>
              </table:table-cell>
              <table:table-cell office:value-type="float" office:value="0.037451">
                <text:p>0.03745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127179">
                <text:p>0.0127179</text:p>
              </table:table-cell>
              <table:table-cell office:value-type="float" office:value="0.013118">
                <text:p>0.013118</text:p>
              </table:table-cell>
              <table:table-cell office:value-type="float" office:value="0.132325">
                <text:p>0.132325</text:p>
              </table:table-cell>
              <table:table-cell office:value-type="float" office:value="0.0375391">
                <text:p>0.03753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27683">
                <text:p>0.0127683</text:p>
              </table:table-cell>
              <table:table-cell office:value-type="float" office:value="0.0142787">
                <text:p>0.0142787</text:p>
              </table:table-cell>
              <table:table-cell office:value-type="float" office:value="0.132187">
                <text:p>0.132187</text:p>
              </table:table-cell>
              <table:table-cell office:value-type="float" office:value="0.0330313">
                <text:p>0.033031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128013">
                <text:p>0.0128013</text:p>
              </table:table-cell>
              <table:table-cell office:value-type="float" office:value="0.0136746">
                <text:p>0.0136746</text:p>
              </table:table-cell>
              <table:table-cell office:value-type="float" office:value="0.132307">
                <text:p>0.132307</text:p>
              </table:table-cell>
              <table:table-cell office:value-type="float" office:value="0.0344933">
                <text:p>0.03449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131844">
                <text:p>0.0131844</text:p>
              </table:table-cell>
              <table:table-cell office:value-type="float" office:value="0.0134672">
                <text:p>0.0134672</text:p>
              </table:table-cell>
              <table:table-cell office:value-type="float" office:value="0.131506">
                <text:p>0.131506</text:p>
              </table:table-cell>
              <table:table-cell office:value-type="float" office:value="0.0345754">
                <text:p>0.034575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133278">
                <text:p>0.0133278</text:p>
              </table:table-cell>
              <table:table-cell office:value-type="float" office:value="0.0126107">
                <text:p>0.0126107</text:p>
              </table:table-cell>
              <table:table-cell office:value-type="float" office:value="0.129014">
                <text:p>0.129014</text:p>
              </table:table-cell>
              <table:table-cell office:value-type="float" office:value="0.0344557">
                <text:p>0.034455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35502">
                <text:p>0.0135502</text:p>
              </table:table-cell>
              <table:table-cell office:value-type="float" office:value="0.0181021">
                <text:p>0.0181021</text:p>
              </table:table-cell>
              <table:table-cell office:value-type="float" office:value="0.135334">
                <text:p>0.135334</text:p>
              </table:table-cell>
              <table:table-cell office:value-type="float" office:value="0.0373572">
                <text:p>0.037357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130198">
                <text:p>0.0130198</text:p>
              </table:table-cell>
              <table:table-cell office:value-type="float" office:value="0.0155896">
                <text:p>0.0155896</text:p>
              </table:table-cell>
              <table:table-cell office:value-type="float" office:value="0.137378">
                <text:p>0.137378</text:p>
              </table:table-cell>
              <table:table-cell office:value-type="float" office:value="0.034225">
                <text:p>0.0342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126377">
                <text:p>0.0126377</text:p>
              </table:table-cell>
              <table:table-cell office:value-type="float" office:value="0.0135222">
                <text:p>0.0135222</text:p>
              </table:table-cell>
              <table:table-cell office:value-type="float" office:value="0.133134">
                <text:p>0.133134</text:p>
              </table:table-cell>
              <table:table-cell office:value-type="float" office:value="0.0340309">
                <text:p>0.03403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12461">
                <text:p>0.012461</text:p>
              </table:table-cell>
              <table:table-cell office:value-type="float" office:value="0.0158254">
                <text:p>0.0158254</text:p>
              </table:table-cell>
              <table:table-cell office:value-type="float" office:value="0.133332">
                <text:p>0.133332</text:p>
              </table:table-cell>
              <table:table-cell office:value-type="float" office:value="0.0346031">
                <text:p>0.034603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145786">
                <text:p>0.0145786</text:p>
              </table:table-cell>
              <table:table-cell office:value-type="float" office:value="0.0140955">
                <text:p>0.0140955</text:p>
              </table:table-cell>
              <table:table-cell office:value-type="float" office:value="0.140827">
                <text:p>0.140827</text:p>
              </table:table-cell>
              <table:table-cell office:value-type="float" office:value="0.0343667">
                <text:p>0.03436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157481">
                <text:p>0.0157481</text:p>
              </table:table-cell>
              <table:table-cell office:value-type="float" office:value="0.0130435">
                <text:p>0.0130435</text:p>
              </table:table-cell>
              <table:table-cell office:value-type="float" office:value="0.138538">
                <text:p>0.138538</text:p>
              </table:table-cell>
              <table:table-cell office:value-type="float" office:value="0.0348578">
                <text:p>0.034857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34231">
                <text:p>0.0134231</text:p>
              </table:table-cell>
              <table:table-cell office:value-type="float" office:value="0.0134451">
                <text:p>0.0134451</text:p>
              </table:table-cell>
              <table:table-cell office:value-type="float" office:value="0.137217">
                <text:p>0.137217</text:p>
              </table:table-cell>
              <table:table-cell office:value-type="float" office:value="0.0355375">
                <text:p>0.035537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137397">
                <text:p>0.0137397</text:p>
              </table:table-cell>
              <table:table-cell office:value-type="float" office:value="0.0139995">
                <text:p>0.0139995</text:p>
              </table:table-cell>
              <table:table-cell office:value-type="float" office:value="0.136561">
                <text:p>0.136561</text:p>
              </table:table-cell>
              <table:table-cell office:value-type="float" office:value="0.0352242">
                <text:p>0.03522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136679">
                <text:p>0.0136679</text:p>
              </table:table-cell>
              <table:table-cell office:value-type="float" office:value="0.0133407">
                <text:p>0.0133407</text:p>
              </table:table-cell>
              <table:table-cell office:value-type="float" office:value="0.132749">
                <text:p>0.132749</text:p>
              </table:table-cell>
              <table:table-cell office:value-type="float" office:value="0.0322485">
                <text:p>0.032248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132006">
                <text:p>0.0132006</text:p>
              </table:table-cell>
              <table:table-cell office:value-type="float" office:value="0.0131191">
                <text:p>0.0131191</text:p>
              </table:table-cell>
              <table:table-cell office:value-type="float" office:value="0.138353">
                <text:p>0.138353</text:p>
              </table:table-cell>
              <table:table-cell office:value-type="float" office:value="0.0334284">
                <text:p>0.033428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126238">
                <text:p>0.0126238</text:p>
              </table:table-cell>
              <table:table-cell office:value-type="float" office:value="0.0131826">
                <text:p>0.0131826</text:p>
              </table:table-cell>
              <table:table-cell office:value-type="float" office:value="0.133842">
                <text:p>0.133842</text:p>
              </table:table-cell>
              <table:table-cell office:value-type="float" office:value="0.0340702">
                <text:p>0.03407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124213">
                <text:p>0.0124213</text:p>
              </table:table-cell>
              <table:table-cell office:value-type="float" office:value="0.0144118">
                <text:p>0.0144118</text:p>
              </table:table-cell>
              <table:table-cell office:value-type="float" office:value="0.130348">
                <text:p>0.130348</text:p>
              </table:table-cell>
              <table:table-cell office:value-type="float" office:value="0.0333891">
                <text:p>0.033389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124416">
                <text:p>0.0124416</text:p>
              </table:table-cell>
              <table:table-cell office:value-type="float" office:value="0.0145113">
                <text:p>0.0145113</text:p>
              </table:table-cell>
              <table:table-cell office:value-type="float" office:value="0.132084">
                <text:p>0.132084</text:p>
              </table:table-cell>
              <table:table-cell office:value-type="float" office:value="0.0341331">
                <text:p>0.034133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127269">
                <text:p>0.0127269</text:p>
              </table:table-cell>
              <table:table-cell office:value-type="float" office:value="0.0136876">
                <text:p>0.0136876</text:p>
              </table:table-cell>
              <table:table-cell office:value-type="float" office:value="0.131518">
                <text:p>0.131518</text:p>
              </table:table-cell>
              <table:table-cell office:value-type="float" office:value="0.0334375">
                <text:p>0.033437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135009">
                <text:p>0.0135009</text:p>
              </table:table-cell>
              <table:table-cell office:value-type="float" office:value="0.0169338">
                <text:p>0.0169338</text:p>
              </table:table-cell>
              <table:table-cell office:value-type="float" office:value="0.132138">
                <text:p>0.132138</text:p>
              </table:table-cell>
              <table:table-cell office:value-type="float" office:value="0.0347771">
                <text:p>0.034777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125384">
                <text:p>0.0125384</text:p>
              </table:table-cell>
              <table:table-cell office:value-type="float" office:value="0.0150675">
                <text:p>0.0150675</text:p>
              </table:table-cell>
              <table:table-cell office:value-type="float" office:value="0.130599">
                <text:p>0.130599</text:p>
              </table:table-cell>
              <table:table-cell office:value-type="float" office:value="0.0352452">
                <text:p>0.03524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30793">
                <text:p>0.0130793</text:p>
              </table:table-cell>
              <table:table-cell office:value-type="float" office:value="0.0139671">
                <text:p>0.0139671</text:p>
              </table:table-cell>
              <table:table-cell office:value-type="float" office:value="0.133868">
                <text:p>0.133868</text:p>
              </table:table-cell>
              <table:table-cell office:value-type="float" office:value="0.0357025">
                <text:p>0.035702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123742">
                <text:p>0.0123742</text:p>
              </table:table-cell>
              <table:table-cell office:value-type="float" office:value="0.0122573">
                <text:p>0.0122573</text:p>
              </table:table-cell>
              <table:table-cell office:value-type="float" office:value="0.130753">
                <text:p>0.130753</text:p>
              </table:table-cell>
              <table:table-cell office:value-type="float" office:value="0.036135">
                <text:p>0.03613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121823">
                <text:p>0.0121823</text:p>
              </table:table-cell>
              <table:table-cell office:value-type="float" office:value="0.0139605">
                <text:p>0.0139605</text:p>
              </table:table-cell>
              <table:table-cell office:value-type="float" office:value="0.132471">
                <text:p>0.132471</text:p>
              </table:table-cell>
              <table:table-cell office:value-type="float" office:value="0.0374934">
                <text:p>0.037493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124855">
                <text:p>0.0124855</text:p>
              </table:table-cell>
              <table:table-cell office:value-type="float" office:value="0.0134335">
                <text:p>0.0134335</text:p>
              </table:table-cell>
              <table:table-cell office:value-type="float" office:value="0.132186">
                <text:p>0.132186</text:p>
              </table:table-cell>
              <table:table-cell office:value-type="float" office:value="0.0376429">
                <text:p>0.037642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127206">
                <text:p>0.0127206</text:p>
              </table:table-cell>
              <table:table-cell office:value-type="float" office:value="0.0126732">
                <text:p>0.0126732</text:p>
              </table:table-cell>
              <table:table-cell office:value-type="float" office:value="0.132497">
                <text:p>0.132497</text:p>
              </table:table-cell>
              <table:table-cell office:value-type="float" office:value="0.0365351">
                <text:p>0.036535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127669">
                <text:p>0.0127669</text:p>
              </table:table-cell>
              <table:table-cell office:value-type="float" office:value="0.0138342">
                <text:p>0.0138342</text:p>
              </table:table-cell>
              <table:table-cell office:value-type="float" office:value="0.13215">
                <text:p>0.13215</text:p>
              </table:table-cell>
              <table:table-cell office:value-type="float" office:value="0.0361755">
                <text:p>0.036175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124858">
                <text:p>0.0124858</text:p>
              </table:table-cell>
              <table:table-cell office:value-type="float" office:value="0.0145196">
                <text:p>0.0145196</text:p>
              </table:table-cell>
              <table:table-cell office:value-type="float" office:value="0.132989">
                <text:p>0.132989</text:p>
              </table:table-cell>
              <table:table-cell office:value-type="float" office:value="0.0353897">
                <text:p>0.035389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155271">
                <text:p>0.0155271</text:p>
              </table:table-cell>
              <table:table-cell office:value-type="float" office:value="0.0143357">
                <text:p>0.0143357</text:p>
              </table:table-cell>
              <table:table-cell office:value-type="float" office:value="0.13352">
                <text:p>0.13352</text:p>
              </table:table-cell>
              <table:table-cell office:value-type="float" office:value="0.0353806">
                <text:p>0.035380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153987">
                <text:p>0.0153987</text:p>
              </table:table-cell>
              <table:table-cell office:value-type="float" office:value="0.0141785">
                <text:p>0.0141785</text:p>
              </table:table-cell>
              <table:table-cell office:value-type="float" office:value="0.132062">
                <text:p>0.132062</text:p>
              </table:table-cell>
              <table:table-cell office:value-type="float" office:value="0.0348788">
                <text:p>0.034878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128372">
                <text:p>0.0128372</text:p>
              </table:table-cell>
              <table:table-cell office:value-type="float" office:value="0.0173491">
                <text:p>0.0173491</text:p>
              </table:table-cell>
              <table:table-cell office:value-type="float" office:value="0.134752">
                <text:p>0.134752</text:p>
              </table:table-cell>
              <table:table-cell office:value-type="float" office:value="0.0350032">
                <text:p>0.03500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23116">
                <text:p>0.0123116</text:p>
              </table:table-cell>
              <table:table-cell office:value-type="float" office:value="0.0145889">
                <text:p>0.0145889</text:p>
              </table:table-cell>
              <table:table-cell office:value-type="float" office:value="0.136526">
                <text:p>0.136526</text:p>
              </table:table-cell>
              <table:table-cell office:value-type="float" office:value="0.0353252">
                <text:p>0.035325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129363">
                <text:p>0.0129363</text:p>
              </table:table-cell>
              <table:table-cell office:value-type="float" office:value="0.0147424">
                <text:p>0.0147424</text:p>
              </table:table-cell>
              <table:table-cell office:value-type="float" office:value="0.136492">
                <text:p>0.136492</text:p>
              </table:table-cell>
              <table:table-cell office:value-type="float" office:value="0.0344147">
                <text:p>0.034414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29839">
                <text:p>0.0129839</text:p>
              </table:table-cell>
              <table:table-cell office:value-type="float" office:value="0.0127857">
                <text:p>0.0127857</text:p>
              </table:table-cell>
              <table:table-cell office:value-type="float" office:value="0.135768">
                <text:p>0.135768</text:p>
              </table:table-cell>
              <table:table-cell office:value-type="float" office:value="0.036292">
                <text:p>0.03629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127471">
                <text:p>0.0127471</text:p>
              </table:table-cell>
              <table:table-cell office:value-type="float" office:value="0.0128652">
                <text:p>0.0128652</text:p>
              </table:table-cell>
              <table:table-cell office:value-type="float" office:value="0.136731">
                <text:p>0.136731</text:p>
              </table:table-cell>
              <table:table-cell office:value-type="float" office:value="0.0356139">
                <text:p>0.035613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123822">
                <text:p>0.0123822</text:p>
              </table:table-cell>
              <table:table-cell office:value-type="float" office:value="0.0131051">
                <text:p>0.0131051</text:p>
              </table:table-cell>
              <table:table-cell office:value-type="float" office:value="0.140983">
                <text:p>0.140983</text:p>
              </table:table-cell>
              <table:table-cell office:value-type="float" office:value="0.0374711">
                <text:p>0.03747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24265">
                <text:p>0.0124265</text:p>
              </table:table-cell>
              <table:table-cell office:value-type="float" office:value="0.012831">
                <text:p>0.012831</text:p>
              </table:table-cell>
              <table:table-cell office:value-type="float" office:value="0.137506">
                <text:p>0.137506</text:p>
              </table:table-cell>
              <table:table-cell office:value-type="float" office:value="0.0357849">
                <text:p>0.035784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12572">
                <text:p>0.012572</text:p>
              </table:table-cell>
              <table:table-cell office:value-type="float" office:value="0.0135672">
                <text:p>0.0135672</text:p>
              </table:table-cell>
              <table:table-cell office:value-type="float" office:value="0.137632">
                <text:p>0.137632</text:p>
              </table:table-cell>
              <table:table-cell office:value-type="float" office:value="0.0365353">
                <text:p>0.036535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131964">
                <text:p>0.0131964</text:p>
              </table:table-cell>
              <table:table-cell office:value-type="float" office:value="0.0127184">
                <text:p>0.0127184</text:p>
              </table:table-cell>
              <table:table-cell office:value-type="float" office:value="0.139217">
                <text:p>0.139217</text:p>
              </table:table-cell>
              <table:table-cell office:value-type="float" office:value="0.0356115">
                <text:p>0.035611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125732">
                <text:p>0.0125732</text:p>
              </table:table-cell>
              <table:table-cell office:value-type="float" office:value="0.0168426">
                <text:p>0.0168426</text:p>
              </table:table-cell>
              <table:table-cell office:value-type="float" office:value="0.136694">
                <text:p>0.136694</text:p>
              </table:table-cell>
              <table:table-cell office:value-type="float" office:value="0.0354296">
                <text:p>0.035429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122306">
                <text:p>0.0122306</text:p>
              </table:table-cell>
              <table:table-cell office:value-type="float" office:value="0.0146302">
                <text:p>0.0146302</text:p>
              </table:table-cell>
              <table:table-cell office:value-type="float" office:value="0.137158">
                <text:p>0.137158</text:p>
              </table:table-cell>
              <table:table-cell office:value-type="float" office:value="0.0371356">
                <text:p>0.03713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23579">
                <text:p>0.0123579</text:p>
              </table:table-cell>
              <table:table-cell office:value-type="float" office:value="0.0168694">
                <text:p>0.0168694</text:p>
              </table:table-cell>
              <table:table-cell office:value-type="float" office:value="0.135562">
                <text:p>0.135562</text:p>
              </table:table-cell>
              <table:table-cell office:value-type="float" office:value="0.0354561">
                <text:p>0.035456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126835">
                <text:p>0.0126835</text:p>
              </table:table-cell>
              <table:table-cell office:value-type="float" office:value="0.0151314">
                <text:p>0.0151314</text:p>
              </table:table-cell>
              <table:table-cell office:value-type="float" office:value="0.132857">
                <text:p>0.132857</text:p>
              </table:table-cell>
              <table:table-cell office:value-type="float" office:value="0.0374674">
                <text:p>0.037467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124768">
                <text:p>0.0124768</text:p>
              </table:table-cell>
              <table:table-cell office:value-type="float" office:value="0.018367">
                <text:p>0.018367</text:p>
              </table:table-cell>
              <table:table-cell office:value-type="float" office:value="0.138399">
                <text:p>0.138399</text:p>
              </table:table-cell>
              <table:table-cell office:value-type="float" office:value="0.0376252">
                <text:p>0.037625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124616">
                <text:p>0.0124616</text:p>
              </table:table-cell>
              <table:table-cell office:value-type="float" office:value="0.0140507">
                <text:p>0.0140507</text:p>
              </table:table-cell>
              <table:table-cell office:value-type="float" office:value="0.138281">
                <text:p>0.138281</text:p>
              </table:table-cell>
              <table:table-cell office:value-type="float" office:value="0.0372189">
                <text:p>0.037218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121065">
                <text:p>0.0121065</text:p>
              </table:table-cell>
              <table:table-cell office:value-type="float" office:value="0.0174942">
                <text:p>0.0174942</text:p>
              </table:table-cell>
              <table:table-cell office:value-type="float" office:value="0.135897">
                <text:p>0.135897</text:p>
              </table:table-cell>
              <table:table-cell office:value-type="float" office:value="0.0385629">
                <text:p>0.038562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126654">
                <text:p>0.0126654</text:p>
              </table:table-cell>
              <table:table-cell office:value-type="float" office:value="0.0144866">
                <text:p>0.0144866</text:p>
              </table:table-cell>
              <table:table-cell office:value-type="float" office:value="0.145645">
                <text:p>0.145645</text:p>
              </table:table-cell>
              <table:table-cell office:value-type="float" office:value="0.0381582">
                <text:p>0.038158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124209">
                <text:p>0.0124209</text:p>
              </table:table-cell>
              <table:table-cell office:value-type="float" office:value="0.0129686">
                <text:p>0.0129686</text:p>
              </table:table-cell>
              <table:table-cell office:value-type="float" office:value="0.140787">
                <text:p>0.140787</text:p>
              </table:table-cell>
              <table:table-cell office:value-type="float" office:value="0.0372905">
                <text:p>0.037290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12478">
                <text:p>0.012478</text:p>
              </table:table-cell>
              <table:table-cell office:value-type="float" office:value="0.0127785">
                <text:p>0.0127785</text:p>
              </table:table-cell>
              <table:table-cell office:value-type="float" office:value="0.134366">
                <text:p>0.134366</text:p>
              </table:table-cell>
              <table:table-cell office:value-type="float" office:value="0.0370966">
                <text:p>0.037096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122366">
                <text:p>0.0122366</text:p>
              </table:table-cell>
              <table:table-cell office:value-type="float" office:value="0.0135131">
                <text:p>0.0135131</text:p>
              </table:table-cell>
              <table:table-cell office:value-type="float" office:value="0.131583">
                <text:p>0.131583</text:p>
              </table:table-cell>
              <table:table-cell office:value-type="float" office:value="0.035961">
                <text:p>0.03596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123121">
                <text:p>0.0123121</text:p>
              </table:table-cell>
              <table:table-cell office:value-type="float" office:value="0.0136416">
                <text:p>0.0136416</text:p>
              </table:table-cell>
              <table:table-cell office:value-type="float" office:value="0.130977">
                <text:p>0.130977</text:p>
              </table:table-cell>
              <table:table-cell office:value-type="float" office:value="0.0364841">
                <text:p>0.036484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24028">
                <text:p>0.0124028</text:p>
              </table:table-cell>
              <table:table-cell office:value-type="float" office:value="0.0141775">
                <text:p>0.0141775</text:p>
              </table:table-cell>
              <table:table-cell office:value-type="float" office:value="0.135203">
                <text:p>0.135203</text:p>
              </table:table-cell>
              <table:table-cell office:value-type="float" office:value="0.0365155">
                <text:p>0.036515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124052">
                <text:p>0.0124052</text:p>
              </table:table-cell>
              <table:table-cell office:value-type="float" office:value="0.013326">
                <text:p>0.013326</text:p>
              </table:table-cell>
              <table:table-cell office:value-type="float" office:value="0.129898">
                <text:p>0.129898</text:p>
              </table:table-cell>
              <table:table-cell office:value-type="float" office:value="0.035353">
                <text:p>0.03535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157081">
                <text:p>0.0157081</text:p>
              </table:table-cell>
              <table:table-cell office:value-type="float" office:value="0.0157285">
                <text:p>0.0157285</text:p>
              </table:table-cell>
              <table:table-cell office:value-type="float" office:value="0.129287">
                <text:p>0.129287</text:p>
              </table:table-cell>
              <table:table-cell office:value-type="float" office:value="0.0352607">
                <text:p>0.035260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135839">
                <text:p>0.0135839</text:p>
              </table:table-cell>
              <table:table-cell office:value-type="float" office:value="0.0144928">
                <text:p>0.0144928</text:p>
              </table:table-cell>
              <table:table-cell office:value-type="float" office:value="0.131353">
                <text:p>0.131353</text:p>
              </table:table-cell>
              <table:table-cell office:value-type="float" office:value="0.0357632">
                <text:p>0.035763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124025">
                <text:p>0.0124025</text:p>
              </table:table-cell>
              <table:table-cell office:value-type="float" office:value="0.0130487">
                <text:p>0.0130487</text:p>
              </table:table-cell>
              <table:table-cell office:value-type="float" office:value="0.132471">
                <text:p>0.132471</text:p>
              </table:table-cell>
              <table:table-cell office:value-type="float" office:value="0.034507">
                <text:p>0.03450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12865">
                <text:p>0.012865</text:p>
              </table:table-cell>
              <table:table-cell office:value-type="float" office:value="0.0156078">
                <text:p>0.0156078</text:p>
              </table:table-cell>
              <table:table-cell office:value-type="float" office:value="0.131374">
                <text:p>0.131374</text:p>
              </table:table-cell>
              <table:table-cell office:value-type="float" office:value="0.0345829">
                <text:p>0.034582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157668">
                <text:p>0.0157668</text:p>
              </table:table-cell>
              <table:table-cell office:value-type="float" office:value="0.0149765">
                <text:p>0.0149765</text:p>
              </table:table-cell>
              <table:table-cell office:value-type="float" office:value="0.132118">
                <text:p>0.132118</text:p>
              </table:table-cell>
              <table:table-cell office:value-type="float" office:value="0.0349455">
                <text:p>0.034945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133951">
                <text:p>0.0133951</text:p>
              </table:table-cell>
              <table:table-cell office:value-type="float" office:value="0.014466">
                <text:p>0.014466</text:p>
              </table:table-cell>
              <table:table-cell office:value-type="float" office:value="0.136077">
                <text:p>0.136077</text:p>
              </table:table-cell>
              <table:table-cell office:value-type="float" office:value="0.0355863">
                <text:p>0.035586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12628">
                <text:p>0.012628</text:p>
              </table:table-cell>
              <table:table-cell office:value-type="float" office:value="0.0131419">
                <text:p>0.0131419</text:p>
              </table:table-cell>
              <table:table-cell office:value-type="float" office:value="0.136011">
                <text:p>0.136011</text:p>
              </table:table-cell>
              <table:table-cell office:value-type="float" office:value="0.0371217">
                <text:p>0.037121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125044">
                <text:p>0.0125044</text:p>
              </table:table-cell>
              <table:table-cell office:value-type="float" office:value="0.0148922">
                <text:p>0.0148922</text:p>
              </table:table-cell>
              <table:table-cell office:value-type="float" office:value="0.132073">
                <text:p>0.132073</text:p>
              </table:table-cell>
              <table:table-cell office:value-type="float" office:value="0.0364326">
                <text:p>0.03643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139138">
                <text:p>0.0139138</text:p>
              </table:table-cell>
              <table:table-cell office:value-type="float" office:value="0.0144698">
                <text:p>0.0144698</text:p>
              </table:table-cell>
              <table:table-cell office:value-type="float" office:value="0.131742">
                <text:p>0.131742</text:p>
              </table:table-cell>
              <table:table-cell office:value-type="float" office:value="0.0345636">
                <text:p>0.034563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130519">
                <text:p>0.0130519</text:p>
              </table:table-cell>
              <table:table-cell office:value-type="float" office:value="0.01362">
                <text:p>0.01362</text:p>
              </table:table-cell>
              <table:table-cell office:value-type="float" office:value="0.132343">
                <text:p>0.132343</text:p>
              </table:table-cell>
              <table:table-cell office:value-type="float" office:value="0.0379762">
                <text:p>0.037976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137007">
                <text:p>0.0137007</text:p>
              </table:table-cell>
              <table:table-cell office:value-type="float" office:value="0.014227">
                <text:p>0.014227</text:p>
              </table:table-cell>
              <table:table-cell office:value-type="float" office:value="0.132272">
                <text:p>0.132272</text:p>
              </table:table-cell>
              <table:table-cell office:value-type="float" office:value="0.0414289">
                <text:p>0.041428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128659">
                <text:p>0.0128659</text:p>
              </table:table-cell>
              <table:table-cell office:value-type="float" office:value="0.0139292">
                <text:p>0.0139292</text:p>
              </table:table-cell>
              <table:table-cell office:value-type="float" office:value="0.139566">
                <text:p>0.139566</text:p>
              </table:table-cell>
              <table:table-cell office:value-type="float" office:value="0.0383422">
                <text:p>0.038342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13178">
                <text:p>0.013178</text:p>
              </table:table-cell>
              <table:table-cell office:value-type="float" office:value="0.0131338">
                <text:p>0.0131338</text:p>
              </table:table-cell>
              <table:table-cell office:value-type="float" office:value="0.130451">
                <text:p>0.130451</text:p>
              </table:table-cell>
              <table:table-cell office:value-type="float" office:value="0.0382274">
                <text:p>0.038227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135401">
                <text:p>0.0135401</text:p>
              </table:table-cell>
              <table:table-cell office:value-type="float" office:value="0.0143193">
                <text:p>0.0143193</text:p>
              </table:table-cell>
              <table:table-cell office:value-type="float" office:value="0.136205">
                <text:p>0.136205</text:p>
              </table:table-cell>
              <table:table-cell office:value-type="float" office:value="0.0378325">
                <text:p>0.037832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131183">
                <text:p>0.0131183</text:p>
              </table:table-cell>
              <table:table-cell office:value-type="float" office:value="0.0142297">
                <text:p>0.0142297</text:p>
              </table:table-cell>
              <table:table-cell office:value-type="float" office:value="0.138038">
                <text:p>0.138038</text:p>
              </table:table-cell>
              <table:table-cell office:value-type="float" office:value="0.0380613">
                <text:p>0.038061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129337">
                <text:p>0.0129337</text:p>
              </table:table-cell>
              <table:table-cell office:value-type="float" office:value="0.0183134">
                <text:p>0.0183134</text:p>
              </table:table-cell>
              <table:table-cell office:value-type="float" office:value="0.135454">
                <text:p>0.135454</text:p>
              </table:table-cell>
              <table:table-cell office:value-type="float" office:value="0.0388527">
                <text:p>0.038852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31057">
                <text:p>0.0131057</text:p>
              </table:table-cell>
              <table:table-cell office:value-type="float" office:value="0.0150248">
                <text:p>0.0150248</text:p>
              </table:table-cell>
              <table:table-cell office:value-type="float" office:value="0.136088">
                <text:p>0.136088</text:p>
              </table:table-cell>
              <table:table-cell office:value-type="float" office:value="0.0394842">
                <text:p>0.039484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170367">
                <text:p>0.0170367</text:p>
              </table:table-cell>
              <table:table-cell office:value-type="float" office:value="0.0140885">
                <text:p>0.0140885</text:p>
              </table:table-cell>
              <table:table-cell office:value-type="float" office:value="0.130754">
                <text:p>0.130754</text:p>
              </table:table-cell>
              <table:table-cell office:value-type="float" office:value="0.0385808">
                <text:p>0.038580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46498">
                <text:p>0.0146498</text:p>
              </table:table-cell>
              <table:table-cell office:value-type="float" office:value="0.0135497">
                <text:p>0.0135497</text:p>
              </table:table-cell>
              <table:table-cell office:value-type="float" office:value="0.130815">
                <text:p>0.130815</text:p>
              </table:table-cell>
              <table:table-cell office:value-type="float" office:value="0.0388687">
                <text:p>0.03886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174289">
                <text:p>0.0174289</text:p>
              </table:table-cell>
              <table:table-cell office:value-type="float" office:value="0.0130691">
                <text:p>0.0130691</text:p>
              </table:table-cell>
              <table:table-cell office:value-type="float" office:value="0.129626">
                <text:p>0.129626</text:p>
              </table:table-cell>
              <table:table-cell office:value-type="float" office:value="0.0388194">
                <text:p>0.038819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145004">
                <text:p>0.0145004</text:p>
              </table:table-cell>
              <table:table-cell office:value-type="float" office:value="0.0131755">
                <text:p>0.0131755</text:p>
              </table:table-cell>
              <table:table-cell office:value-type="float" office:value="0.134446">
                <text:p>0.134446</text:p>
              </table:table-cell>
              <table:table-cell office:value-type="float" office:value="0.0386035">
                <text:p>0.038603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13301">
                <text:p>0.013301</text:p>
              </table:table-cell>
              <table:table-cell office:value-type="float" office:value="0.0152494">
                <text:p>0.0152494</text:p>
              </table:table-cell>
              <table:table-cell office:value-type="float" office:value="0.13176">
                <text:p>0.13176</text:p>
              </table:table-cell>
              <table:table-cell office:value-type="float" office:value="0.0391325">
                <text:p>0.039132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131277">
                <text:p>0.0131277</text:p>
              </table:table-cell>
              <table:table-cell office:value-type="float" office:value="0.0151093">
                <text:p>0.0151093</text:p>
              </table:table-cell>
              <table:table-cell office:value-type="float" office:value="0.131005">
                <text:p>0.131005</text:p>
              </table:table-cell>
              <table:table-cell office:value-type="float" office:value="0.0384732">
                <text:p>0.03847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134847">
                <text:p>0.0134847</text:p>
              </table:table-cell>
              <table:table-cell office:value-type="float" office:value="0.0137429">
                <text:p>0.0137429</text:p>
              </table:table-cell>
              <table:table-cell office:value-type="float" office:value="0.130714">
                <text:p>0.130714</text:p>
              </table:table-cell>
              <table:table-cell office:value-type="float" office:value="0.037764">
                <text:p>0.03776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140507">
                <text:p>0.0140507</text:p>
              </table:table-cell>
              <table:table-cell office:value-type="float" office:value="0.0128179">
                <text:p>0.0128179</text:p>
              </table:table-cell>
              <table:table-cell office:value-type="float" office:value="0.133039">
                <text:p>0.133039</text:p>
              </table:table-cell>
              <table:table-cell office:value-type="float" office:value="0.0374135">
                <text:p>0.037413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126671">
                <text:p>0.0126671</text:p>
              </table:table-cell>
              <table:table-cell office:value-type="float" office:value="0.0130801">
                <text:p>0.0130801</text:p>
              </table:table-cell>
              <table:table-cell office:value-type="float" office:value="0.130651">
                <text:p>0.130651</text:p>
              </table:table-cell>
              <table:table-cell office:value-type="float" office:value="0.0384601">
                <text:p>0.038460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128563">
                <text:p>0.0128563</text:p>
              </table:table-cell>
              <table:table-cell office:value-type="float" office:value="0.0141096">
                <text:p>0.0141096</text:p>
              </table:table-cell>
              <table:table-cell office:value-type="float" office:value="0.130584">
                <text:p>0.130584</text:p>
              </table:table-cell>
              <table:table-cell office:value-type="float" office:value="0.0347801">
                <text:p>0.034780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123162">
                <text:p>0.0123162</text:p>
              </table:table-cell>
              <table:table-cell office:value-type="float" office:value="0.013738">
                <text:p>0.013738</text:p>
              </table:table-cell>
              <table:table-cell office:value-type="float" office:value="0.130003">
                <text:p>0.130003</text:p>
              </table:table-cell>
              <table:table-cell office:value-type="float" office:value="0.0360674">
                <text:p>0.036067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147142">
                <text:p>0.0147142</text:p>
              </table:table-cell>
              <table:table-cell office:value-type="float" office:value="0.013676">
                <text:p>0.013676</text:p>
              </table:table-cell>
              <table:table-cell office:value-type="float" office:value="0.132188">
                <text:p>0.132188</text:p>
              </table:table-cell>
              <table:table-cell office:value-type="float" office:value="0.0337926">
                <text:p>0.033792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131547">
                <text:p>0.0131547</text:p>
              </table:table-cell>
              <table:table-cell office:value-type="float" office:value="0.01349">
                <text:p>0.01349</text:p>
              </table:table-cell>
              <table:table-cell office:value-type="float" office:value="0.132078">
                <text:p>0.132078</text:p>
              </table:table-cell>
              <table:table-cell office:value-type="float" office:value="0.0356671">
                <text:p>0.035667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125363">
                <text:p>0.0125363</text:p>
              </table:table-cell>
              <table:table-cell office:value-type="float" office:value="0.014333">
                <text:p>0.014333</text:p>
              </table:table-cell>
              <table:table-cell office:value-type="float" office:value="0.130933">
                <text:p>0.130933</text:p>
              </table:table-cell>
              <table:table-cell office:value-type="float" office:value="0.0348336">
                <text:p>0.034833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125992">
                <text:p>0.0125992</text:p>
              </table:table-cell>
              <table:table-cell office:value-type="float" office:value="0.0127467">
                <text:p>0.0127467</text:p>
              </table:table-cell>
              <table:table-cell office:value-type="float" office:value="0.131593">
                <text:p>0.131593</text:p>
              </table:table-cell>
              <table:table-cell office:value-type="float" office:value="0.033459">
                <text:p>0.03345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125891">
                <text:p>0.0125891</text:p>
              </table:table-cell>
              <table:table-cell office:value-type="float" office:value="0.0139916">
                <text:p>0.0139916</text:p>
              </table:table-cell>
              <table:table-cell office:value-type="float" office:value="0.131298">
                <text:p>0.131298</text:p>
              </table:table-cell>
              <table:table-cell office:value-type="float" office:value="0.0358426">
                <text:p>0.035842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12491">
                <text:p>0.012491</text:p>
              </table:table-cell>
              <table:table-cell office:value-type="float" office:value="0.0143685">
                <text:p>0.0143685</text:p>
              </table:table-cell>
              <table:table-cell office:value-type="float" office:value="0.130566">
                <text:p>0.130566</text:p>
              </table:table-cell>
              <table:table-cell office:value-type="float" office:value="0.0369023">
                <text:p>0.036902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123984">
                <text:p>0.0123984</text:p>
              </table:table-cell>
              <table:table-cell office:value-type="float" office:value="0.014081">
                <text:p>0.014081</text:p>
              </table:table-cell>
              <table:table-cell office:value-type="float" office:value="0.131932">
                <text:p>0.131932</text:p>
              </table:table-cell>
              <table:table-cell office:value-type="float" office:value="0.0343939">
                <text:p>0.034393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125206">
                <text:p>0.0125206</text:p>
              </table:table-cell>
              <table:table-cell office:value-type="float" office:value="0.0132444">
                <text:p>0.0132444</text:p>
              </table:table-cell>
              <table:table-cell office:value-type="float" office:value="0.134102">
                <text:p>0.134102</text:p>
              </table:table-cell>
              <table:table-cell office:value-type="float" office:value="0.0379323">
                <text:p>0.037932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124655">
                <text:p>0.0124655</text:p>
              </table:table-cell>
              <table:table-cell office:value-type="float" office:value="0.0138387">
                <text:p>0.0138387</text:p>
              </table:table-cell>
              <table:table-cell office:value-type="float" office:value="0.132728">
                <text:p>0.132728</text:p>
              </table:table-cell>
              <table:table-cell office:value-type="float" office:value="0.0372496">
                <text:p>0.037249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123292">
                <text:p>0.0123292</text:p>
              </table:table-cell>
              <table:table-cell office:value-type="float" office:value="0.0142813">
                <text:p>0.0142813</text:p>
              </table:table-cell>
              <table:table-cell office:value-type="float" office:value="0.130695">
                <text:p>0.130695</text:p>
              </table:table-cell>
              <table:table-cell office:value-type="float" office:value="0.0340575">
                <text:p>0.03405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3121">
                <text:p>0.0123121</text:p>
              </table:table-cell>
              <table:table-cell office:value-type="float" office:value="0.0145121">
                <text:p>0.0145121</text:p>
              </table:table-cell>
              <table:table-cell office:value-type="float" office:value="0.130969">
                <text:p>0.130969</text:p>
              </table:table-cell>
              <table:table-cell office:value-type="float" office:value="0.0332305">
                <text:p>0.033230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122997">
                <text:p>0.0122997</text:p>
              </table:table-cell>
              <table:table-cell office:value-type="float" office:value="0.0166775">
                <text:p>0.0166775</text:p>
              </table:table-cell>
              <table:table-cell office:value-type="float" office:value="0.129465">
                <text:p>0.129465</text:p>
              </table:table-cell>
              <table:table-cell office:value-type="float" office:value="0.0347157">
                <text:p>0.034715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132685">
                <text:p>0.0132685</text:p>
              </table:table-cell>
              <table:table-cell office:value-type="float" office:value="0.0146734">
                <text:p>0.0146734</text:p>
              </table:table-cell>
              <table:table-cell office:value-type="float" office:value="0.129881">
                <text:p>0.129881</text:p>
              </table:table-cell>
              <table:table-cell office:value-type="float" office:value="0.0380776">
                <text:p>0.038077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131114">
                <text:p>0.0131114</text:p>
              </table:table-cell>
              <table:table-cell office:value-type="float" office:value="0.0148585">
                <text:p>0.0148585</text:p>
              </table:table-cell>
              <table:table-cell office:value-type="float" office:value="0.130282">
                <text:p>0.130282</text:p>
              </table:table-cell>
              <table:table-cell office:value-type="float" office:value="0.0382842">
                <text:p>0.038284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125871">
                <text:p>0.0125871</text:p>
              </table:table-cell>
              <table:table-cell office:value-type="float" office:value="0.013501">
                <text:p>0.013501</text:p>
              </table:table-cell>
              <table:table-cell office:value-type="float" office:value="0.130267">
                <text:p>0.130267</text:p>
              </table:table-cell>
              <table:table-cell office:value-type="float" office:value="0.0391789">
                <text:p>0.039178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12661">
                <text:p>0.012661</text:p>
              </table:table-cell>
              <table:table-cell office:value-type="float" office:value="0.0126545">
                <text:p>0.0126545</text:p>
              </table:table-cell>
              <table:table-cell office:value-type="float" office:value="0.132451">
                <text:p>0.132451</text:p>
              </table:table-cell>
              <table:table-cell office:value-type="float" office:value="0.0431732">
                <text:p>0.043173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12466">
                <text:p>0.012466</text:p>
              </table:table-cell>
              <table:table-cell office:value-type="float" office:value="0.0152394">
                <text:p>0.0152394</text:p>
              </table:table-cell>
              <table:table-cell office:value-type="float" office:value="0.13091">
                <text:p>0.13091</text:p>
              </table:table-cell>
              <table:table-cell office:value-type="float" office:value="0.035438">
                <text:p>0.03543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127063">
                <text:p>0.0127063</text:p>
              </table:table-cell>
              <table:table-cell office:value-type="float" office:value="0.0129928">
                <text:p>0.0129928</text:p>
              </table:table-cell>
              <table:table-cell office:value-type="float" office:value="0.130558">
                <text:p>0.130558</text:p>
              </table:table-cell>
              <table:table-cell office:value-type="float" office:value="0.0346849">
                <text:p>0.034684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124436">
                <text:p>0.0124436</text:p>
              </table:table-cell>
              <table:table-cell office:value-type="float" office:value="0.0134436">
                <text:p>0.0134436</text:p>
              </table:table-cell>
              <table:table-cell office:value-type="float" office:value="0.132743">
                <text:p>0.132743</text:p>
              </table:table-cell>
              <table:table-cell office:value-type="float" office:value="0.034872">
                <text:p>0.03487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123905">
                <text:p>0.0123905</text:p>
              </table:table-cell>
              <table:table-cell office:value-type="float" office:value="0.0154509">
                <text:p>0.0154509</text:p>
              </table:table-cell>
              <table:table-cell office:value-type="float" office:value="0.131444">
                <text:p>0.131444</text:p>
              </table:table-cell>
              <table:table-cell office:value-type="float" office:value="0.035021">
                <text:p>0.0350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122916">
                <text:p>0.0122916</text:p>
              </table:table-cell>
              <table:table-cell office:value-type="float" office:value="0.0141601">
                <text:p>0.0141601</text:p>
              </table:table-cell>
              <table:table-cell office:value-type="float" office:value="0.132085">
                <text:p>0.132085</text:p>
              </table:table-cell>
              <table:table-cell office:value-type="float" office:value="0.0367543">
                <text:p>0.036754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12431">
                <text:p>0.012431</text:p>
              </table:table-cell>
              <table:table-cell office:value-type="float" office:value="0.0151578">
                <text:p>0.0151578</text:p>
              </table:table-cell>
              <table:table-cell office:value-type="float" office:value="0.130961">
                <text:p>0.130961</text:p>
              </table:table-cell>
              <table:table-cell office:value-type="float" office:value="0.0368992">
                <text:p>0.036899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141025">
                <text:p>0.0141025</text:p>
              </table:table-cell>
              <table:table-cell office:value-type="float" office:value="0.0138793">
                <text:p>0.0138793</text:p>
              </table:table-cell>
              <table:table-cell office:value-type="float" office:value="0.134253">
                <text:p>0.134253</text:p>
              </table:table-cell>
              <table:table-cell office:value-type="float" office:value="0.0357988">
                <text:p>0.035798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131981">
                <text:p>0.0131981</text:p>
              </table:table-cell>
              <table:table-cell office:value-type="float" office:value="0.0131577">
                <text:p>0.0131577</text:p>
              </table:table-cell>
              <table:table-cell office:value-type="float" office:value="0.137849">
                <text:p>0.137849</text:p>
              </table:table-cell>
              <table:table-cell office:value-type="float" office:value="0.0348954">
                <text:p>0.034895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130854">
                <text:p>0.0130854</text:p>
              </table:table-cell>
              <table:table-cell office:value-type="float" office:value="0.0139925">
                <text:p>0.0139925</text:p>
              </table:table-cell>
              <table:table-cell office:value-type="float" office:value="0.135046">
                <text:p>0.135046</text:p>
              </table:table-cell>
              <table:table-cell office:value-type="float" office:value="0.03807">
                <text:p>0.0380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135299">
                <text:p>0.0135299</text:p>
              </table:table-cell>
              <table:table-cell office:value-type="float" office:value="0.013783">
                <text:p>0.013783</text:p>
              </table:table-cell>
              <table:table-cell office:value-type="float" office:value="0.135141">
                <text:p>0.135141</text:p>
              </table:table-cell>
              <table:table-cell office:value-type="float" office:value="0.0354032">
                <text:p>0.035403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13633">
                <text:p>0.013633</text:p>
              </table:table-cell>
              <table:table-cell office:value-type="float" office:value="0.0142644">
                <text:p>0.0142644</text:p>
              </table:table-cell>
              <table:table-cell office:value-type="float" office:value="0.135898">
                <text:p>0.135898</text:p>
              </table:table-cell>
              <table:table-cell office:value-type="float" office:value="0.0353356">
                <text:p>0.035335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129707">
                <text:p>0.0129707</text:p>
              </table:table-cell>
              <table:table-cell office:value-type="float" office:value="0.0131246">
                <text:p>0.0131246</text:p>
              </table:table-cell>
              <table:table-cell office:value-type="float" office:value="0.135173">
                <text:p>0.135173</text:p>
              </table:table-cell>
              <table:table-cell office:value-type="float" office:value="0.036253">
                <text:p>0.03625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135122">
                <text:p>0.0135122</text:p>
              </table:table-cell>
              <table:table-cell office:value-type="float" office:value="0.0139791">
                <text:p>0.0139791</text:p>
              </table:table-cell>
              <table:table-cell office:value-type="float" office:value="0.126348">
                <text:p>0.126348</text:p>
              </table:table-cell>
              <table:table-cell office:value-type="float" office:value="0.0351761">
                <text:p>0.035176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145966">
                <text:p>0.0145966</text:p>
              </table:table-cell>
              <table:table-cell office:value-type="float" office:value="0.0132992">
                <text:p>0.0132992</text:p>
              </table:table-cell>
              <table:table-cell office:value-type="float" office:value="0.12958">
                <text:p>0.12958</text:p>
              </table:table-cell>
              <table:table-cell office:value-type="float" office:value="0.035999">
                <text:p>0.035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131718">
                <text:p>0.0131718</text:p>
              </table:table-cell>
              <table:table-cell office:value-type="float" office:value="0.013755">
                <text:p>0.013755</text:p>
              </table:table-cell>
              <table:table-cell office:value-type="float" office:value="0.131542">
                <text:p>0.131542</text:p>
              </table:table-cell>
              <table:table-cell office:value-type="float" office:value="0.034764">
                <text:p>0.03476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135688">
                <text:p>0.0135688</text:p>
              </table:table-cell>
              <table:table-cell office:value-type="float" office:value="0.0137026">
                <text:p>0.0137026</text:p>
              </table:table-cell>
              <table:table-cell office:value-type="float" office:value="0.131139">
                <text:p>0.131139</text:p>
              </table:table-cell>
              <table:table-cell office:value-type="float" office:value="0.0340719">
                <text:p>0.034071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131135">
                <text:p>0.0131135</text:p>
              </table:table-cell>
              <table:table-cell office:value-type="float" office:value="0.0132007">
                <text:p>0.0132007</text:p>
              </table:table-cell>
              <table:table-cell office:value-type="float" office:value="0.129693">
                <text:p>0.129693</text:p>
              </table:table-cell>
              <table:table-cell office:value-type="float" office:value="0.0342665">
                <text:p>0.034266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133349">
                <text:p>0.0133349</text:p>
              </table:table-cell>
              <table:table-cell office:value-type="float" office:value="0.0137618">
                <text:p>0.0137618</text:p>
              </table:table-cell>
              <table:table-cell office:value-type="float" office:value="0.13738">
                <text:p>0.13738</text:p>
              </table:table-cell>
              <table:table-cell office:value-type="float" office:value="0.0352377">
                <text:p>0.035237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131721">
                <text:p>0.0131721</text:p>
              </table:table-cell>
              <table:table-cell office:value-type="float" office:value="0.0150857">
                <text:p>0.0150857</text:p>
              </table:table-cell>
              <table:table-cell office:value-type="float" office:value="0.134936">
                <text:p>0.134936</text:p>
              </table:table-cell>
              <table:table-cell office:value-type="float" office:value="0.0353749">
                <text:p>0.035374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166238">
                <text:p>0.0166238</text:p>
              </table:table-cell>
              <table:table-cell office:value-type="float" office:value="0.0134616">
                <text:p>0.0134616</text:p>
              </table:table-cell>
              <table:table-cell office:value-type="float" office:value="0.135026">
                <text:p>0.135026</text:p>
              </table:table-cell>
              <table:table-cell office:value-type="float" office:value="0.0392196">
                <text:p>0.039219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144718">
                <text:p>0.0144718</text:p>
              </table:table-cell>
              <table:table-cell office:value-type="float" office:value="0.0131955">
                <text:p>0.0131955</text:p>
              </table:table-cell>
              <table:table-cell office:value-type="float" office:value="0.1296">
                <text:p>0.1296</text:p>
              </table:table-cell>
              <table:table-cell office:value-type="float" office:value="0.0383057">
                <text:p>0.038305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134536">
                <text:p>0.0134536</text:p>
              </table:table-cell>
              <table:table-cell office:value-type="float" office:value="0.0135326">
                <text:p>0.0135326</text:p>
              </table:table-cell>
              <table:table-cell office:value-type="float" office:value="0.13085">
                <text:p>0.13085</text:p>
              </table:table-cell>
              <table:table-cell office:value-type="float" office:value="0.0392753">
                <text:p>0.039275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159125">
                <text:p>0.0159125</text:p>
              </table:table-cell>
              <table:table-cell office:value-type="float" office:value="0.0135881">
                <text:p>0.0135881</text:p>
              </table:table-cell>
              <table:table-cell office:value-type="float" office:value="0.131269">
                <text:p>0.131269</text:p>
              </table:table-cell>
              <table:table-cell office:value-type="float" office:value="0.036056">
                <text:p>0.03605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161581">
                <text:p>0.0161581</text:p>
              </table:table-cell>
              <table:table-cell office:value-type="float" office:value="0.0132297">
                <text:p>0.0132297</text:p>
              </table:table-cell>
              <table:table-cell office:value-type="float" office:value="0.131542">
                <text:p>0.131542</text:p>
              </table:table-cell>
              <table:table-cell office:value-type="float" office:value="0.0360692">
                <text:p>0.03606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127665">
                <text:p>0.0127665</text:p>
              </table:table-cell>
              <table:table-cell office:value-type="float" office:value="0.0147311">
                <text:p>0.0147311</text:p>
              </table:table-cell>
              <table:table-cell office:value-type="float" office:value="0.132183">
                <text:p>0.132183</text:p>
              </table:table-cell>
              <table:table-cell office:value-type="float" office:value="0.0332194">
                <text:p>0.033219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123497">
                <text:p>0.0123497</text:p>
              </table:table-cell>
              <table:table-cell office:value-type="float" office:value="0.0123716">
                <text:p>0.0123716</text:p>
              </table:table-cell>
              <table:table-cell office:value-type="float" office:value="0.136146">
                <text:p>0.136146</text:p>
              </table:table-cell>
              <table:table-cell office:value-type="float" office:value="0.0346291">
                <text:p>0.034629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130261">
                <text:p>0.0130261</text:p>
              </table:table-cell>
              <table:table-cell office:value-type="float" office:value="0.0141301">
                <text:p>0.0141301</text:p>
              </table:table-cell>
              <table:table-cell office:value-type="float" office:value="0.135397">
                <text:p>0.135397</text:p>
              </table:table-cell>
              <table:table-cell office:value-type="float" office:value="0.0351165">
                <text:p>0.035116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133077">
                <text:p>0.0133077</text:p>
              </table:table-cell>
              <table:table-cell office:value-type="float" office:value="0.0139415">
                <text:p>0.0139415</text:p>
              </table:table-cell>
              <table:table-cell office:value-type="float" office:value="0.134798">
                <text:p>0.134798</text:p>
              </table:table-cell>
              <table:table-cell office:value-type="float" office:value="0.0342695">
                <text:p>0.034269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130332">
                <text:p>0.0130332</text:p>
              </table:table-cell>
              <table:table-cell office:value-type="float" office:value="0.0131594">
                <text:p>0.0131594</text:p>
              </table:table-cell>
              <table:table-cell office:value-type="float" office:value="0.134573">
                <text:p>0.134573</text:p>
              </table:table-cell>
              <table:table-cell office:value-type="float" office:value="0.0347081">
                <text:p>0.034708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13063">
                <text:p>0.013063</text:p>
              </table:table-cell>
              <table:table-cell office:value-type="float" office:value="0.0140584">
                <text:p>0.0140584</text:p>
              </table:table-cell>
              <table:table-cell office:value-type="float" office:value="0.139771">
                <text:p>0.139771</text:p>
              </table:table-cell>
              <table:table-cell office:value-type="float" office:value="0.0356523">
                <text:p>0.035652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134461">
                <text:p>0.0134461</text:p>
              </table:table-cell>
              <table:table-cell office:value-type="float" office:value="0.0136919">
                <text:p>0.0136919</text:p>
              </table:table-cell>
              <table:table-cell office:value-type="float" office:value="0.136447">
                <text:p>0.136447</text:p>
              </table:table-cell>
              <table:table-cell office:value-type="float" office:value="0.0352988">
                <text:p>0.035298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138798">
                <text:p>0.0138798</text:p>
              </table:table-cell>
              <table:table-cell office:value-type="float" office:value="0.0129706">
                <text:p>0.0129706</text:p>
              </table:table-cell>
              <table:table-cell office:value-type="float" office:value="0.135773">
                <text:p>0.135773</text:p>
              </table:table-cell>
              <table:table-cell office:value-type="float" office:value="0.0360773">
                <text:p>0.036077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125461">
                <text:p>0.0125461</text:p>
              </table:table-cell>
              <table:table-cell office:value-type="float" office:value="0.0134076">
                <text:p>0.0134076</text:p>
              </table:table-cell>
              <table:table-cell office:value-type="float" office:value="0.13495">
                <text:p>0.13495</text:p>
              </table:table-cell>
              <table:table-cell office:value-type="float" office:value="0.036734">
                <text:p>0.03673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124104">
                <text:p>0.0124104</text:p>
              </table:table-cell>
              <table:table-cell office:value-type="float" office:value="0.012839">
                <text:p>0.012839</text:p>
              </table:table-cell>
              <table:table-cell office:value-type="float" office:value="0.139616">
                <text:p>0.139616</text:p>
              </table:table-cell>
              <table:table-cell office:value-type="float" office:value="0.03612">
                <text:p>0.036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125168">
                <text:p>0.0125168</text:p>
              </table:table-cell>
              <table:table-cell office:value-type="float" office:value="0.013539">
                <text:p>0.013539</text:p>
              </table:table-cell>
              <table:table-cell office:value-type="float" office:value="0.135236">
                <text:p>0.135236</text:p>
              </table:table-cell>
              <table:table-cell office:value-type="float" office:value="0.0366758">
                <text:p>0.036675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121041">
                <text:p>0.0121041</text:p>
              </table:table-cell>
              <table:table-cell office:value-type="float" office:value="0.0132336">
                <text:p>0.0132336</text:p>
              </table:table-cell>
              <table:table-cell office:value-type="float" office:value="0.136591">
                <text:p>0.136591</text:p>
              </table:table-cell>
              <table:table-cell office:value-type="float" office:value="0.0350727">
                <text:p>0.03507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14783">
                <text:p>0.014783</text:p>
              </table:table-cell>
              <table:table-cell office:value-type="float" office:value="0.0162618">
                <text:p>0.0162618</text:p>
              </table:table-cell>
              <table:table-cell office:value-type="float" office:value="0.139859">
                <text:p>0.139859</text:p>
              </table:table-cell>
              <table:table-cell office:value-type="float" office:value="0.0362303">
                <text:p>0.036230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132">
                <text:p>0.0132</text:p>
              </table:table-cell>
              <table:table-cell office:value-type="float" office:value="0.0144687">
                <text:p>0.0144687</text:p>
              </table:table-cell>
              <table:table-cell office:value-type="float" office:value="0.135658">
                <text:p>0.135658</text:p>
              </table:table-cell>
              <table:table-cell office:value-type="float" office:value="0.0373176">
                <text:p>0.037317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124283">
                <text:p>0.0124283</text:p>
              </table:table-cell>
              <table:table-cell office:value-type="float" office:value="0.0157064">
                <text:p>0.0157064</text:p>
              </table:table-cell>
              <table:table-cell office:value-type="float" office:value="0.134298">
                <text:p>0.134298</text:p>
              </table:table-cell>
              <table:table-cell office:value-type="float" office:value="0.0336298">
                <text:p>0.033629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128526">
                <text:p>0.0128526</text:p>
              </table:table-cell>
              <table:table-cell office:value-type="float" office:value="0.014088">
                <text:p>0.014088</text:p>
              </table:table-cell>
              <table:table-cell office:value-type="float" office:value="0.134149">
                <text:p>0.134149</text:p>
              </table:table-cell>
              <table:table-cell office:value-type="float" office:value="0.0353096">
                <text:p>0.035309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137412">
                <text:p>0.0137412</text:p>
              </table:table-cell>
              <table:table-cell office:value-type="float" office:value="0.0139595">
                <text:p>0.0139595</text:p>
              </table:table-cell>
              <table:table-cell office:value-type="float" office:value="0.126891">
                <text:p>0.126891</text:p>
              </table:table-cell>
              <table:table-cell office:value-type="float" office:value="0.0355551">
                <text:p>0.035555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130967">
                <text:p>0.0130967</text:p>
              </table:table-cell>
              <table:table-cell office:value-type="float" office:value="0.0139853">
                <text:p>0.0139853</text:p>
              </table:table-cell>
              <table:table-cell office:value-type="float" office:value="0.130923">
                <text:p>0.130923</text:p>
              </table:table-cell>
              <table:table-cell office:value-type="float" office:value="0.0373903">
                <text:p>0.037390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130905">
                <text:p>0.0130905</text:p>
              </table:table-cell>
              <table:table-cell office:value-type="float" office:value="0.0143685">
                <text:p>0.0143685</text:p>
              </table:table-cell>
              <table:table-cell office:value-type="float" office:value="0.129177">
                <text:p>0.129177</text:p>
              </table:table-cell>
              <table:table-cell office:value-type="float" office:value="0.0359371">
                <text:p>0.035937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161608">
                <text:p>0.0161608</text:p>
              </table:table-cell>
              <table:table-cell office:value-type="float" office:value="0.0137413">
                <text:p>0.0137413</text:p>
              </table:table-cell>
              <table:table-cell office:value-type="float" office:value="0.129115">
                <text:p>0.129115</text:p>
              </table:table-cell>
              <table:table-cell office:value-type="float" office:value="0.0335956">
                <text:p>0.03359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141853">
                <text:p>0.0141853</text:p>
              </table:table-cell>
              <table:table-cell office:value-type="float" office:value="0.0135211">
                <text:p>0.0135211</text:p>
              </table:table-cell>
              <table:table-cell office:value-type="float" office:value="0.133243">
                <text:p>0.133243</text:p>
              </table:table-cell>
              <table:table-cell office:value-type="float" office:value="0.0358008">
                <text:p>0.035800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129545">
                <text:p>0.0129545</text:p>
              </table:table-cell>
              <table:table-cell office:value-type="float" office:value="0.0149199">
                <text:p>0.0149199</text:p>
              </table:table-cell>
              <table:table-cell office:value-type="float" office:value="0.129229">
                <text:p>0.129229</text:p>
              </table:table-cell>
              <table:table-cell office:value-type="float" office:value="0.0375068">
                <text:p>0.037506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122975">
                <text:p>0.0122975</text:p>
              </table:table-cell>
              <table:table-cell office:value-type="float" office:value="0.0140965">
                <text:p>0.0140965</text:p>
              </table:table-cell>
              <table:table-cell office:value-type="float" office:value="0.129401">
                <text:p>0.129401</text:p>
              </table:table-cell>
              <table:table-cell office:value-type="float" office:value="0.0398163">
                <text:p>0.039816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123883">
                <text:p>0.0123883</text:p>
              </table:table-cell>
              <table:table-cell office:value-type="float" office:value="0.0143916">
                <text:p>0.0143916</text:p>
              </table:table-cell>
              <table:table-cell office:value-type="float" office:value="0.130199">
                <text:p>0.130199</text:p>
              </table:table-cell>
              <table:table-cell office:value-type="float" office:value="0.0361117">
                <text:p>0.036111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128221">
                <text:p>0.0128221</text:p>
              </table:table-cell>
              <table:table-cell office:value-type="float" office:value="0.0141737">
                <text:p>0.0141737</text:p>
              </table:table-cell>
              <table:table-cell office:value-type="float" office:value="0.133007">
                <text:p>0.133007</text:p>
              </table:table-cell>
              <table:table-cell office:value-type="float" office:value="0.0373713">
                <text:p>0.037371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119315">
                <text:p>0.0119315</text:p>
              </table:table-cell>
              <table:table-cell office:value-type="float" office:value="0.0123177">
                <text:p>0.0123177</text:p>
              </table:table-cell>
              <table:table-cell office:value-type="float" office:value="0.139798">
                <text:p>0.139798</text:p>
              </table:table-cell>
              <table:table-cell office:value-type="float" office:value="0.0382156">
                <text:p>0.038215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124148">
                <text:p>0.0124148</text:p>
              </table:table-cell>
              <table:table-cell office:value-type="float" office:value="0.0135005">
                <text:p>0.0135005</text:p>
              </table:table-cell>
              <table:table-cell office:value-type="float" office:value="0.135619">
                <text:p>0.135619</text:p>
              </table:table-cell>
              <table:table-cell office:value-type="float" office:value="0.0414632">
                <text:p>0.041463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123213">
                <text:p>0.0123213</text:p>
              </table:table-cell>
              <table:table-cell office:value-type="float" office:value="0.0137277">
                <text:p>0.0137277</text:p>
              </table:table-cell>
              <table:table-cell office:value-type="float" office:value="0.135419">
                <text:p>0.135419</text:p>
              </table:table-cell>
              <table:table-cell office:value-type="float" office:value="0.0358048">
                <text:p>0.035804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12341">
                <text:p>0.012341</text:p>
              </table:table-cell>
              <table:table-cell office:value-type="float" office:value="0.0160114">
                <text:p>0.0160114</text:p>
              </table:table-cell>
              <table:table-cell office:value-type="float" office:value="0.135009">
                <text:p>0.135009</text:p>
              </table:table-cell>
              <table:table-cell office:value-type="float" office:value="0.0370591">
                <text:p>0.037059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124405">
                <text:p>0.0124405</text:p>
              </table:table-cell>
              <table:table-cell office:value-type="float" office:value="0.017496">
                <text:p>0.017496</text:p>
              </table:table-cell>
              <table:table-cell office:value-type="float" office:value="0.134787">
                <text:p>0.134787</text:p>
              </table:table-cell>
              <table:table-cell office:value-type="float" office:value="0.03836">
                <text:p>0.0383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124297">
                <text:p>0.0124297</text:p>
              </table:table-cell>
              <table:table-cell office:value-type="float" office:value="0.0133368">
                <text:p>0.0133368</text:p>
              </table:table-cell>
              <table:table-cell office:value-type="float" office:value="0.134987">
                <text:p>0.134987</text:p>
              </table:table-cell>
              <table:table-cell office:value-type="float" office:value="0.0383301">
                <text:p>0.038330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123126">
                <text:p>0.0123126</text:p>
              </table:table-cell>
              <table:table-cell office:value-type="float" office:value="0.0148113">
                <text:p>0.0148113</text:p>
              </table:table-cell>
              <table:table-cell office:value-type="float" office:value="0.139857">
                <text:p>0.139857</text:p>
              </table:table-cell>
              <table:table-cell office:value-type="float" office:value="0.0373331">
                <text:p>0.03733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126986">
                <text:p>0.0126986</text:p>
              </table:table-cell>
              <table:table-cell office:value-type="float" office:value="0.0137206">
                <text:p>0.0137206</text:p>
              </table:table-cell>
              <table:table-cell office:value-type="float" office:value="0.139785">
                <text:p>0.139785</text:p>
              </table:table-cell>
              <table:table-cell office:value-type="float" office:value="0.0375989">
                <text:p>0.037598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124938">
                <text:p>0.0124938</text:p>
              </table:table-cell>
              <table:table-cell office:value-type="float" office:value="0.0137158">
                <text:p>0.0137158</text:p>
              </table:table-cell>
              <table:table-cell office:value-type="float" office:value="0.135336">
                <text:p>0.135336</text:p>
              </table:table-cell>
              <table:table-cell office:value-type="float" office:value="0.0368113">
                <text:p>0.036811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127447">
                <text:p>0.0127447</text:p>
              </table:table-cell>
              <table:table-cell office:value-type="float" office:value="0.0126102">
                <text:p>0.0126102</text:p>
              </table:table-cell>
              <table:table-cell office:value-type="float" office:value="0.134568">
                <text:p>0.134568</text:p>
              </table:table-cell>
              <table:table-cell office:value-type="float" office:value="0.0370713">
                <text:p>0.037071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131686">
                <text:p>0.0131686</text:p>
              </table:table-cell>
              <table:table-cell office:value-type="float" office:value="0.0136541">
                <text:p>0.0136541</text:p>
              </table:table-cell>
              <table:table-cell office:value-type="float" office:value="0.137158">
                <text:p>0.137158</text:p>
              </table:table-cell>
              <table:table-cell office:value-type="float" office:value="0.0370932">
                <text:p>0.037093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159602">
                <text:p>0.0159602</text:p>
              </table:table-cell>
              <table:table-cell office:value-type="float" office:value="0.0136275">
                <text:p>0.0136275</text:p>
              </table:table-cell>
              <table:table-cell office:value-type="float" office:value="0.13812">
                <text:p>0.13812</text:p>
              </table:table-cell>
              <table:table-cell office:value-type="float" office:value="0.0379719">
                <text:p>0.037971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166033">
                <text:p>0.0166033</text:p>
              </table:table-cell>
              <table:table-cell office:value-type="float" office:value="0.0143582">
                <text:p>0.0143582</text:p>
              </table:table-cell>
              <table:table-cell office:value-type="float" office:value="0.131931">
                <text:p>0.131931</text:p>
              </table:table-cell>
              <table:table-cell office:value-type="float" office:value="0.0372787">
                <text:p>0.037278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147712">
                <text:p>0.0147712</text:p>
              </table:table-cell>
              <table:table-cell office:value-type="float" office:value="0.0135333">
                <text:p>0.0135333</text:p>
              </table:table-cell>
              <table:table-cell office:value-type="float" office:value="0.130594">
                <text:p>0.130594</text:p>
              </table:table-cell>
              <table:table-cell office:value-type="float" office:value="0.0369576">
                <text:p>0.036957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127869">
                <text:p>0.0127869</text:p>
              </table:table-cell>
              <table:table-cell office:value-type="float" office:value="0.0135671">
                <text:p>0.0135671</text:p>
              </table:table-cell>
              <table:table-cell office:value-type="float" office:value="0.132158">
                <text:p>0.132158</text:p>
              </table:table-cell>
              <table:table-cell office:value-type="float" office:value="0.0364576">
                <text:p>0.036457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126248">
                <text:p>0.0126248</text:p>
              </table:table-cell>
              <table:table-cell office:value-type="float" office:value="0.0135102">
                <text:p>0.0135102</text:p>
              </table:table-cell>
              <table:table-cell office:value-type="float" office:value="0.129636">
                <text:p>0.129636</text:p>
              </table:table-cell>
              <table:table-cell office:value-type="float" office:value="0.0404143">
                <text:p>0.040414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12488">
                <text:p>0.012488</text:p>
              </table:table-cell>
              <table:table-cell office:value-type="float" office:value="0.0130122">
                <text:p>0.0130122</text:p>
              </table:table-cell>
              <table:table-cell office:value-type="float" office:value="0.1285">
                <text:p>0.1285</text:p>
              </table:table-cell>
              <table:table-cell office:value-type="float" office:value="0.036537">
                <text:p>0.03653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124777">
                <text:p>0.0124777</text:p>
              </table:table-cell>
              <table:table-cell office:value-type="float" office:value="0.014648">
                <text:p>0.014648</text:p>
              </table:table-cell>
              <table:table-cell office:value-type="float" office:value="0.131808">
                <text:p>0.131808</text:p>
              </table:table-cell>
              <table:table-cell office:value-type="float" office:value="0.0390617">
                <text:p>0.039061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12567">
                <text:p>0.012567</text:p>
              </table:table-cell>
              <table:table-cell office:value-type="float" office:value="0.0127654">
                <text:p>0.0127654</text:p>
              </table:table-cell>
              <table:table-cell office:value-type="float" office:value="0.132569">
                <text:p>0.132569</text:p>
              </table:table-cell>
              <table:table-cell office:value-type="float" office:value="0.0357862">
                <text:p>0.035786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12402">
                <text:p>0.012402</text:p>
              </table:table-cell>
              <table:table-cell office:value-type="float" office:value="0.0129961">
                <text:p>0.0129961</text:p>
              </table:table-cell>
              <table:table-cell office:value-type="float" office:value="0.130811">
                <text:p>0.130811</text:p>
              </table:table-cell>
              <table:table-cell office:value-type="float" office:value="0.0357076">
                <text:p>0.035707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123841">
                <text:p>0.0123841</text:p>
              </table:table-cell>
              <table:table-cell office:value-type="float" office:value="0.0145266">
                <text:p>0.0145266</text:p>
              </table:table-cell>
              <table:table-cell office:value-type="float" office:value="0.130989">
                <text:p>0.130989</text:p>
              </table:table-cell>
              <table:table-cell office:value-type="float" office:value="0.0355603">
                <text:p>0.035560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12506">
                <text:p>0.012506</text:p>
              </table:table-cell>
              <table:table-cell office:value-type="float" office:value="0.0156844">
                <text:p>0.0156844</text:p>
              </table:table-cell>
              <table:table-cell office:value-type="float" office:value="0.135541">
                <text:p>0.135541</text:p>
              </table:table-cell>
              <table:table-cell office:value-type="float" office:value="0.0356637">
                <text:p>0.035663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1248">
                <text:p>0.01248</text:p>
              </table:table-cell>
              <table:table-cell office:value-type="float" office:value="0.0131448">
                <text:p>0.0131448</text:p>
              </table:table-cell>
              <table:table-cell office:value-type="float" office:value="0.135608">
                <text:p>0.135608</text:p>
              </table:table-cell>
              <table:table-cell office:value-type="float" office:value="0.0369313">
                <text:p>0.036931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127541">
                <text:p>0.0127541</text:p>
              </table:table-cell>
              <table:table-cell office:value-type="float" office:value="0.0142875">
                <text:p>0.0142875</text:p>
              </table:table-cell>
              <table:table-cell office:value-type="float" office:value="0.134613">
                <text:p>0.134613</text:p>
              </table:table-cell>
              <table:table-cell office:value-type="float" office:value="0.034232">
                <text:p>0.03423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123456">
                <text:p>0.0123456</text:p>
              </table:table-cell>
              <table:table-cell office:value-type="float" office:value="0.0151146">
                <text:p>0.0151146</text:p>
              </table:table-cell>
              <table:table-cell office:value-type="float" office:value="0.13465">
                <text:p>0.13465</text:p>
              </table:table-cell>
              <table:table-cell office:value-type="float" office:value="0.032822">
                <text:p>0.03282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123782">
                <text:p>0.0123782</text:p>
              </table:table-cell>
              <table:table-cell office:value-type="float" office:value="0.014677">
                <text:p>0.014677</text:p>
              </table:table-cell>
              <table:table-cell office:value-type="float" office:value="0.138956">
                <text:p>0.138956</text:p>
              </table:table-cell>
              <table:table-cell office:value-type="float" office:value="0.0342163">
                <text:p>0.034216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12427">
                <text:p>0.012427</text:p>
              </table:table-cell>
              <table:table-cell office:value-type="float" office:value="0.0134544">
                <text:p>0.0134544</text:p>
              </table:table-cell>
              <table:table-cell office:value-type="float" office:value="0.128067">
                <text:p>0.128067</text:p>
              </table:table-cell>
              <table:table-cell office:value-type="float" office:value="0.0339685">
                <text:p>0.033968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125041">
                <text:p>0.0125041</text:p>
              </table:table-cell>
              <table:table-cell office:value-type="float" office:value="0.015566">
                <text:p>0.015566</text:p>
              </table:table-cell>
              <table:table-cell office:value-type="float" office:value="0.128544">
                <text:p>0.128544</text:p>
              </table:table-cell>
              <table:table-cell office:value-type="float" office:value="0.038394">
                <text:p>0.03839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129076">
                <text:p>0.0129076</text:p>
              </table:table-cell>
              <table:table-cell office:value-type="float" office:value="0.01334">
                <text:p>0.01334</text:p>
              </table:table-cell>
              <table:table-cell office:value-type="float" office:value="0.129568">
                <text:p>0.129568</text:p>
              </table:table-cell>
              <table:table-cell office:value-type="float" office:value="0.0342457">
                <text:p>0.034245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122052">
                <text:p>0.0122052</text:p>
              </table:table-cell>
              <table:table-cell office:value-type="float" office:value="0.0134775">
                <text:p>0.0134775</text:p>
              </table:table-cell>
              <table:table-cell office:value-type="float" office:value="0.129219">
                <text:p>0.129219</text:p>
              </table:table-cell>
              <table:table-cell office:value-type="float" office:value="0.0357537">
                <text:p>0.035753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127769">
                <text:p>0.0127769</text:p>
              </table:table-cell>
              <table:table-cell office:value-type="float" office:value="0.0129184">
                <text:p>0.0129184</text:p>
              </table:table-cell>
              <table:table-cell office:value-type="float" office:value="0.129933">
                <text:p>0.129933</text:p>
              </table:table-cell>
              <table:table-cell office:value-type="float" office:value="0.0353362">
                <text:p>0.035336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125546">
                <text:p>0.0125546</text:p>
              </table:table-cell>
              <table:table-cell office:value-type="float" office:value="0.014195">
                <text:p>0.014195</text:p>
              </table:table-cell>
              <table:table-cell office:value-type="float" office:value="0.128654">
                <text:p>0.128654</text:p>
              </table:table-cell>
              <table:table-cell office:value-type="float" office:value="0.0366101">
                <text:p>0.036610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128157">
                <text:p>0.0128157</text:p>
              </table:table-cell>
              <table:table-cell office:value-type="float" office:value="0.0119175">
                <text:p>0.0119175</text:p>
              </table:table-cell>
              <table:table-cell office:value-type="float" office:value="0.132814">
                <text:p>0.132814</text:p>
              </table:table-cell>
              <table:table-cell office:value-type="float" office:value="0.0330564">
                <text:p>0.033056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125713">
                <text:p>0.0125713</text:p>
              </table:table-cell>
              <table:table-cell office:value-type="float" office:value="0.0132982">
                <text:p>0.0132982</text:p>
              </table:table-cell>
              <table:table-cell office:value-type="float" office:value="0.134941">
                <text:p>0.134941</text:p>
              </table:table-cell>
              <table:table-cell office:value-type="float" office:value="0.0347487">
                <text:p>0.034748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123946">
                <text:p>0.0123946</text:p>
              </table:table-cell>
              <table:table-cell office:value-type="float" office:value="0.0126571">
                <text:p>0.0126571</text:p>
              </table:table-cell>
              <table:table-cell office:value-type="float" office:value="0.134318">
                <text:p>0.134318</text:p>
              </table:table-cell>
              <table:table-cell office:value-type="float" office:value="0.0354522">
                <text:p>0.035452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123195">
                <text:p>0.0123195</text:p>
              </table:table-cell>
              <table:table-cell office:value-type="float" office:value="0.0144449">
                <text:p>0.0144449</text:p>
              </table:table-cell>
              <table:table-cell office:value-type="float" office:value="0.133843">
                <text:p>0.133843</text:p>
              </table:table-cell>
              <table:table-cell office:value-type="float" office:value="0.0347258">
                <text:p>0.034725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124971">
                <text:p>0.0124971</text:p>
              </table:table-cell>
              <table:table-cell office:value-type="float" office:value="0.0140252">
                <text:p>0.0140252</text:p>
              </table:table-cell>
              <table:table-cell office:value-type="float" office:value="0.135785">
                <text:p>0.135785</text:p>
              </table:table-cell>
              <table:table-cell office:value-type="float" office:value="0.0351132">
                <text:p>0.035113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126044">
                <text:p>0.0126044</text:p>
              </table:table-cell>
              <table:table-cell office:value-type="float" office:value="0.0129752">
                <text:p>0.0129752</text:p>
              </table:table-cell>
              <table:table-cell office:value-type="float" office:value="0.135095">
                <text:p>0.135095</text:p>
              </table:table-cell>
              <table:table-cell office:value-type="float" office:value="0.0369207">
                <text:p>0.036920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123266">
                <text:p>0.0123266</text:p>
              </table:table-cell>
              <table:table-cell office:value-type="float" office:value="0.0141994">
                <text:p>0.0141994</text:p>
              </table:table-cell>
              <table:table-cell office:value-type="float" office:value="0.135204">
                <text:p>0.135204</text:p>
              </table:table-cell>
              <table:table-cell office:value-type="float" office:value="0.0344331">
                <text:p>0.034433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12238">
                <text:p>0.012238</text:p>
              </table:table-cell>
              <table:table-cell office:value-type="float" office:value="0.0156352">
                <text:p>0.0156352</text:p>
              </table:table-cell>
              <table:table-cell office:value-type="float" office:value="0.136283">
                <text:p>0.136283</text:p>
              </table:table-cell>
              <table:table-cell office:value-type="float" office:value="0.0341228">
                <text:p>0.034122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148122">
                <text:p>0.0148122</text:p>
              </table:table-cell>
              <table:table-cell office:value-type="float" office:value="0.012946">
                <text:p>0.012946</text:p>
              </table:table-cell>
              <table:table-cell office:value-type="float" office:value="0.137352">
                <text:p>0.137352</text:p>
              </table:table-cell>
              <table:table-cell office:value-type="float" office:value="0.0357084">
                <text:p>0.035708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136565">
                <text:p>0.0136565</text:p>
              </table:table-cell>
              <table:table-cell office:value-type="float" office:value="0.0144578">
                <text:p>0.0144578</text:p>
              </table:table-cell>
              <table:table-cell office:value-type="float" office:value="0.126856">
                <text:p>0.126856</text:p>
              </table:table-cell>
              <table:table-cell office:value-type="float" office:value="0.0362249">
                <text:p>0.036224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123558">
                <text:p>0.0123558</text:p>
              </table:table-cell>
              <table:table-cell office:value-type="float" office:value="0.0138345">
                <text:p>0.0138345</text:p>
              </table:table-cell>
              <table:table-cell office:value-type="float" office:value="0.129686">
                <text:p>0.129686</text:p>
              </table:table-cell>
              <table:table-cell office:value-type="float" office:value="0.0349468">
                <text:p>0.034946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124317">
                <text:p>0.0124317</text:p>
              </table:table-cell>
              <table:table-cell office:value-type="float" office:value="0.0136072">
                <text:p>0.0136072</text:p>
              </table:table-cell>
              <table:table-cell office:value-type="float" office:value="0.129088">
                <text:p>0.129088</text:p>
              </table:table-cell>
              <table:table-cell office:value-type="float" office:value="0.0356649">
                <text:p>0.035664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123965">
                <text:p>0.0123965</text:p>
              </table:table-cell>
              <table:table-cell office:value-type="float" office:value="0.0151473">
                <text:p>0.0151473</text:p>
              </table:table-cell>
              <table:table-cell office:value-type="float" office:value="0.129129">
                <text:p>0.129129</text:p>
              </table:table-cell>
              <table:table-cell office:value-type="float" office:value="0.0367364">
                <text:p>0.03673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24996">
                <text:p>0.0124996</text:p>
              </table:table-cell>
              <table:table-cell office:value-type="float" office:value="0.0130722">
                <text:p>0.0130722</text:p>
              </table:table-cell>
              <table:table-cell office:value-type="float" office:value="0.129801">
                <text:p>0.129801</text:p>
              </table:table-cell>
              <table:table-cell office:value-type="float" office:value="0.0355533">
                <text:p>0.035553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123842">
                <text:p>0.0123842</text:p>
              </table:table-cell>
              <table:table-cell office:value-type="float" office:value="0.0126989">
                <text:p>0.0126989</text:p>
              </table:table-cell>
              <table:table-cell office:value-type="float" office:value="0.129371">
                <text:p>0.129371</text:p>
              </table:table-cell>
              <table:table-cell office:value-type="float" office:value="0.0366992">
                <text:p>0.036699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123744">
                <text:p>0.0123744</text:p>
              </table:table-cell>
              <table:table-cell office:value-type="float" office:value="0.0132613">
                <text:p>0.0132613</text:p>
              </table:table-cell>
              <table:table-cell office:value-type="float" office:value="0.131392">
                <text:p>0.131392</text:p>
              </table:table-cell>
              <table:table-cell office:value-type="float" office:value="0.037617">
                <text:p>0.03761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124906">
                <text:p>0.0124906</text:p>
              </table:table-cell>
              <table:table-cell office:value-type="float" office:value="0.0129488">
                <text:p>0.0129488</text:p>
              </table:table-cell>
              <table:table-cell office:value-type="float" office:value="0.131751">
                <text:p>0.131751</text:p>
              </table:table-cell>
              <table:table-cell office:value-type="float" office:value="0.0356707">
                <text:p>0.035670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146186">
                <text:p>0.0146186</text:p>
              </table:table-cell>
              <table:table-cell office:value-type="float" office:value="0.0144428">
                <text:p>0.0144428</text:p>
              </table:table-cell>
              <table:table-cell office:value-type="float" office:value="0.130665">
                <text:p>0.130665</text:p>
              </table:table-cell>
              <table:table-cell office:value-type="float" office:value="0.0349679">
                <text:p>0.034967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128484">
                <text:p>0.0128484</text:p>
              </table:table-cell>
              <table:table-cell office:value-type="float" office:value="0.0149245">
                <text:p>0.0149245</text:p>
              </table:table-cell>
              <table:table-cell office:value-type="float" office:value="0.129678">
                <text:p>0.129678</text:p>
              </table:table-cell>
              <table:table-cell office:value-type="float" office:value="0.0362645">
                <text:p>0.036264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127118">
                <text:p>0.0127118</text:p>
              </table:table-cell>
              <table:table-cell office:value-type="float" office:value="0.0145377">
                <text:p>0.0145377</text:p>
              </table:table-cell>
              <table:table-cell office:value-type="float" office:value="0.132674">
                <text:p>0.132674</text:p>
              </table:table-cell>
              <table:table-cell office:value-type="float" office:value="0.0348906">
                <text:p>0.034890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123333">
                <text:p>0.0123333</text:p>
              </table:table-cell>
              <table:table-cell office:value-type="float" office:value="0.0132508">
                <text:p>0.0132508</text:p>
              </table:table-cell>
              <table:table-cell office:value-type="float" office:value="0.134525">
                <text:p>0.134525</text:p>
              </table:table-cell>
              <table:table-cell office:value-type="float" office:value="0.0336083">
                <text:p>0.033608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123629">
                <text:p>0.0123629</text:p>
              </table:table-cell>
              <table:table-cell office:value-type="float" office:value="0.0136403">
                <text:p>0.0136403</text:p>
              </table:table-cell>
              <table:table-cell office:value-type="float" office:value="0.134258">
                <text:p>0.134258</text:p>
              </table:table-cell>
              <table:table-cell office:value-type="float" office:value="0.0340482">
                <text:p>0.034048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137512">
                <text:p>0.0137512</text:p>
              </table:table-cell>
              <table:table-cell office:value-type="float" office:value="0.0130623">
                <text:p>0.0130623</text:p>
              </table:table-cell>
              <table:table-cell office:value-type="float" office:value="0.135054">
                <text:p>0.135054</text:p>
              </table:table-cell>
              <table:table-cell office:value-type="float" office:value="0.034539">
                <text:p>0.03453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142603">
                <text:p>0.0142603</text:p>
              </table:table-cell>
              <table:table-cell office:value-type="float" office:value="0.0142343">
                <text:p>0.0142343</text:p>
              </table:table-cell>
              <table:table-cell office:value-type="float" office:value="0.136136">
                <text:p>0.136136</text:p>
              </table:table-cell>
              <table:table-cell office:value-type="float" office:value="0.0343181">
                <text:p>0.034318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137718">
                <text:p>0.0137718</text:p>
              </table:table-cell>
              <table:table-cell office:value-type="float" office:value="0.0141542">
                <text:p>0.0141542</text:p>
              </table:table-cell>
              <table:table-cell office:value-type="float" office:value="0.135586">
                <text:p>0.135586</text:p>
              </table:table-cell>
              <table:table-cell office:value-type="float" office:value="0.0367256">
                <text:p>0.036725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125703">
                <text:p>0.0125703</text:p>
              </table:table-cell>
              <table:table-cell office:value-type="float" office:value="0.0138256">
                <text:p>0.0138256</text:p>
              </table:table-cell>
              <table:table-cell office:value-type="float" office:value="0.137139">
                <text:p>0.137139</text:p>
              </table:table-cell>
              <table:table-cell office:value-type="float" office:value="0.0354099">
                <text:p>0.03540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124338">
                <text:p>0.0124338</text:p>
              </table:table-cell>
              <table:table-cell office:value-type="float" office:value="0.0133807">
                <text:p>0.0133807</text:p>
              </table:table-cell>
              <table:table-cell office:value-type="float" office:value="0.128634">
                <text:p>0.128634</text:p>
              </table:table-cell>
              <table:table-cell office:value-type="float" office:value="0.0356966">
                <text:p>0.035696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124059">
                <text:p>0.0124059</text:p>
              </table:table-cell>
              <table:table-cell office:value-type="float" office:value="0.0138606">
                <text:p>0.0138606</text:p>
              </table:table-cell>
              <table:table-cell office:value-type="float" office:value="0.129996">
                <text:p>0.129996</text:p>
              </table:table-cell>
              <table:table-cell office:value-type="float" office:value="0.0330638">
                <text:p>0.033063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139502">
                <text:p>0.0139502</text:p>
              </table:table-cell>
              <table:table-cell office:value-type="float" office:value="0.0140887">
                <text:p>0.0140887</text:p>
              </table:table-cell>
              <table:table-cell office:value-type="float" office:value="0.130461">
                <text:p>0.130461</text:p>
              </table:table-cell>
              <table:table-cell office:value-type="float" office:value="0.0351026">
                <text:p>0.035102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132886">
                <text:p>0.0132886</text:p>
              </table:table-cell>
              <table:table-cell office:value-type="float" office:value="0.0175486">
                <text:p>0.0175486</text:p>
              </table:table-cell>
              <table:table-cell office:value-type="float" office:value="0.130078">
                <text:p>0.130078</text:p>
              </table:table-cell>
              <table:table-cell office:value-type="float" office:value="0.0362109">
                <text:p>0.036210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128995">
                <text:p>0.0128995</text:p>
              </table:table-cell>
              <table:table-cell office:value-type="float" office:value="0.0146014">
                <text:p>0.0146014</text:p>
              </table:table-cell>
              <table:table-cell office:value-type="float" office:value="0.129555">
                <text:p>0.129555</text:p>
              </table:table-cell>
              <table:table-cell office:value-type="float" office:value="0.0370667">
                <text:p>0.037066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13378">
                <text:p>0.013378</text:p>
              </table:table-cell>
              <table:table-cell office:value-type="float" office:value="0.0137332">
                <text:p>0.0137332</text:p>
              </table:table-cell>
              <table:table-cell office:value-type="float" office:value="0.132607">
                <text:p>0.132607</text:p>
              </table:table-cell>
              <table:table-cell office:value-type="float" office:value="0.0346082">
                <text:p>0.034608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128398">
                <text:p>0.0128398</text:p>
              </table:table-cell>
              <table:table-cell office:value-type="float" office:value="0.0176903">
                <text:p>0.0176903</text:p>
              </table:table-cell>
              <table:table-cell office:value-type="float" office:value="0.129799">
                <text:p>0.129799</text:p>
              </table:table-cell>
              <table:table-cell office:value-type="float" office:value="0.0355355">
                <text:p>0.035535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131265">
                <text:p>0.0131265</text:p>
              </table:table-cell>
              <table:table-cell office:value-type="float" office:value="0.0157178">
                <text:p>0.0157178</text:p>
              </table:table-cell>
              <table:table-cell office:value-type="float" office:value="0.130341">
                <text:p>0.130341</text:p>
              </table:table-cell>
              <table:table-cell office:value-type="float" office:value="0.0367474">
                <text:p>0.036747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136497">
                <text:p>0.0136497</text:p>
              </table:table-cell>
              <table:table-cell office:value-type="float" office:value="0.0142075">
                <text:p>0.0142075</text:p>
              </table:table-cell>
              <table:table-cell office:value-type="float" office:value="0.130169">
                <text:p>0.130169</text:p>
              </table:table-cell>
              <table:table-cell office:value-type="float" office:value="0.0361032">
                <text:p>0.036103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124277">
                <text:p>0.0124277</text:p>
              </table:table-cell>
              <table:table-cell office:value-type="float" office:value="0.013343">
                <text:p>0.013343</text:p>
              </table:table-cell>
              <table:table-cell office:value-type="float" office:value="0.130437">
                <text:p>0.130437</text:p>
              </table:table-cell>
              <table:table-cell office:value-type="float" office:value="0.0357155">
                <text:p>0.035715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132901">
                <text:p>0.0132901</text:p>
              </table:table-cell>
              <table:table-cell office:value-type="float" office:value="0.0128871">
                <text:p>0.0128871</text:p>
              </table:table-cell>
              <table:table-cell office:value-type="float" office:value="0.12992">
                <text:p>0.12992</text:p>
              </table:table-cell>
              <table:table-cell office:value-type="float" office:value="0.0357223">
                <text:p>0.035722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128924">
                <text:p>0.0128924</text:p>
              </table:table-cell>
              <table:table-cell office:value-type="float" office:value="0.0151716">
                <text:p>0.0151716</text:p>
              </table:table-cell>
              <table:table-cell office:value-type="float" office:value="0.129484">
                <text:p>0.129484</text:p>
              </table:table-cell>
              <table:table-cell office:value-type="float" office:value="0.0361861">
                <text:p>0.036186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126422">
                <text:p>0.0126422</text:p>
              </table:table-cell>
              <table:table-cell office:value-type="float" office:value="0.0155834">
                <text:p>0.0155834</text:p>
              </table:table-cell>
              <table:table-cell office:value-type="float" office:value="0.129659">
                <text:p>0.129659</text:p>
              </table:table-cell>
              <table:table-cell office:value-type="float" office:value="0.0359596">
                <text:p>0.035959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125096">
                <text:p>0.0125096</text:p>
              </table:table-cell>
              <table:table-cell office:value-type="float" office:value="0.0141471">
                <text:p>0.0141471</text:p>
              </table:table-cell>
              <table:table-cell office:value-type="float" office:value="0.130578">
                <text:p>0.130578</text:p>
              </table:table-cell>
              <table:table-cell office:value-type="float" office:value="0.0359859">
                <text:p>0.035985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126841">
                <text:p>0.0126841</text:p>
              </table:table-cell>
              <table:table-cell office:value-type="float" office:value="0.0127438">
                <text:p>0.0127438</text:p>
              </table:table-cell>
              <table:table-cell office:value-type="float" office:value="0.129337">
                <text:p>0.129337</text:p>
              </table:table-cell>
              <table:table-cell office:value-type="float" office:value="0.0387388">
                <text:p>0.038738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136511">
                <text:p>0.0136511</text:p>
              </table:table-cell>
              <table:table-cell office:value-type="float" office:value="0.0135235">
                <text:p>0.0135235</text:p>
              </table:table-cell>
              <table:table-cell office:value-type="float" office:value="0.132842">
                <text:p>0.132842</text:p>
              </table:table-cell>
              <table:table-cell office:value-type="float" office:value="0.0371809">
                <text:p>0.037180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130006">
                <text:p>0.0130006</text:p>
              </table:table-cell>
              <table:table-cell office:value-type="float" office:value="0.0143559">
                <text:p>0.0143559</text:p>
              </table:table-cell>
              <table:table-cell office:value-type="float" office:value="0.132461">
                <text:p>0.132461</text:p>
              </table:table-cell>
              <table:table-cell office:value-type="float" office:value="0.039833">
                <text:p>0.03983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126692">
                <text:p>0.0126692</text:p>
              </table:table-cell>
              <table:table-cell office:value-type="float" office:value="0.0135375">
                <text:p>0.0135375</text:p>
              </table:table-cell>
              <table:table-cell office:value-type="float" office:value="0.138609">
                <text:p>0.138609</text:p>
              </table:table-cell>
              <table:table-cell office:value-type="float" office:value="0.0401113">
                <text:p>0.040111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121341">
                <text:p>0.0121341</text:p>
              </table:table-cell>
              <table:table-cell office:value-type="float" office:value="0.0124329">
                <text:p>0.0124329</text:p>
              </table:table-cell>
              <table:table-cell office:value-type="float" office:value="0.132502">
                <text:p>0.132502</text:p>
              </table:table-cell>
              <table:table-cell office:value-type="float" office:value="0.0359035">
                <text:p>0.035903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122747">
                <text:p>0.0122747</text:p>
              </table:table-cell>
              <table:table-cell office:value-type="float" office:value="0.0132842">
                <text:p>0.0132842</text:p>
              </table:table-cell>
              <table:table-cell office:value-type="float" office:value="0.131245">
                <text:p>0.131245</text:p>
              </table:table-cell>
              <table:table-cell office:value-type="float" office:value="0.0381165">
                <text:p>0.038116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12562">
                <text:p>0.012562</text:p>
              </table:table-cell>
              <table:table-cell office:value-type="float" office:value="0.0131434">
                <text:p>0.0131434</text:p>
              </table:table-cell>
              <table:table-cell office:value-type="float" office:value="0.132416">
                <text:p>0.132416</text:p>
              </table:table-cell>
              <table:table-cell office:value-type="float" office:value="0.0432338">
                <text:p>0.043233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123801">
                <text:p>0.0123801</text:p>
              </table:table-cell>
              <table:table-cell office:value-type="float" office:value="0.0147995">
                <text:p>0.0147995</text:p>
              </table:table-cell>
              <table:table-cell office:value-type="float" office:value="0.141437">
                <text:p>0.141437</text:p>
              </table:table-cell>
              <table:table-cell office:value-type="float" office:value="0.039434">
                <text:p>0.03943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124347">
                <text:p>0.0124347</text:p>
              </table:table-cell>
              <table:table-cell office:value-type="float" office:value="0.0143027">
                <text:p>0.0143027</text:p>
              </table:table-cell>
              <table:table-cell office:value-type="float" office:value="0.13853">
                <text:p>0.13853</text:p>
              </table:table-cell>
              <table:table-cell office:value-type="float" office:value="0.0380371">
                <text:p>0.038037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124218">
                <text:p>0.0124218</text:p>
              </table:table-cell>
              <table:table-cell office:value-type="float" office:value="0.0127115">
                <text:p>0.0127115</text:p>
              </table:table-cell>
              <table:table-cell office:value-type="float" office:value="0.133411">
                <text:p>0.133411</text:p>
              </table:table-cell>
              <table:table-cell office:value-type="float" office:value="0.0384108">
                <text:p>0.038410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124428">
                <text:p>0.0124428</text:p>
              </table:table-cell>
              <table:table-cell office:value-type="float" office:value="0.0131414">
                <text:p>0.0131414</text:p>
              </table:table-cell>
              <table:table-cell office:value-type="float" office:value="0.133896">
                <text:p>0.133896</text:p>
              </table:table-cell>
              <table:table-cell office:value-type="float" office:value="0.0378644">
                <text:p>0.037864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139325">
                <text:p>0.0139325</text:p>
              </table:table-cell>
              <table:table-cell office:value-type="float" office:value="0.014069">
                <text:p>0.014069</text:p>
              </table:table-cell>
              <table:table-cell office:value-type="float" office:value="0.13421">
                <text:p>0.13421</text:p>
              </table:table-cell>
              <table:table-cell office:value-type="float" office:value="0.0408601">
                <text:p>0.040860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127313">
                <text:p>0.0127313</text:p>
              </table:table-cell>
              <table:table-cell office:value-type="float" office:value="0.0127515">
                <text:p>0.0127515</text:p>
              </table:table-cell>
              <table:table-cell office:value-type="float" office:value="0.129124">
                <text:p>0.129124</text:p>
              </table:table-cell>
              <table:table-cell office:value-type="float" office:value="0.0395817">
                <text:p>0.039581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126568">
                <text:p>0.0126568</text:p>
              </table:table-cell>
              <table:table-cell office:value-type="float" office:value="0.0129808">
                <text:p>0.0129808</text:p>
              </table:table-cell>
              <table:table-cell office:value-type="float" office:value="0.129454">
                <text:p>0.129454</text:p>
              </table:table-cell>
              <table:table-cell office:value-type="float" office:value="0.0393568">
                <text:p>0.039356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123776">
                <text:p>0.0123776</text:p>
              </table:table-cell>
              <table:table-cell office:value-type="float" office:value="0.0153494">
                <text:p>0.0153494</text:p>
              </table:table-cell>
              <table:table-cell office:value-type="float" office:value="0.131249">
                <text:p>0.131249</text:p>
              </table:table-cell>
              <table:table-cell office:value-type="float" office:value="0.0381715">
                <text:p>0.038171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127635">
                <text:p>0.0127635</text:p>
              </table:table-cell>
              <table:table-cell office:value-type="float" office:value="0.0135624">
                <text:p>0.0135624</text:p>
              </table:table-cell>
              <table:table-cell office:value-type="float" office:value="0.130811">
                <text:p>0.130811</text:p>
              </table:table-cell>
              <table:table-cell office:value-type="float" office:value="0.0386274">
                <text:p>0.038627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128365">
                <text:p>0.0128365</text:p>
              </table:table-cell>
              <table:table-cell office:value-type="float" office:value="0.0142034">
                <text:p>0.0142034</text:p>
              </table:table-cell>
              <table:table-cell office:value-type="float" office:value="0.130925">
                <text:p>0.130925</text:p>
              </table:table-cell>
              <table:table-cell office:value-type="float" office:value="0.0385135">
                <text:p>0.038513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127434">
                <text:p>0.0127434</text:p>
              </table:table-cell>
              <table:table-cell office:value-type="float" office:value="0.0153264">
                <text:p>0.0153264</text:p>
              </table:table-cell>
              <table:table-cell office:value-type="float" office:value="0.134027">
                <text:p>0.134027</text:p>
              </table:table-cell>
              <table:table-cell office:value-type="float" office:value="0.0372447">
                <text:p>0.037244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125105">
                <text:p>0.0125105</text:p>
              </table:table-cell>
              <table:table-cell office:value-type="float" office:value="0.0146582">
                <text:p>0.0146582</text:p>
              </table:table-cell>
              <table:table-cell office:value-type="float" office:value="0.136067">
                <text:p>0.136067</text:p>
              </table:table-cell>
              <table:table-cell office:value-type="float" office:value="0.0376244">
                <text:p>0.037624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125886">
                <text:p>0.0125886</text:p>
              </table:table-cell>
              <table:table-cell office:value-type="float" office:value="0.0124017">
                <text:p>0.0124017</text:p>
              </table:table-cell>
              <table:table-cell office:value-type="float" office:value="0.135077">
                <text:p>0.135077</text:p>
              </table:table-cell>
              <table:table-cell office:value-type="float" office:value="0.0387719">
                <text:p>0.038771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126892">
                <text:p>0.0126892</text:p>
              </table:table-cell>
              <table:table-cell office:value-type="float" office:value="0.0139282">
                <text:p>0.0139282</text:p>
              </table:table-cell>
              <table:table-cell office:value-type="float" office:value="0.137022">
                <text:p>0.137022</text:p>
              </table:table-cell>
              <table:table-cell office:value-type="float" office:value="0.0390932">
                <text:p>0.039093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125019">
                <text:p>0.0125019</text:p>
              </table:table-cell>
              <table:table-cell office:value-type="float" office:value="0.0137842">
                <text:p>0.0137842</text:p>
              </table:table-cell>
              <table:table-cell office:value-type="float" office:value="0.139059">
                <text:p>0.139059</text:p>
              </table:table-cell>
              <table:table-cell office:value-type="float" office:value="0.0366141">
                <text:p>0.036614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126293">
                <text:p>0.0126293</text:p>
              </table:table-cell>
              <table:table-cell office:value-type="float" office:value="0.014833">
                <text:p>0.014833</text:p>
              </table:table-cell>
              <table:table-cell office:value-type="float" office:value="0.135346">
                <text:p>0.135346</text:p>
              </table:table-cell>
              <table:table-cell office:value-type="float" office:value="0.0366492">
                <text:p>0.036649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24867">
                <text:p>0.0124867</text:p>
              </table:table-cell>
              <table:table-cell office:value-type="float" office:value="0.0136157">
                <text:p>0.0136157</text:p>
              </table:table-cell>
              <table:table-cell office:value-type="float" office:value="0.134546">
                <text:p>0.134546</text:p>
              </table:table-cell>
              <table:table-cell office:value-type="float" office:value="0.0341595">
                <text:p>0.034159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122976">
                <text:p>0.0122976</text:p>
              </table:table-cell>
              <table:table-cell office:value-type="float" office:value="0.0145756">
                <text:p>0.0145756</text:p>
              </table:table-cell>
              <table:table-cell office:value-type="float" office:value="0.135199">
                <text:p>0.135199</text:p>
              </table:table-cell>
              <table:table-cell office:value-type="float" office:value="0.0357474">
                <text:p>0.035747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124509">
                <text:p>0.0124509</text:p>
              </table:table-cell>
              <table:table-cell office:value-type="float" office:value="0.0125633">
                <text:p>0.0125633</text:p>
              </table:table-cell>
              <table:table-cell office:value-type="float" office:value="0.128147">
                <text:p>0.128147</text:p>
              </table:table-cell>
              <table:table-cell office:value-type="float" office:value="0.0399669">
                <text:p>0.039966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12449">
                <text:p>0.012449</text:p>
              </table:table-cell>
              <table:table-cell office:value-type="float" office:value="0.0118967">
                <text:p>0.0118967</text:p>
              </table:table-cell>
              <table:table-cell office:value-type="float" office:value="0.129135">
                <text:p>0.129135</text:p>
              </table:table-cell>
              <table:table-cell office:value-type="float" office:value="0.0369534">
                <text:p>0.036953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128274">
                <text:p>0.0128274</text:p>
              </table:table-cell>
              <table:table-cell office:value-type="float" office:value="0.0138082">
                <text:p>0.0138082</text:p>
              </table:table-cell>
              <table:table-cell office:value-type="float" office:value="0.132248">
                <text:p>0.132248</text:p>
              </table:table-cell>
              <table:table-cell office:value-type="float" office:value="0.0387848">
                <text:p>0.038784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131222">
                <text:p>0.0131222</text:p>
              </table:table-cell>
              <table:table-cell office:value-type="float" office:value="0.014555">
                <text:p>0.014555</text:p>
              </table:table-cell>
              <table:table-cell office:value-type="float" office:value="0.131108">
                <text:p>0.131108</text:p>
              </table:table-cell>
              <table:table-cell office:value-type="float" office:value="0.0368769">
                <text:p>0.036876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129987">
                <text:p>0.0129987</text:p>
              </table:table-cell>
              <table:table-cell office:value-type="float" office:value="0.0148747">
                <text:p>0.0148747</text:p>
              </table:table-cell>
              <table:table-cell office:value-type="float" office:value="0.131141">
                <text:p>0.131141</text:p>
              </table:table-cell>
              <table:table-cell office:value-type="float" office:value="0.037208">
                <text:p>0.0372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124454">
                <text:p>0.0124454</text:p>
              </table:table-cell>
              <table:table-cell office:value-type="float" office:value="0.0140256">
                <text:p>0.0140256</text:p>
              </table:table-cell>
              <table:table-cell office:value-type="float" office:value="0.130045">
                <text:p>0.130045</text:p>
              </table:table-cell>
              <table:table-cell office:value-type="float" office:value="0.034921">
                <text:p>0.03492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123501">
                <text:p>0.0123501</text:p>
              </table:table-cell>
              <table:table-cell office:value-type="float" office:value="0.0137755">
                <text:p>0.0137755</text:p>
              </table:table-cell>
              <table:table-cell office:value-type="float" office:value="0.130461">
                <text:p>0.130461</text:p>
              </table:table-cell>
              <table:table-cell office:value-type="float" office:value="0.0371801">
                <text:p>0.0371801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124651">
                <text:p>0.0124651</text:p>
              </table:table-cell>
              <table:table-cell office:value-type="float" office:value="0.0147296">
                <text:p>0.0147296</text:p>
              </table:table-cell>
              <table:table-cell office:value-type="float" office:value="0.130509">
                <text:p>0.130509</text:p>
              </table:table-cell>
              <table:table-cell office:value-type="float" office:value="0.0371917">
                <text:p>0.037191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124346">
                <text:p>0.0124346</text:p>
              </table:table-cell>
              <table:table-cell office:value-type="float" office:value="0.0169394">
                <text:p>0.0169394</text:p>
              </table:table-cell>
              <table:table-cell office:value-type="float" office:value="0.129434">
                <text:p>0.129434</text:p>
              </table:table-cell>
              <table:table-cell office:value-type="float" office:value="0.0359935">
                <text:p>0.035993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123846">
                <text:p>0.0123846</text:p>
              </table:table-cell>
              <table:table-cell office:value-type="float" office:value="0.0147401">
                <text:p>0.0147401</text:p>
              </table:table-cell>
              <table:table-cell office:value-type="float" office:value="0.130777">
                <text:p>0.130777</text:p>
              </table:table-cell>
              <table:table-cell office:value-type="float" office:value="0.0370526">
                <text:p>0.037052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12487">
                <text:p>0.012487</text:p>
              </table:table-cell>
              <table:table-cell office:value-type="float" office:value="0.0151771">
                <text:p>0.0151771</text:p>
              </table:table-cell>
              <table:table-cell office:value-type="float" office:value="0.134674">
                <text:p>0.134674</text:p>
              </table:table-cell>
              <table:table-cell office:value-type="float" office:value="0.0356699">
                <text:p>0.035669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124568">
                <text:p>0.0124568</text:p>
              </table:table-cell>
              <table:table-cell office:value-type="float" office:value="0.0159828">
                <text:p>0.0159828</text:p>
              </table:table-cell>
              <table:table-cell office:value-type="float" office:value="0.136296">
                <text:p>0.136296</text:p>
              </table:table-cell>
              <table:table-cell office:value-type="float" office:value="0.0358233">
                <text:p>0.035823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124658">
                <text:p>0.0124658</text:p>
              </table:table-cell>
              <table:table-cell office:value-type="float" office:value="0.013491">
                <text:p>0.013491</text:p>
              </table:table-cell>
              <table:table-cell office:value-type="float" office:value="0.135685">
                <text:p>0.135685</text:p>
              </table:table-cell>
              <table:table-cell office:value-type="float" office:value="0.0366919">
                <text:p>0.036691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131666">
                <text:p>0.0131666</text:p>
              </table:table-cell>
              <table:table-cell office:value-type="float" office:value="0.0146142">
                <text:p>0.0146142</text:p>
              </table:table-cell>
              <table:table-cell office:value-type="float" office:value="0.136301">
                <text:p>0.136301</text:p>
              </table:table-cell>
              <table:table-cell office:value-type="float" office:value="0.0363233">
                <text:p>0.036323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1298">
                <text:p>0.01298</text:p>
              </table:table-cell>
              <table:table-cell office:value-type="float" office:value="0.0145227">
                <text:p>0.0145227</text:p>
              </table:table-cell>
              <table:table-cell office:value-type="float" office:value="0.136494">
                <text:p>0.136494</text:p>
              </table:table-cell>
              <table:table-cell office:value-type="float" office:value="0.0375403">
                <text:p>0.0375403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124714">
                <text:p>0.0124714</text:p>
              </table:table-cell>
              <table:table-cell office:value-type="float" office:value="0.0139195">
                <text:p>0.0139195</text:p>
              </table:table-cell>
              <table:table-cell office:value-type="float" office:value="0.135384">
                <text:p>0.135384</text:p>
              </table:table-cell>
              <table:table-cell office:value-type="float" office:value="0.0330187">
                <text:p>0.033018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124752">
                <text:p>0.0124752</text:p>
              </table:table-cell>
              <table:table-cell office:value-type="float" office:value="0.0134014">
                <text:p>0.0134014</text:p>
              </table:table-cell>
              <table:table-cell office:value-type="float" office:value="0.137958">
                <text:p>0.137958</text:p>
              </table:table-cell>
              <table:table-cell office:value-type="float" office:value="0.0370841">
                <text:p>0.0370841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131004">
                <text:p>0.0131004</text:p>
              </table:table-cell>
              <table:table-cell office:value-type="float" office:value="0.013828">
                <text:p>0.013828</text:p>
              </table:table-cell>
              <table:table-cell office:value-type="float" office:value="0.135889">
                <text:p>0.135889</text:p>
              </table:table-cell>
              <table:table-cell office:value-type="float" office:value="0.0364354">
                <text:p>0.036435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125117">
                <text:p>0.0125117</text:p>
              </table:table-cell>
              <table:table-cell office:value-type="float" office:value="0.0147945">
                <text:p>0.0147945</text:p>
              </table:table-cell>
              <table:table-cell office:value-type="float" office:value="0.135735">
                <text:p>0.135735</text:p>
              </table:table-cell>
              <table:table-cell office:value-type="float" office:value="0.035394">
                <text:p>0.03539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125819">
                <text:p>0.0125819</text:p>
              </table:table-cell>
              <table:table-cell office:value-type="float" office:value="0.0126811">
                <text:p>0.0126811</text:p>
              </table:table-cell>
              <table:table-cell office:value-type="float" office:value="0.131934">
                <text:p>0.131934</text:p>
              </table:table-cell>
              <table:table-cell office:value-type="float" office:value="0.0379431">
                <text:p>0.037943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126449">
                <text:p>0.0126449</text:p>
              </table:table-cell>
              <table:table-cell office:value-type="float" office:value="0.0129942">
                <text:p>0.0129942</text:p>
              </table:table-cell>
              <table:table-cell office:value-type="float" office:value="0.127343">
                <text:p>0.127343</text:p>
              </table:table-cell>
              <table:table-cell office:value-type="float" office:value="0.0361028">
                <text:p>0.036102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148616">
                <text:p>0.0148616</text:p>
              </table:table-cell>
              <table:table-cell office:value-type="float" office:value="0.0130899">
                <text:p>0.0130899</text:p>
              </table:table-cell>
              <table:table-cell office:value-type="float" office:value="0.129927">
                <text:p>0.129927</text:p>
              </table:table-cell>
              <table:table-cell office:value-type="float" office:value="0.0359534">
                <text:p>0.035953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136464">
                <text:p>0.0136464</text:p>
              </table:table-cell>
              <table:table-cell office:value-type="float" office:value="0.01384">
                <text:p>0.01384</text:p>
              </table:table-cell>
              <table:table-cell office:value-type="float" office:value="0.128376">
                <text:p>0.128376</text:p>
              </table:table-cell>
              <table:table-cell office:value-type="float" office:value="0.0329985">
                <text:p>0.0329985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125977">
                <text:p>0.0125977</text:p>
              </table:table-cell>
              <table:table-cell office:value-type="float" office:value="0.0138276">
                <text:p>0.0138276</text:p>
              </table:table-cell>
              <table:table-cell office:value-type="float" office:value="0.126695">
                <text:p>0.126695</text:p>
              </table:table-cell>
              <table:table-cell office:value-type="float" office:value="0.0360202">
                <text:p>0.036020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1246">
                <text:p>0.01246</text:p>
              </table:table-cell>
              <table:table-cell office:value-type="float" office:value="0.0173408">
                <text:p>0.0173408</text:p>
              </table:table-cell>
              <table:table-cell office:value-type="float" office:value="0.128843">
                <text:p>0.128843</text:p>
              </table:table-cell>
              <table:table-cell office:value-type="float" office:value="0.035289">
                <text:p>0.03528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140539">
                <text:p>0.0140539</text:p>
              </table:table-cell>
              <table:table-cell office:value-type="float" office:value="0.0133916">
                <text:p>0.0133916</text:p>
              </table:table-cell>
              <table:table-cell office:value-type="float" office:value="0.128174">
                <text:p>0.128174</text:p>
              </table:table-cell>
              <table:table-cell office:value-type="float" office:value="0.036207">
                <text:p>0.036207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125263">
                <text:p>0.0125263</text:p>
              </table:table-cell>
              <table:table-cell office:value-type="float" office:value="0.0129719">
                <text:p>0.0129719</text:p>
              </table:table-cell>
              <table:table-cell office:value-type="float" office:value="0.134009">
                <text:p>0.134009</text:p>
              </table:table-cell>
              <table:table-cell office:value-type="float" office:value="0.0357005">
                <text:p>0.035700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121798">
                <text:p>0.0121798</text:p>
              </table:table-cell>
              <table:table-cell office:value-type="float" office:value="0.0132133">
                <text:p>0.0132133</text:p>
              </table:table-cell>
              <table:table-cell office:value-type="float" office:value="0.136495">
                <text:p>0.136495</text:p>
              </table:table-cell>
              <table:table-cell office:value-type="float" office:value="0.0364121">
                <text:p>0.03641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38521">
                <text:p>0.0138521</text:p>
              </table:table-cell>
              <table:table-cell office:value-type="float" office:value="0.0139423">
                <text:p>0.0139423</text:p>
              </table:table-cell>
              <table:table-cell office:value-type="float" office:value="0.128293">
                <text:p>0.128293</text:p>
              </table:table-cell>
              <table:table-cell office:value-type="float" office:value="0.0362809">
                <text:p>0.036280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135418">
                <text:p>0.0135418</text:p>
              </table:table-cell>
              <table:table-cell office:value-type="float" office:value="0.0139001">
                <text:p>0.0139001</text:p>
              </table:table-cell>
              <table:table-cell office:value-type="float" office:value="0.128538">
                <text:p>0.128538</text:p>
              </table:table-cell>
              <table:table-cell office:value-type="float" office:value="0.0360858">
                <text:p>0.036085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125229">
                <text:p>0.0125229</text:p>
              </table:table-cell>
              <table:table-cell office:value-type="float" office:value="0.0142411">
                <text:p>0.0142411</text:p>
              </table:table-cell>
              <table:table-cell office:value-type="float" office:value="0.128596">
                <text:p>0.128596</text:p>
              </table:table-cell>
              <table:table-cell office:value-type="float" office:value="0.0360131">
                <text:p>0.036013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128243">
                <text:p>0.0128243</text:p>
              </table:table-cell>
              <table:table-cell office:value-type="float" office:value="0.0135843">
                <text:p>0.0135843</text:p>
              </table:table-cell>
              <table:table-cell office:value-type="float" office:value="0.129147">
                <text:p>0.129147</text:p>
              </table:table-cell>
              <table:table-cell office:value-type="float" office:value="0.0366622">
                <text:p>0.036662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125782">
                <text:p>0.0125782</text:p>
              </table:table-cell>
              <table:table-cell office:value-type="float" office:value="0.0132677">
                <text:p>0.0132677</text:p>
              </table:table-cell>
              <table:table-cell office:value-type="float" office:value="0.128693">
                <text:p>0.128693</text:p>
              </table:table-cell>
              <table:table-cell office:value-type="float" office:value="0.0355017">
                <text:p>0.035501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125487">
                <text:p>0.0125487</text:p>
              </table:table-cell>
              <table:table-cell office:value-type="float" office:value="0.013645">
                <text:p>0.013645</text:p>
              </table:table-cell>
              <table:table-cell office:value-type="float" office:value="0.127038">
                <text:p>0.127038</text:p>
              </table:table-cell>
              <table:table-cell office:value-type="float" office:value="0.0364305">
                <text:p>0.036430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123248">
                <text:p>0.0123248</text:p>
              </table:table-cell>
              <table:table-cell office:value-type="float" office:value="0.0138477">
                <text:p>0.0138477</text:p>
              </table:table-cell>
              <table:table-cell office:value-type="float" office:value="0.130078">
                <text:p>0.130078</text:p>
              </table:table-cell>
              <table:table-cell office:value-type="float" office:value="0.0371494">
                <text:p>0.037149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125307">
                <text:p>0.0125307</text:p>
              </table:table-cell>
              <table:table-cell office:value-type="float" office:value="0.013366">
                <text:p>0.013366</text:p>
              </table:table-cell>
              <table:table-cell office:value-type="float" office:value="0.144326">
                <text:p>0.144326</text:p>
              </table:table-cell>
              <table:table-cell office:value-type="float" office:value="0.0356609">
                <text:p>0.035660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130984">
                <text:p>0.0130984</text:p>
              </table:table-cell>
              <table:table-cell office:value-type="float" office:value="0.0128198">
                <text:p>0.0128198</text:p>
              </table:table-cell>
              <table:table-cell office:value-type="float" office:value="0.15059">
                <text:p>0.15059</text:p>
              </table:table-cell>
              <table:table-cell office:value-type="float" office:value="0.0358846">
                <text:p>0.035884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125411">
                <text:p>0.0125411</text:p>
              </table:table-cell>
              <table:table-cell office:value-type="float" office:value="0.0136118">
                <text:p>0.0136118</text:p>
              </table:table-cell>
              <table:table-cell office:value-type="float" office:value="0.154855">
                <text:p>0.154855</text:p>
              </table:table-cell>
              <table:table-cell office:value-type="float" office:value="0.0357783">
                <text:p>0.035778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3091">
                <text:p>0.013091</text:p>
              </table:table-cell>
              <table:table-cell office:value-type="float" office:value="0.0148118">
                <text:p>0.0148118</text:p>
              </table:table-cell>
              <table:table-cell office:value-type="float" office:value="0.152331">
                <text:p>0.152331</text:p>
              </table:table-cell>
              <table:table-cell office:value-type="float" office:value="0.0363805">
                <text:p>0.036380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132065">
                <text:p>0.0132065</text:p>
              </table:table-cell>
              <table:table-cell office:value-type="float" office:value="0.0125278">
                <text:p>0.0125278</text:p>
              </table:table-cell>
              <table:table-cell office:value-type="float" office:value="0.148931">
                <text:p>0.148931</text:p>
              </table:table-cell>
              <table:table-cell office:value-type="float" office:value="0.0336638">
                <text:p>0.0336638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129241">
                <text:p>0.0129241</text:p>
              </table:table-cell>
              <table:table-cell office:value-type="float" office:value="0.0142909">
                <text:p>0.0142909</text:p>
              </table:table-cell>
              <table:table-cell office:value-type="float" office:value="0.132349">
                <text:p>0.132349</text:p>
              </table:table-cell>
              <table:table-cell office:value-type="float" office:value="0.0357189">
                <text:p>0.035718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135798">
                <text:p>0.0135798</text:p>
              </table:table-cell>
              <table:table-cell office:value-type="float" office:value="0.0129067">
                <text:p>0.0129067</text:p>
              </table:table-cell>
              <table:table-cell office:value-type="float" office:value="0.134987">
                <text:p>0.134987</text:p>
              </table:table-cell>
              <table:table-cell office:value-type="float" office:value="0.035987">
                <text:p>0.03598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125393">
                <text:p>0.0125393</text:p>
              </table:table-cell>
              <table:table-cell office:value-type="float" office:value="0.0135317">
                <text:p>0.0135317</text:p>
              </table:table-cell>
              <table:table-cell office:value-type="float" office:value="0.131802">
                <text:p>0.131802</text:p>
              </table:table-cell>
              <table:table-cell office:value-type="float" office:value="0.0357355">
                <text:p>0.035735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124334">
                <text:p>0.0124334</text:p>
              </table:table-cell>
              <table:table-cell office:value-type="float" office:value="0.0151271">
                <text:p>0.0151271</text:p>
              </table:table-cell>
              <table:table-cell office:value-type="float" office:value="0.130956">
                <text:p>0.130956</text:p>
              </table:table-cell>
              <table:table-cell office:value-type="float" office:value="0.03561">
                <text:p>0.0356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121208">
                <text:p>0.0121208</text:p>
              </table:table-cell>
              <table:table-cell office:value-type="float" office:value="0.0139564">
                <text:p>0.0139564</text:p>
              </table:table-cell>
              <table:table-cell office:value-type="float" office:value="0.128141">
                <text:p>0.128141</text:p>
              </table:table-cell>
              <table:table-cell office:value-type="float" office:value="0.0366853">
                <text:p>0.036685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124433">
                <text:p>0.0124433</text:p>
              </table:table-cell>
              <table:table-cell office:value-type="float" office:value="0.0135816">
                <text:p>0.0135816</text:p>
              </table:table-cell>
              <table:table-cell office:value-type="float" office:value="0.129302">
                <text:p>0.129302</text:p>
              </table:table-cell>
              <table:table-cell office:value-type="float" office:value="0.0360496">
                <text:p>0.0360496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132246">
                <text:p>0.0132246</text:p>
              </table:table-cell>
              <table:table-cell office:value-type="float" office:value="0.0145224">
                <text:p>0.0145224</text:p>
              </table:table-cell>
              <table:table-cell office:value-type="float" office:value="0.131125">
                <text:p>0.131125</text:p>
              </table:table-cell>
              <table:table-cell office:value-type="float" office:value="0.0333039">
                <text:p>0.033303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138072">
                <text:p>0.0138072</text:p>
              </table:table-cell>
              <table:table-cell office:value-type="float" office:value="0.0131724">
                <text:p>0.0131724</text:p>
              </table:table-cell>
              <table:table-cell office:value-type="float" office:value="0.139014">
                <text:p>0.139014</text:p>
              </table:table-cell>
              <table:table-cell office:value-type="float" office:value="0.0356223">
                <text:p>0.035622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34379">
                <text:p>0.0134379</text:p>
              </table:table-cell>
              <table:table-cell office:value-type="float" office:value="0.0140114">
                <text:p>0.0140114</text:p>
              </table:table-cell>
              <table:table-cell office:value-type="float" office:value="0.136047">
                <text:p>0.136047</text:p>
              </table:table-cell>
              <table:table-cell office:value-type="float" office:value="0.0373219">
                <text:p>0.037321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123536">
                <text:p>0.0123536</text:p>
              </table:table-cell>
              <table:table-cell office:value-type="float" office:value="0.0131897">
                <text:p>0.0131897</text:p>
              </table:table-cell>
              <table:table-cell office:value-type="float" office:value="0.137973">
                <text:p>0.137973</text:p>
              </table:table-cell>
              <table:table-cell office:value-type="float" office:value="0.0347715">
                <text:p>0.034771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124127">
                <text:p>0.0124127</text:p>
              </table:table-cell>
              <table:table-cell office:value-type="float" office:value="0.0136605">
                <text:p>0.0136605</text:p>
              </table:table-cell>
              <table:table-cell office:value-type="float" office:value="0.127283">
                <text:p>0.127283</text:p>
              </table:table-cell>
              <table:table-cell office:value-type="float" office:value="0.0342558">
                <text:p>0.0342558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124556">
                <text:p>0.0124556</text:p>
              </table:table-cell>
              <table:table-cell office:value-type="float" office:value="0.0132452">
                <text:p>0.0132452</text:p>
              </table:table-cell>
              <table:table-cell office:value-type="float" office:value="0.128575">
                <text:p>0.128575</text:p>
              </table:table-cell>
              <table:table-cell office:value-type="float" office:value="0.0368573">
                <text:p>0.036857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13121">
                <text:p>0.013121</text:p>
              </table:table-cell>
              <table:table-cell office:value-type="float" office:value="0.0142662">
                <text:p>0.0142662</text:p>
              </table:table-cell>
              <table:table-cell office:value-type="float" office:value="0.129806">
                <text:p>0.129806</text:p>
              </table:table-cell>
              <table:table-cell office:value-type="float" office:value="0.0360574">
                <text:p>0.036057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126795">
                <text:p>0.0126795</text:p>
              </table:table-cell>
              <table:table-cell office:value-type="float" office:value="0.0131787">
                <text:p>0.0131787</text:p>
              </table:table-cell>
              <table:table-cell office:value-type="float" office:value="0.12929">
                <text:p>0.12929</text:p>
              </table:table-cell>
              <table:table-cell office:value-type="float" office:value="0.0379989">
                <text:p>0.037998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121867">
                <text:p>0.0121867</text:p>
              </table:table-cell>
              <table:table-cell office:value-type="float" office:value="0.0122747">
                <text:p>0.0122747</text:p>
              </table:table-cell>
              <table:table-cell office:value-type="float" office:value="0.129483">
                <text:p>0.129483</text:p>
              </table:table-cell>
              <table:table-cell office:value-type="float" office:value="0.0359092">
                <text:p>0.035909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149072">
                <text:p>0.0149072</text:p>
              </table:table-cell>
              <table:table-cell office:value-type="float" office:value="0.0147371">
                <text:p>0.0147371</text:p>
              </table:table-cell>
              <table:table-cell office:value-type="float" office:value="0.133021">
                <text:p>0.133021</text:p>
              </table:table-cell>
              <table:table-cell office:value-type="float" office:value="0.036909">
                <text:p>0.036909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130005">
                <text:p>0.0130005</text:p>
              </table:table-cell>
              <table:table-cell office:value-type="float" office:value="0.0157657">
                <text:p>0.0157657</text:p>
              </table:table-cell>
              <table:table-cell office:value-type="float" office:value="0.134091">
                <text:p>0.134091</text:p>
              </table:table-cell>
              <table:table-cell office:value-type="float" office:value="0.0354961">
                <text:p>0.035496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122351">
                <text:p>0.0122351</text:p>
              </table:table-cell>
              <table:table-cell office:value-type="float" office:value="0.0146728">
                <text:p>0.0146728</text:p>
              </table:table-cell>
              <table:table-cell office:value-type="float" office:value="0.134556">
                <text:p>0.134556</text:p>
              </table:table-cell>
              <table:table-cell office:value-type="float" office:value="0.0344862">
                <text:p>0.034486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123561">
                <text:p>0.0123561</text:p>
              </table:table-cell>
              <table:table-cell office:value-type="float" office:value="0.0134887">
                <text:p>0.0134887</text:p>
              </table:table-cell>
              <table:table-cell office:value-type="float" office:value="0.133953">
                <text:p>0.133953</text:p>
              </table:table-cell>
              <table:table-cell office:value-type="float" office:value="0.0348786">
                <text:p>0.034878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128551">
                <text:p>0.0128551</text:p>
              </table:table-cell>
              <table:table-cell office:value-type="float" office:value="0.0128071">
                <text:p>0.0128071</text:p>
              </table:table-cell>
              <table:table-cell office:value-type="float" office:value="0.134171">
                <text:p>0.134171</text:p>
              </table:table-cell>
              <table:table-cell office:value-type="float" office:value="0.0350456">
                <text:p>0.0350456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121087">
                <text:p>0.0121087</text:p>
              </table:table-cell>
              <table:table-cell office:value-type="float" office:value="0.013596">
                <text:p>0.013596</text:p>
              </table:table-cell>
              <table:table-cell office:value-type="float" office:value="0.134857">
                <text:p>0.134857</text:p>
              </table:table-cell>
              <table:table-cell office:value-type="float" office:value="0.0350346">
                <text:p>0.035034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147259">
                <text:p>0.0147259</text:p>
              </table:table-cell>
              <table:table-cell office:value-type="float" office:value="0.0139327">
                <text:p>0.0139327</text:p>
              </table:table-cell>
              <table:table-cell office:value-type="float" office:value="0.134793">
                <text:p>0.134793</text:p>
              </table:table-cell>
              <table:table-cell office:value-type="float" office:value="0.0352908">
                <text:p>0.035290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133398">
                <text:p>0.0133398</text:p>
              </table:table-cell>
              <table:table-cell office:value-type="float" office:value="0.013118">
                <text:p>0.013118</text:p>
              </table:table-cell>
              <table:table-cell office:value-type="float" office:value="0.13671">
                <text:p>0.13671</text:p>
              </table:table-cell>
              <table:table-cell office:value-type="float" office:value="0.035625">
                <text:p>0.03562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128075">
                <text:p>0.0128075</text:p>
              </table:table-cell>
              <table:table-cell office:value-type="float" office:value="0.0136074">
                <text:p>0.0136074</text:p>
              </table:table-cell>
              <table:table-cell office:value-type="float" office:value="0.136082">
                <text:p>0.136082</text:p>
              </table:table-cell>
              <table:table-cell office:value-type="float" office:value="0.0348625">
                <text:p>0.034862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126795">
                <text:p>0.0126795</text:p>
              </table:table-cell>
              <table:table-cell office:value-type="float" office:value="0.0141347">
                <text:p>0.0141347</text:p>
              </table:table-cell>
              <table:table-cell office:value-type="float" office:value="0.134793">
                <text:p>0.134793</text:p>
              </table:table-cell>
              <table:table-cell office:value-type="float" office:value="0.0376737">
                <text:p>0.0376737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124395">
                <text:p>0.0124395</text:p>
              </table:table-cell>
              <table:table-cell office:value-type="float" office:value="0.0130569">
                <text:p>0.0130569</text:p>
              </table:table-cell>
              <table:table-cell office:value-type="float" office:value="0.135348">
                <text:p>0.135348</text:p>
              </table:table-cell>
              <table:table-cell office:value-type="float" office:value="0.0354999">
                <text:p>0.0354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124437">
                <text:p>0.0124437</text:p>
              </table:table-cell>
              <table:table-cell office:value-type="float" office:value="0.0143312">
                <text:p>0.0143312</text:p>
              </table:table-cell>
              <table:table-cell office:value-type="float" office:value="0.134471">
                <text:p>0.134471</text:p>
              </table:table-cell>
              <table:table-cell office:value-type="float" office:value="0.0362282">
                <text:p>0.036228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15995">
                <text:p>0.015995</text:p>
              </table:table-cell>
              <table:table-cell office:value-type="float" office:value="0.0140925">
                <text:p>0.0140925</text:p>
              </table:table-cell>
              <table:table-cell office:value-type="float" office:value="0.135365">
                <text:p>0.135365</text:p>
              </table:table-cell>
              <table:table-cell office:value-type="float" office:value="0.035691">
                <text:p>0.0356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159555">
                <text:p>0.0159555</text:p>
              </table:table-cell>
              <table:table-cell office:value-type="float" office:value="0.0132765">
                <text:p>0.0132765</text:p>
              </table:table-cell>
              <table:table-cell office:value-type="float" office:value="0.134138">
                <text:p>0.134138</text:p>
              </table:table-cell>
              <table:table-cell office:value-type="float" office:value="0.0358442">
                <text:p>0.035844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135781">
                <text:p>0.0135781</text:p>
              </table:table-cell>
              <table:table-cell office:value-type="float" office:value="0.0134461">
                <text:p>0.0134461</text:p>
              </table:table-cell>
              <table:table-cell office:value-type="float" office:value="0.135073">
                <text:p>0.135073</text:p>
              </table:table-cell>
              <table:table-cell office:value-type="float" office:value="0.0355705">
                <text:p>0.035570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123231">
                <text:p>0.0123231</text:p>
              </table:table-cell>
              <table:table-cell office:value-type="float" office:value="0.0131773">
                <text:p>0.0131773</text:p>
              </table:table-cell>
              <table:table-cell office:value-type="float" office:value="0.134679">
                <text:p>0.134679</text:p>
              </table:table-cell>
              <table:table-cell office:value-type="float" office:value="0.0349139">
                <text:p>0.034913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127385">
                <text:p>0.0127385</text:p>
              </table:table-cell>
              <table:table-cell office:value-type="float" office:value="0.0125436">
                <text:p>0.0125436</text:p>
              </table:table-cell>
              <table:table-cell office:value-type="float" office:value="0.138701">
                <text:p>0.138701</text:p>
              </table:table-cell>
              <table:table-cell office:value-type="float" office:value="0.035041">
                <text:p>0.03504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12424">
                <text:p>0.012424</text:p>
              </table:table-cell>
              <table:table-cell office:value-type="float" office:value="0.0146715">
                <text:p>0.0146715</text:p>
              </table:table-cell>
              <table:table-cell office:value-type="float" office:value="0.13533">
                <text:p>0.13533</text:p>
              </table:table-cell>
              <table:table-cell office:value-type="float" office:value="0.0370455">
                <text:p>0.037045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125093">
                <text:p>0.0125093</text:p>
              </table:table-cell>
              <table:table-cell office:value-type="float" office:value="0.014617">
                <text:p>0.014617</text:p>
              </table:table-cell>
              <table:table-cell office:value-type="float" office:value="0.138088">
                <text:p>0.138088</text:p>
              </table:table-cell>
              <table:table-cell office:value-type="float" office:value="0.0364836">
                <text:p>0.0364836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124841">
                <text:p>0.0124841</text:p>
              </table:table-cell>
              <table:table-cell office:value-type="float" office:value="0.0135856">
                <text:p>0.0135856</text:p>
              </table:table-cell>
              <table:table-cell office:value-type="float" office:value="0.125331">
                <text:p>0.125331</text:p>
              </table:table-cell>
              <table:table-cell office:value-type="float" office:value="0.0354545">
                <text:p>0.0354545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155874">
                <text:p>0.0155874</text:p>
              </table:table-cell>
              <table:table-cell office:value-type="float" office:value="0.0127927">
                <text:p>0.0127927</text:p>
              </table:table-cell>
              <table:table-cell office:value-type="float" office:value="0.126782">
                <text:p>0.126782</text:p>
              </table:table-cell>
              <table:table-cell office:value-type="float" office:value="0.035855">
                <text:p>0.03585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124524">
                <text:p>0.0124524</text:p>
              </table:table-cell>
              <table:table-cell office:value-type="float" office:value="0.0141243">
                <text:p>0.0141243</text:p>
              </table:table-cell>
              <table:table-cell office:value-type="float" office:value="0.128361">
                <text:p>0.128361</text:p>
              </table:table-cell>
              <table:table-cell office:value-type="float" office:value="0.0363197">
                <text:p>0.0363197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150161">
                <text:p>0.0150161</text:p>
              </table:table-cell>
              <table:table-cell office:value-type="float" office:value="0.0135376">
                <text:p>0.0135376</text:p>
              </table:table-cell>
              <table:table-cell office:value-type="float" office:value="0.12796">
                <text:p>0.12796</text:p>
              </table:table-cell>
              <table:table-cell office:value-type="float" office:value="0.0354134">
                <text:p>0.035413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304025">
                <text:p>0.0304025</text:p>
              </table:table-cell>
              <table:table-cell office:value-type="float" office:value="0.0126838">
                <text:p>0.0126838</text:p>
              </table:table-cell>
              <table:table-cell office:value-type="float" office:value="0.12842">
                <text:p>0.12842</text:p>
              </table:table-cell>
              <table:table-cell office:value-type="float" office:value="0.0364313">
                <text:p>0.036431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157206">
                <text:p>0.0157206</text:p>
              </table:table-cell>
              <table:table-cell office:value-type="float" office:value="0.0135626">
                <text:p>0.0135626</text:p>
              </table:table-cell>
              <table:table-cell office:value-type="float" office:value="0.136183">
                <text:p>0.136183</text:p>
              </table:table-cell>
              <table:table-cell office:value-type="float" office:value="0.0364831">
                <text:p>0.036483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123648">
                <text:p>0.0123648</text:p>
              </table:table-cell>
              <table:table-cell office:value-type="float" office:value="0.0138365">
                <text:p>0.0138365</text:p>
              </table:table-cell>
              <table:table-cell office:value-type="float" office:value="0.136684">
                <text:p>0.136684</text:p>
              </table:table-cell>
              <table:table-cell office:value-type="float" office:value="0.0357411">
                <text:p>0.035741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123834">
                <text:p>0.0123834</text:p>
              </table:table-cell>
              <table:table-cell office:value-type="float" office:value="0.0142741">
                <text:p>0.0142741</text:p>
              </table:table-cell>
              <table:table-cell office:value-type="float" office:value="0.135131">
                <text:p>0.135131</text:p>
              </table:table-cell>
              <table:table-cell office:value-type="float" office:value="0.0359895">
                <text:p>0.035989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124705">
                <text:p>0.0124705</text:p>
              </table:table-cell>
              <table:table-cell office:value-type="float" office:value="0.0140333">
                <text:p>0.0140333</text:p>
              </table:table-cell>
              <table:table-cell office:value-type="float" office:value="0.134342">
                <text:p>0.134342</text:p>
              </table:table-cell>
              <table:table-cell office:value-type="float" office:value="0.0371679">
                <text:p>0.037167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126039">
                <text:p>0.0126039</text:p>
              </table:table-cell>
              <table:table-cell office:value-type="float" office:value="0.0158845">
                <text:p>0.0158845</text:p>
              </table:table-cell>
              <table:table-cell office:value-type="float" office:value="0.139154">
                <text:p>0.139154</text:p>
              </table:table-cell>
              <table:table-cell office:value-type="float" office:value="0.0357153">
                <text:p>0.0357153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124438">
                <text:p>0.0124438</text:p>
              </table:table-cell>
              <table:table-cell office:value-type="float" office:value="0.0140921">
                <text:p>0.0140921</text:p>
              </table:table-cell>
              <table:table-cell office:value-type="float" office:value="0.13556">
                <text:p>0.13556</text:p>
              </table:table-cell>
              <table:table-cell office:value-type="float" office:value="0.0361245">
                <text:p>0.0361245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125768">
                <text:p>0.0125768</text:p>
              </table:table-cell>
              <table:table-cell office:value-type="float" office:value="0.013786">
                <text:p>0.013786</text:p>
              </table:table-cell>
              <table:table-cell office:value-type="float" office:value="0.136388">
                <text:p>0.136388</text:p>
              </table:table-cell>
              <table:table-cell office:value-type="float" office:value="0.0371426">
                <text:p>0.037142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129406">
                <text:p>0.0129406</text:p>
              </table:table-cell>
              <table:table-cell office:value-type="float" office:value="0.0127486">
                <text:p>0.0127486</text:p>
              </table:table-cell>
              <table:table-cell office:value-type="float" office:value="0.135654">
                <text:p>0.135654</text:p>
              </table:table-cell>
              <table:table-cell office:value-type="float" office:value="0.035088">
                <text:p>0.035088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126463">
                <text:p>0.0126463</text:p>
              </table:table-cell>
              <table:table-cell office:value-type="float" office:value="0.0144362">
                <text:p>0.0144362</text:p>
              </table:table-cell>
              <table:table-cell office:value-type="float" office:value="0.137801">
                <text:p>0.137801</text:p>
              </table:table-cell>
              <table:table-cell office:value-type="float" office:value="0.0352921">
                <text:p>0.035292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123839">
                <text:p>0.0123839</text:p>
              </table:table-cell>
              <table:table-cell office:value-type="float" office:value="0.0143516">
                <text:p>0.0143516</text:p>
              </table:table-cell>
              <table:table-cell office:value-type="float" office:value="0.1351">
                <text:p>0.1351</text:p>
              </table:table-cell>
              <table:table-cell office:value-type="float" office:value="0.0352127">
                <text:p>0.035212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154831">
                <text:p>0.0154831</text:p>
              </table:table-cell>
              <table:table-cell office:value-type="float" office:value="0.0142958">
                <text:p>0.0142958</text:p>
              </table:table-cell>
              <table:table-cell office:value-type="float" office:value="0.137668">
                <text:p>0.137668</text:p>
              </table:table-cell>
              <table:table-cell office:value-type="float" office:value="0.0368626">
                <text:p>0.0368626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137148">
                <text:p>0.0137148</text:p>
              </table:table-cell>
              <table:table-cell office:value-type="float" office:value="0.0147483">
                <text:p>0.0147483</text:p>
              </table:table-cell>
              <table:table-cell office:value-type="float" office:value="0.125236">
                <text:p>0.125236</text:p>
              </table:table-cell>
              <table:table-cell office:value-type="float" office:value="0.0353414">
                <text:p>0.035341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126727">
                <text:p>0.0126727</text:p>
              </table:table-cell>
              <table:table-cell office:value-type="float" office:value="0.0122135">
                <text:p>0.0122135</text:p>
              </table:table-cell>
              <table:table-cell office:value-type="float" office:value="0.126934">
                <text:p>0.126934</text:p>
              </table:table-cell>
              <table:table-cell office:value-type="float" office:value="0.0355371">
                <text:p>0.035537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127363">
                <text:p>0.0127363</text:p>
              </table:table-cell>
              <table:table-cell office:value-type="float" office:value="0.0127345">
                <text:p>0.0127345</text:p>
              </table:table-cell>
              <table:table-cell office:value-type="float" office:value="0.129283">
                <text:p>0.129283</text:p>
              </table:table-cell>
              <table:table-cell office:value-type="float" office:value="0.0353287">
                <text:p>0.035328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125203">
                <text:p>0.0125203</text:p>
              </table:table-cell>
              <table:table-cell office:value-type="float" office:value="0.0135806">
                <text:p>0.0135806</text:p>
              </table:table-cell>
              <table:table-cell office:value-type="float" office:value="0.128554">
                <text:p>0.128554</text:p>
              </table:table-cell>
              <table:table-cell office:value-type="float" office:value="0.038376">
                <text:p>0.03837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129058">
                <text:p>0.0129058</text:p>
              </table:table-cell>
              <table:table-cell office:value-type="float" office:value="0.0134867">
                <text:p>0.0134867</text:p>
              </table:table-cell>
              <table:table-cell office:value-type="float" office:value="0.127712">
                <text:p>0.127712</text:p>
              </table:table-cell>
              <table:table-cell office:value-type="float" office:value="0.0361396">
                <text:p>0.036139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124571">
                <text:p>0.0124571</text:p>
              </table:table-cell>
              <table:table-cell office:value-type="float" office:value="0.0129535">
                <text:p>0.0129535</text:p>
              </table:table-cell>
              <table:table-cell office:value-type="float" office:value="0.12825">
                <text:p>0.12825</text:p>
              </table:table-cell>
              <table:table-cell office:value-type="float" office:value="0.0365536">
                <text:p>0.036553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127702">
                <text:p>0.0127702</text:p>
              </table:table-cell>
              <table:table-cell office:value-type="float" office:value="0.0141699">
                <text:p>0.0141699</text:p>
              </table:table-cell>
              <table:table-cell office:value-type="float" office:value="0.128752">
                <text:p>0.128752</text:p>
              </table:table-cell>
              <table:table-cell office:value-type="float" office:value="0.0370133">
                <text:p>0.0370133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127711">
                <text:p>0.0127711</text:p>
              </table:table-cell>
              <table:table-cell office:value-type="float" office:value="0.013309">
                <text:p>0.013309</text:p>
              </table:table-cell>
              <table:table-cell office:value-type="float" office:value="0.129063">
                <text:p>0.129063</text:p>
              </table:table-cell>
              <table:table-cell office:value-type="float" office:value="0.0361912">
                <text:p>0.03619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36034">
                <text:p>0.0136034</text:p>
              </table:table-cell>
              <table:table-cell office:value-type="float" office:value="0.0147165">
                <text:p>0.0147165</text:p>
              </table:table-cell>
              <table:table-cell office:value-type="float" office:value="0.128757">
                <text:p>0.128757</text:p>
              </table:table-cell>
              <table:table-cell office:value-type="float" office:value="0.0363799">
                <text:p>0.036379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123306">
                <text:p>0.0123306</text:p>
              </table:table-cell>
              <table:table-cell office:value-type="float" office:value="0.0143792">
                <text:p>0.0143792</text:p>
              </table:table-cell>
              <table:table-cell office:value-type="float" office:value="0.127303">
                <text:p>0.127303</text:p>
              </table:table-cell>
              <table:table-cell office:value-type="float" office:value="0.0422484">
                <text:p>0.042248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128146">
                <text:p>0.0128146</text:p>
              </table:table-cell>
              <table:table-cell office:value-type="float" office:value="0.0133464">
                <text:p>0.0133464</text:p>
              </table:table-cell>
              <table:table-cell office:value-type="float" office:value="0.129245">
                <text:p>0.129245</text:p>
              </table:table-cell>
              <table:table-cell office:value-type="float" office:value="0.0371958">
                <text:p>0.0371958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129008">
                <text:p>0.0129008</text:p>
              </table:table-cell>
              <table:table-cell office:value-type="float" office:value="0.013976">
                <text:p>0.013976</text:p>
              </table:table-cell>
              <table:table-cell office:value-type="float" office:value="0.131793">
                <text:p>0.131793</text:p>
              </table:table-cell>
              <table:table-cell office:value-type="float" office:value="0.0345323">
                <text:p>0.0345323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123555">
                <text:p>0.0123555</text:p>
              </table:table-cell>
              <table:table-cell office:value-type="float" office:value="0.0146965">
                <text:p>0.0146965</text:p>
              </table:table-cell>
              <table:table-cell office:value-type="float" office:value="0.132616">
                <text:p>0.132616</text:p>
              </table:table-cell>
              <table:table-cell office:value-type="float" office:value="0.0349299">
                <text:p>0.034929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126581">
                <text:p>0.0126581</text:p>
              </table:table-cell>
              <table:table-cell office:value-type="float" office:value="0.0128154">
                <text:p>0.0128154</text:p>
              </table:table-cell>
              <table:table-cell office:value-type="float" office:value="0.127504">
                <text:p>0.127504</text:p>
              </table:table-cell>
              <table:table-cell office:value-type="float" office:value="0.0360755">
                <text:p>0.0360755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125144">
                <text:p>0.0125144</text:p>
              </table:table-cell>
              <table:table-cell office:value-type="float" office:value="0.0149783">
                <text:p>0.0149783</text:p>
              </table:table-cell>
              <table:table-cell office:value-type="float" office:value="0.128485">
                <text:p>0.128485</text:p>
              </table:table-cell>
              <table:table-cell office:value-type="float" office:value="0.0349369">
                <text:p>0.0349369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126351">
                <text:p>0.0126351</text:p>
              </table:table-cell>
              <table:table-cell office:value-type="float" office:value="0.014441">
                <text:p>0.014441</text:p>
              </table:table-cell>
              <table:table-cell office:value-type="float" office:value="0.129983">
                <text:p>0.129983</text:p>
              </table:table-cell>
              <table:table-cell office:value-type="float" office:value="0.035777">
                <text:p>0.035777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124996">
                <text:p>0.0124996</text:p>
              </table:table-cell>
              <table:table-cell office:value-type="float" office:value="0.0127187">
                <text:p>0.0127187</text:p>
              </table:table-cell>
              <table:table-cell office:value-type="float" office:value="0.128665">
                <text:p>0.128665</text:p>
              </table:table-cell>
              <table:table-cell office:value-type="float" office:value="0.0357189">
                <text:p>0.0357189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123631">
                <text:p>0.0123631</text:p>
              </table:table-cell>
              <table:table-cell office:value-type="float" office:value="0.0132625">
                <text:p>0.0132625</text:p>
              </table:table-cell>
              <table:table-cell office:value-type="float" office:value="0.128378">
                <text:p>0.128378</text:p>
              </table:table-cell>
              <table:table-cell office:value-type="float" office:value="0.037336">
                <text:p>0.03733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129741">
                <text:p>0.0129741</text:p>
              </table:table-cell>
              <table:table-cell office:value-type="float" office:value="0.0141404">
                <text:p>0.0141404</text:p>
              </table:table-cell>
              <table:table-cell office:value-type="float" office:value="0.128649">
                <text:p>0.128649</text:p>
              </table:table-cell>
              <table:table-cell office:value-type="float" office:value="0.0359239">
                <text:p>0.0359239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130818">
                <text:p>0.0130818</text:p>
              </table:table-cell>
              <table:table-cell office:value-type="float" office:value="0.0162278">
                <text:p>0.0162278</text:p>
              </table:table-cell>
              <table:table-cell office:value-type="float" office:value="0.13034">
                <text:p>0.13034</text:p>
              </table:table-cell>
              <table:table-cell office:value-type="float" office:value="0.0349302">
                <text:p>0.034930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128534">
                <text:p>0.0128534</text:p>
              </table:table-cell>
              <table:table-cell office:value-type="float" office:value="0.0159452">
                <text:p>0.0159452</text:p>
              </table:table-cell>
              <table:table-cell office:value-type="float" office:value="0.129112">
                <text:p>0.129112</text:p>
              </table:table-cell>
              <table:table-cell office:value-type="float" office:value="0.0353251">
                <text:p>0.035325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122888">
                <text:p>0.0122888</text:p>
              </table:table-cell>
              <table:table-cell office:value-type="float" office:value="0.013851">
                <text:p>0.013851</text:p>
              </table:table-cell>
              <table:table-cell office:value-type="float" office:value="0.129014">
                <text:p>0.129014</text:p>
              </table:table-cell>
              <table:table-cell office:value-type="float" office:value="0.0345952">
                <text:p>0.034595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126012">
                <text:p>0.0126012</text:p>
              </table:table-cell>
              <table:table-cell office:value-type="float" office:value="0.0169456">
                <text:p>0.0169456</text:p>
              </table:table-cell>
              <table:table-cell office:value-type="float" office:value="0.128507">
                <text:p>0.128507</text:p>
              </table:table-cell>
              <table:table-cell office:value-type="float" office:value="0.0347165">
                <text:p>0.034716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125529">
                <text:p>0.0125529</text:p>
              </table:table-cell>
              <table:table-cell office:value-type="float" office:value="0.0175565">
                <text:p>0.0175565</text:p>
              </table:table-cell>
              <table:table-cell office:value-type="float" office:value="0.130979">
                <text:p>0.130979</text:p>
              </table:table-cell>
              <table:table-cell office:value-type="float" office:value="0.0353471">
                <text:p>0.0353471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128647">
                <text:p>0.0128647</text:p>
              </table:table-cell>
              <table:table-cell office:value-type="float" office:value="0.0142139">
                <text:p>0.0142139</text:p>
              </table:table-cell>
              <table:table-cell office:value-type="float" office:value="0.13056">
                <text:p>0.13056</text:p>
              </table:table-cell>
              <table:table-cell office:value-type="float" office:value="0.0349985">
                <text:p>0.034998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124052">
                <text:p>0.0124052</text:p>
              </table:table-cell>
              <table:table-cell office:value-type="float" office:value="0.012776">
                <text:p>0.012776</text:p>
              </table:table-cell>
              <table:table-cell office:value-type="float" office:value="0.128489">
                <text:p>0.128489</text:p>
              </table:table-cell>
              <table:table-cell office:value-type="float" office:value="0.0352021">
                <text:p>0.035202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123358">
                <text:p>0.0123358</text:p>
              </table:table-cell>
              <table:table-cell office:value-type="float" office:value="0.0127402">
                <text:p>0.0127402</text:p>
              </table:table-cell>
              <table:table-cell office:value-type="float" office:value="0.133505">
                <text:p>0.133505</text:p>
              </table:table-cell>
              <table:table-cell office:value-type="float" office:value="0.0366452">
                <text:p>0.036645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122008">
                <text:p>0.0122008</text:p>
              </table:table-cell>
              <table:table-cell office:value-type="float" office:value="0.0146144">
                <text:p>0.0146144</text:p>
              </table:table-cell>
              <table:table-cell office:value-type="float" office:value="0.129931">
                <text:p>0.129931</text:p>
              </table:table-cell>
              <table:table-cell office:value-type="float" office:value="0.0354455">
                <text:p>0.035445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123584">
                <text:p>0.0123584</text:p>
              </table:table-cell>
              <table:table-cell office:value-type="float" office:value="0.0128897">
                <text:p>0.0128897</text:p>
              </table:table-cell>
              <table:table-cell office:value-type="float" office:value="0.129527">
                <text:p>0.129527</text:p>
              </table:table-cell>
              <table:table-cell office:value-type="float" office:value="0.0359043">
                <text:p>0.0359043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123994">
                <text:p>0.0123994</text:p>
              </table:table-cell>
              <table:table-cell office:value-type="float" office:value="0.0132688">
                <text:p>0.0132688</text:p>
              </table:table-cell>
              <table:table-cell office:value-type="float" office:value="0.130061">
                <text:p>0.130061</text:p>
              </table:table-cell>
              <table:table-cell office:value-type="float" office:value="0.0369897">
                <text:p>0.0369897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122706">
                <text:p>0.0122706</text:p>
              </table:table-cell>
              <table:table-cell office:value-type="float" office:value="0.0136366">
                <text:p>0.0136366</text:p>
              </table:table-cell>
              <table:table-cell office:value-type="float" office:value="0.127882">
                <text:p>0.127882</text:p>
              </table:table-cell>
              <table:table-cell office:value-type="float" office:value="0.0395085">
                <text:p>0.0395085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125294">
                <text:p>0.0125294</text:p>
              </table:table-cell>
              <table:table-cell office:value-type="float" office:value="0.0143057">
                <text:p>0.0143057</text:p>
              </table:table-cell>
              <table:table-cell office:value-type="float" office:value="0.126169">
                <text:p>0.126169</text:p>
              </table:table-cell>
              <table:table-cell office:value-type="float" office:value="0.0378998">
                <text:p>0.0378998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122763">
                <text:p>0.0122763</text:p>
              </table:table-cell>
              <table:table-cell office:value-type="float" office:value="0.0137782">
                <text:p>0.0137782</text:p>
              </table:table-cell>
              <table:table-cell office:value-type="float" office:value="0.128192">
                <text:p>0.128192</text:p>
              </table:table-cell>
              <table:table-cell office:value-type="float" office:value="0.0356146">
                <text:p>0.035614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124182">
                <text:p>0.0124182</text:p>
              </table:table-cell>
              <table:table-cell office:value-type="float" office:value="0.0134">
                <text:p>0.0134</text:p>
              </table:table-cell>
              <table:table-cell office:value-type="float" office:value="0.128439">
                <text:p>0.128439</text:p>
              </table:table-cell>
              <table:table-cell office:value-type="float" office:value="0.0341842">
                <text:p>0.0341842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124649">
                <text:p>0.0124649</text:p>
              </table:table-cell>
              <table:table-cell office:value-type="float" office:value="0.0164736">
                <text:p>0.0164736</text:p>
              </table:table-cell>
              <table:table-cell office:value-type="float" office:value="0.130399">
                <text:p>0.130399</text:p>
              </table:table-cell>
              <table:table-cell office:value-type="float" office:value="0.0358943">
                <text:p>0.0358943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127179">
                <text:p>0.0127179</text:p>
              </table:table-cell>
              <table:table-cell office:value-type="float" office:value="0.0140076">
                <text:p>0.0140076</text:p>
              </table:table-cell>
              <table:table-cell office:value-type="float" office:value="0.130974">
                <text:p>0.130974</text:p>
              </table:table-cell>
              <table:table-cell office:value-type="float" office:value="0.0355491">
                <text:p>0.035549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123648">
                <text:p>0.0123648</text:p>
              </table:table-cell>
              <table:table-cell office:value-type="float" office:value="0.0142779">
                <text:p>0.0142779</text:p>
              </table:table-cell>
              <table:table-cell office:value-type="float" office:value="0.127073">
                <text:p>0.127073</text:p>
              </table:table-cell>
              <table:table-cell office:value-type="float" office:value="0.0353702">
                <text:p>0.035370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123047">
                <text:p>0.0123047</text:p>
              </table:table-cell>
              <table:table-cell office:value-type="float" office:value="0.012321">
                <text:p>0.012321</text:p>
              </table:table-cell>
              <table:table-cell office:value-type="float" office:value="0.130217">
                <text:p>0.130217</text:p>
              </table:table-cell>
              <table:table-cell office:value-type="float" office:value="0.0368168">
                <text:p>0.036816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127139">
                <text:p>0.0127139</text:p>
              </table:table-cell>
              <table:table-cell office:value-type="float" office:value="0.0134383">
                <text:p>0.0134383</text:p>
              </table:table-cell>
              <table:table-cell office:value-type="float" office:value="0.130096">
                <text:p>0.130096</text:p>
              </table:table-cell>
              <table:table-cell office:value-type="float" office:value="0.0350081">
                <text:p>0.0350081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127181">
                <text:p>0.0127181</text:p>
              </table:table-cell>
              <table:table-cell office:value-type="float" office:value="0.0139528">
                <text:p>0.0139528</text:p>
              </table:table-cell>
              <table:table-cell office:value-type="float" office:value="0.129544">
                <text:p>0.129544</text:p>
              </table:table-cell>
              <table:table-cell office:value-type="float" office:value="0.0357145">
                <text:p>0.035714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12671">
                <text:p>0.012671</text:p>
              </table:table-cell>
              <table:table-cell office:value-type="float" office:value="0.0136341">
                <text:p>0.0136341</text:p>
              </table:table-cell>
              <table:table-cell office:value-type="float" office:value="0.126291">
                <text:p>0.126291</text:p>
              </table:table-cell>
              <table:table-cell office:value-type="float" office:value="0.0367443">
                <text:p>0.036744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123441">
                <text:p>0.0123441</text:p>
              </table:table-cell>
              <table:table-cell office:value-type="float" office:value="0.0135084">
                <text:p>0.0135084</text:p>
              </table:table-cell>
              <table:table-cell office:value-type="float" office:value="0.129192">
                <text:p>0.129192</text:p>
              </table:table-cell>
              <table:table-cell office:value-type="float" office:value="0.0360672">
                <text:p>0.036067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124311">
                <text:p>0.0124311</text:p>
              </table:table-cell>
              <table:table-cell office:value-type="float" office:value="0.0145757">
                <text:p>0.0145757</text:p>
              </table:table-cell>
              <table:table-cell office:value-type="float" office:value="0.137811">
                <text:p>0.137811</text:p>
              </table:table-cell>
              <table:table-cell office:value-type="float" office:value="0.0358509">
                <text:p>0.035850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127063">
                <text:p>0.0127063</text:p>
              </table:table-cell>
              <table:table-cell office:value-type="float" office:value="0.012673">
                <text:p>0.012673</text:p>
              </table:table-cell>
              <table:table-cell office:value-type="float" office:value="0.137538">
                <text:p>0.137538</text:p>
              </table:table-cell>
              <table:table-cell office:value-type="float" office:value="0.0379141">
                <text:p>0.0379141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124111">
                <text:p>0.0124111</text:p>
              </table:table-cell>
              <table:table-cell office:value-type="float" office:value="0.0134855">
                <text:p>0.0134855</text:p>
              </table:table-cell>
              <table:table-cell office:value-type="float" office:value="0.135568">
                <text:p>0.135568</text:p>
              </table:table-cell>
              <table:table-cell office:value-type="float" office:value="0.0344704">
                <text:p>0.034470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125404">
                <text:p>0.0125404</text:p>
              </table:table-cell>
              <table:table-cell office:value-type="float" office:value="0.0128689">
                <text:p>0.0128689</text:p>
              </table:table-cell>
              <table:table-cell office:value-type="float" office:value="0.133883">
                <text:p>0.133883</text:p>
              </table:table-cell>
              <table:table-cell office:value-type="float" office:value="0.0352531">
                <text:p>0.035253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138101">
                <text:p>0.0138101</text:p>
              </table:table-cell>
              <table:table-cell office:value-type="float" office:value="0.0163339">
                <text:p>0.0163339</text:p>
              </table:table-cell>
              <table:table-cell office:value-type="float" office:value="0.133727">
                <text:p>0.133727</text:p>
              </table:table-cell>
              <table:table-cell office:value-type="float" office:value="0.0354478">
                <text:p>0.035447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124674">
                <text:p>0.0124674</text:p>
              </table:table-cell>
              <table:table-cell office:value-type="float" office:value="0.0158567">
                <text:p>0.0158567</text:p>
              </table:table-cell>
              <table:table-cell office:value-type="float" office:value="0.132541">
                <text:p>0.132541</text:p>
              </table:table-cell>
              <table:table-cell office:value-type="float" office:value="0.0351527">
                <text:p>0.035152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128548">
                <text:p>0.0128548</text:p>
              </table:table-cell>
              <table:table-cell office:value-type="float" office:value="0.0147473">
                <text:p>0.0147473</text:p>
              </table:table-cell>
              <table:table-cell office:value-type="float" office:value="0.133008">
                <text:p>0.133008</text:p>
              </table:table-cell>
              <table:table-cell office:value-type="float" office:value="0.0345597">
                <text:p>0.0345597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131226">
                <text:p>0.0131226</text:p>
              </table:table-cell>
              <table:table-cell office:value-type="float" office:value="0.0129803">
                <text:p>0.0129803</text:p>
              </table:table-cell>
              <table:table-cell office:value-type="float" office:value="0.133899">
                <text:p>0.133899</text:p>
              </table:table-cell>
              <table:table-cell office:value-type="float" office:value="0.0350198">
                <text:p>0.0350198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127977">
                <text:p>0.0127977</text:p>
              </table:table-cell>
              <table:table-cell office:value-type="float" office:value="0.0140381">
                <text:p>0.0140381</text:p>
              </table:table-cell>
              <table:table-cell office:value-type="float" office:value="0.133753">
                <text:p>0.133753</text:p>
              </table:table-cell>
              <table:table-cell office:value-type="float" office:value="0.0349104">
                <text:p>0.0349104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136164">
                <text:p>0.0136164</text:p>
              </table:table-cell>
              <table:table-cell office:value-type="float" office:value="0.0140451">
                <text:p>0.0140451</text:p>
              </table:table-cell>
              <table:table-cell office:value-type="float" office:value="0.13694">
                <text:p>0.13694</text:p>
              </table:table-cell>
              <table:table-cell office:value-type="float" office:value="0.0354563">
                <text:p>0.0354563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128564">
                <text:p>0.0128564</text:p>
              </table:table-cell>
              <table:table-cell office:value-type="float" office:value="0.0132143">
                <text:p>0.0132143</text:p>
              </table:table-cell>
              <table:table-cell office:value-type="float" office:value="0.137396">
                <text:p>0.137396</text:p>
              </table:table-cell>
              <table:table-cell office:value-type="float" office:value="0.0385502">
                <text:p>0.038550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127683">
                <text:p>0.0127683</text:p>
              </table:table-cell>
              <table:table-cell office:value-type="float" office:value="0.0123842">
                <text:p>0.0123842</text:p>
              </table:table-cell>
              <table:table-cell office:value-type="float" office:value="0.137532">
                <text:p>0.137532</text:p>
              </table:table-cell>
              <table:table-cell office:value-type="float" office:value="0.0355164">
                <text:p>0.035516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133884">
                <text:p>0.0133884</text:p>
              </table:table-cell>
              <table:table-cell office:value-type="float" office:value="0.0158413">
                <text:p>0.0158413</text:p>
              </table:table-cell>
              <table:table-cell office:value-type="float" office:value="0.134281">
                <text:p>0.134281</text:p>
              </table:table-cell>
              <table:table-cell office:value-type="float" office:value="0.0351963">
                <text:p>0.0351963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134759">
                <text:p>0.0134759</text:p>
              </table:table-cell>
              <table:table-cell office:value-type="float" office:value="0.0165548">
                <text:p>0.0165548</text:p>
              </table:table-cell>
              <table:table-cell office:value-type="float" office:value="0.134203">
                <text:p>0.134203</text:p>
              </table:table-cell>
              <table:table-cell office:value-type="float" office:value="0.0355341">
                <text:p>0.035534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13807">
                <text:p>0.013807</text:p>
              </table:table-cell>
              <table:table-cell office:value-type="float" office:value="0.0138926">
                <text:p>0.0138926</text:p>
              </table:table-cell>
              <table:table-cell office:value-type="float" office:value="0.134149">
                <text:p>0.134149</text:p>
              </table:table-cell>
              <table:table-cell office:value-type="float" office:value="0.0366073">
                <text:p>0.0366073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135093">
                <text:p>0.0135093</text:p>
              </table:table-cell>
              <table:table-cell office:value-type="float" office:value="0.0140729">
                <text:p>0.0140729</text:p>
              </table:table-cell>
              <table:table-cell office:value-type="float" office:value="0.134982">
                <text:p>0.134982</text:p>
              </table:table-cell>
              <table:table-cell office:value-type="float" office:value="0.0364771">
                <text:p>0.036477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135422">
                <text:p>0.0135422</text:p>
              </table:table-cell>
              <table:table-cell office:value-type="float" office:value="0.0134176">
                <text:p>0.0134176</text:p>
              </table:table-cell>
              <table:table-cell office:value-type="float" office:value="0.134385">
                <text:p>0.134385</text:p>
              </table:table-cell>
              <table:table-cell office:value-type="float" office:value="0.0361421">
                <text:p>0.0361421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134634">
                <text:p>0.0134634</text:p>
              </table:table-cell>
              <table:table-cell office:value-type="float" office:value="0.0135321">
                <text:p>0.0135321</text:p>
              </table:table-cell>
              <table:table-cell office:value-type="float" office:value="0.134527">
                <text:p>0.134527</text:p>
              </table:table-cell>
              <table:table-cell office:value-type="float" office:value="0.0386937">
                <text:p>0.0386937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133693">
                <text:p>0.0133693</text:p>
              </table:table-cell>
              <table:table-cell office:value-type="float" office:value="0.0134495">
                <text:p>0.0134495</text:p>
              </table:table-cell>
              <table:table-cell office:value-type="float" office:value="0.135773">
                <text:p>0.135773</text:p>
              </table:table-cell>
              <table:table-cell office:value-type="float" office:value="0.0435709">
                <text:p>0.0435709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130753">
                <text:p>0.0130753</text:p>
              </table:table-cell>
              <table:table-cell office:value-type="float" office:value="0.0171854">
                <text:p>0.0171854</text:p>
              </table:table-cell>
              <table:table-cell office:value-type="float" office:value="0.134962">
                <text:p>0.134962</text:p>
              </table:table-cell>
              <table:table-cell office:value-type="float" office:value="0.037138">
                <text:p>0.03713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131034">
                <text:p>0.0131034</text:p>
              </table:table-cell>
              <table:table-cell office:value-type="float" office:value="0.0143329">
                <text:p>0.0143329</text:p>
              </table:table-cell>
              <table:table-cell office:value-type="float" office:value="0.134034">
                <text:p>0.134034</text:p>
              </table:table-cell>
              <table:table-cell office:value-type="float" office:value="0.0328239">
                <text:p>0.0328239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13439">
                <text:p>0.013439</text:p>
              </table:table-cell>
              <table:table-cell office:value-type="float" office:value="0.0137448">
                <text:p>0.0137448</text:p>
              </table:table-cell>
              <table:table-cell office:value-type="float" office:value="0.128032">
                <text:p>0.128032</text:p>
              </table:table-cell>
              <table:table-cell office:value-type="float" office:value="0.0360877">
                <text:p>0.0360877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125428">
                <text:p>0.0125428</text:p>
              </table:table-cell>
              <table:table-cell office:value-type="float" office:value="0.0148898">
                <text:p>0.0148898</text:p>
              </table:table-cell>
              <table:table-cell office:value-type="float" office:value="0.130162">
                <text:p>0.130162</text:p>
              </table:table-cell>
              <table:table-cell office:value-type="float" office:value="0.0330723">
                <text:p>0.0330723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126283">
                <text:p>0.0126283</text:p>
              </table:table-cell>
              <table:table-cell office:value-type="float" office:value="0.0135218">
                <text:p>0.0135218</text:p>
              </table:table-cell>
              <table:table-cell office:value-type="float" office:value="0.129483">
                <text:p>0.129483</text:p>
              </table:table-cell>
              <table:table-cell office:value-type="float" office:value="0.034341">
                <text:p>0.034341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123247">
                <text:p>0.0123247</text:p>
              </table:table-cell>
              <table:table-cell office:value-type="float" office:value="0.0128825">
                <text:p>0.0128825</text:p>
              </table:table-cell>
              <table:table-cell office:value-type="float" office:value="0.129754">
                <text:p>0.129754</text:p>
              </table:table-cell>
              <table:table-cell office:value-type="float" office:value="0.037243">
                <text:p>0.037243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123286">
                <text:p>0.0123286</text:p>
              </table:table-cell>
              <table:table-cell office:value-type="float" office:value="0.0136399">
                <text:p>0.0136399</text:p>
              </table:table-cell>
              <table:table-cell office:value-type="float" office:value="0.129604">
                <text:p>0.129604</text:p>
              </table:table-cell>
              <table:table-cell office:value-type="float" office:value="0.0346771">
                <text:p>0.034677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23201">
                <text:p>0.0123201</text:p>
              </table:table-cell>
              <table:table-cell office:value-type="float" office:value="0.0128027">
                <text:p>0.0128027</text:p>
              </table:table-cell>
              <table:table-cell office:value-type="float" office:value="0.128021">
                <text:p>0.128021</text:p>
              </table:table-cell>
              <table:table-cell office:value-type="float" office:value="0.0339267">
                <text:p>0.0339267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123955">
                <text:p>0.0123955</text:p>
              </table:table-cell>
              <table:table-cell office:value-type="float" office:value="0.0132029">
                <text:p>0.0132029</text:p>
              </table:table-cell>
              <table:table-cell office:value-type="float" office:value="0.129595">
                <text:p>0.129595</text:p>
              </table:table-cell>
              <table:table-cell office:value-type="float" office:value="0.0358587">
                <text:p>0.0358587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124399">
                <text:p>0.0124399</text:p>
              </table:table-cell>
              <table:table-cell office:value-type="float" office:value="0.0129509">
                <text:p>0.0129509</text:p>
              </table:table-cell>
              <table:table-cell office:value-type="float" office:value="0.129441">
                <text:p>0.129441</text:p>
              </table:table-cell>
              <table:table-cell office:value-type="float" office:value="0.0365895">
                <text:p>0.0365895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124971">
                <text:p>0.0124971</text:p>
              </table:table-cell>
              <table:table-cell office:value-type="float" office:value="0.0129021">
                <text:p>0.0129021</text:p>
              </table:table-cell>
              <table:table-cell office:value-type="float" office:value="0.129066">
                <text:p>0.129066</text:p>
              </table:table-cell>
              <table:table-cell office:value-type="float" office:value="0.0362791">
                <text:p>0.0362791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124805">
                <text:p>0.0124805</text:p>
              </table:table-cell>
              <table:table-cell office:value-type="float" office:value="0.0133667">
                <text:p>0.0133667</text:p>
              </table:table-cell>
              <table:table-cell office:value-type="float" office:value="0.134554">
                <text:p>0.134554</text:p>
              </table:table-cell>
              <table:table-cell office:value-type="float" office:value="0.0356854">
                <text:p>0.0356854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131515">
                <text:p>0.0131515</text:p>
              </table:table-cell>
              <table:table-cell office:value-type="float" office:value="0.0143276">
                <text:p>0.0143276</text:p>
              </table:table-cell>
              <table:table-cell office:value-type="float" office:value="0.136037">
                <text:p>0.136037</text:p>
              </table:table-cell>
              <table:table-cell office:value-type="float" office:value="0.0364183">
                <text:p>0.0364183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126548">
                <text:p>0.0126548</text:p>
              </table:table-cell>
              <table:table-cell office:value-type="float" office:value="0.0132607">
                <text:p>0.0132607</text:p>
              </table:table-cell>
              <table:table-cell office:value-type="float" office:value="0.133216">
                <text:p>0.133216</text:p>
              </table:table-cell>
              <table:table-cell office:value-type="float" office:value="0.035788">
                <text:p>0.035788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124906">
                <text:p>0.0124906</text:p>
              </table:table-cell>
              <table:table-cell office:value-type="float" office:value="0.0140652">
                <text:p>0.0140652</text:p>
              </table:table-cell>
              <table:table-cell office:value-type="float" office:value="0.133289">
                <text:p>0.133289</text:p>
              </table:table-cell>
              <table:table-cell office:value-type="float" office:value="0.0364422">
                <text:p>0.036442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125646">
                <text:p>0.0125646</text:p>
              </table:table-cell>
              <table:table-cell office:value-type="float" office:value="0.0135567">
                <text:p>0.0135567</text:p>
              </table:table-cell>
              <table:table-cell office:value-type="float" office:value="0.133912">
                <text:p>0.133912</text:p>
              </table:table-cell>
              <table:table-cell office:value-type="float" office:value="0.0362092">
                <text:p>0.036209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140407">
                <text:p>0.0140407</text:p>
              </table:table-cell>
              <table:table-cell office:value-type="float" office:value="0.0141742">
                <text:p>0.0141742</text:p>
              </table:table-cell>
              <table:table-cell office:value-type="float" office:value="0.133931">
                <text:p>0.133931</text:p>
              </table:table-cell>
              <table:table-cell office:value-type="float" office:value="0.0374786">
                <text:p>0.037478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130717">
                <text:p>0.0130717</text:p>
              </table:table-cell>
              <table:table-cell office:value-type="float" office:value="0.0161608">
                <text:p>0.0161608</text:p>
              </table:table-cell>
              <table:table-cell office:value-type="float" office:value="0.13378">
                <text:p>0.13378</text:p>
              </table:table-cell>
              <table:table-cell office:value-type="float" office:value="0.032719">
                <text:p>0.032719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12499">
                <text:p>0.012499</text:p>
              </table:table-cell>
              <table:table-cell office:value-type="float" office:value="0.0140508">
                <text:p>0.0140508</text:p>
              </table:table-cell>
              <table:table-cell office:value-type="float" office:value="0.138488">
                <text:p>0.138488</text:p>
              </table:table-cell>
              <table:table-cell office:value-type="float" office:value="0.0341899">
                <text:p>0.0341899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125796">
                <text:p>0.0125796</text:p>
              </table:table-cell>
              <table:table-cell office:value-type="float" office:value="0.0198355">
                <text:p>0.0198355</text:p>
              </table:table-cell>
              <table:table-cell office:value-type="float" office:value="0.132759">
                <text:p>0.132759</text:p>
              </table:table-cell>
              <table:table-cell office:value-type="float" office:value="0.0339324">
                <text:p>0.0339324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123615">
                <text:p>0.0123615</text:p>
              </table:table-cell>
              <table:table-cell office:value-type="float" office:value="0.0155864">
                <text:p>0.0155864</text:p>
              </table:table-cell>
              <table:table-cell office:value-type="float" office:value="0.126933">
                <text:p>0.126933</text:p>
              </table:table-cell>
              <table:table-cell office:value-type="float" office:value="0.036207">
                <text:p>0.036207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12651">
                <text:p>0.012651</text:p>
              </table:table-cell>
              <table:table-cell office:value-type="float" office:value="0.0144756">
                <text:p>0.0144756</text:p>
              </table:table-cell>
              <table:table-cell office:value-type="float" office:value="0.129632">
                <text:p>0.129632</text:p>
              </table:table-cell>
              <table:table-cell office:value-type="float" office:value="0.0352446">
                <text:p>0.035244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134845">
                <text:p>0.0134845</text:p>
              </table:table-cell>
              <table:table-cell office:value-type="float" office:value="0.0142061">
                <text:p>0.0142061</text:p>
              </table:table-cell>
              <table:table-cell office:value-type="float" office:value="0.13227">
                <text:p>0.13227</text:p>
              </table:table-cell>
              <table:table-cell office:value-type="float" office:value="0.0358524">
                <text:p>0.0358524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127022">
                <text:p>0.0127022</text:p>
              </table:table-cell>
              <table:table-cell office:value-type="float" office:value="0.0135236">
                <text:p>0.0135236</text:p>
              </table:table-cell>
              <table:table-cell office:value-type="float" office:value="0.134212">
                <text:p>0.134212</text:p>
              </table:table-cell>
              <table:table-cell office:value-type="float" office:value="0.0345214">
                <text:p>0.0345214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123719">
                <text:p>0.0123719</text:p>
              </table:table-cell>
              <table:table-cell office:value-type="float" office:value="0.0162845">
                <text:p>0.0162845</text:p>
              </table:table-cell>
              <table:table-cell office:value-type="float" office:value="0.1334">
                <text:p>0.1334</text:p>
              </table:table-cell>
              <table:table-cell office:value-type="float" office:value="0.0357818">
                <text:p>0.035781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124868">
                <text:p>0.0124868</text:p>
              </table:table-cell>
              <table:table-cell office:value-type="float" office:value="0.0150024">
                <text:p>0.0150024</text:p>
              </table:table-cell>
              <table:table-cell office:value-type="float" office:value="0.133167">
                <text:p>0.133167</text:p>
              </table:table-cell>
              <table:table-cell office:value-type="float" office:value="0.0358762">
                <text:p>0.035876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128452">
                <text:p>0.0128452</text:p>
              </table:table-cell>
              <table:table-cell office:value-type="float" office:value="0.0142843">
                <text:p>0.0142843</text:p>
              </table:table-cell>
              <table:table-cell office:value-type="float" office:value="0.13702">
                <text:p>0.13702</text:p>
              </table:table-cell>
              <table:table-cell office:value-type="float" office:value="0.0348297">
                <text:p>0.034829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122687">
                <text:p>0.0122687</text:p>
              </table:table-cell>
              <table:table-cell office:value-type="float" office:value="0.0131562">
                <text:p>0.0131562</text:p>
              </table:table-cell>
              <table:table-cell office:value-type="float" office:value="0.127579">
                <text:p>0.127579</text:p>
              </table:table-cell>
              <table:table-cell office:value-type="float" office:value="0.0343786">
                <text:p>0.034378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124371">
                <text:p>0.0124371</text:p>
              </table:table-cell>
              <table:table-cell office:value-type="float" office:value="0.0155098">
                <text:p>0.0155098</text:p>
              </table:table-cell>
              <table:table-cell office:value-type="float" office:value="0.128119">
                <text:p>0.128119</text:p>
              </table:table-cell>
              <table:table-cell office:value-type="float" office:value="0.0346135">
                <text:p>0.0346135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128328">
                <text:p>0.0128328</text:p>
              </table:table-cell>
              <table:table-cell office:value-type="float" office:value="0.0143698">
                <text:p>0.0143698</text:p>
              </table:table-cell>
              <table:table-cell office:value-type="float" office:value="0.128312">
                <text:p>0.128312</text:p>
              </table:table-cell>
              <table:table-cell office:value-type="float" office:value="0.0349063">
                <text:p>0.0349063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134165">
                <text:p>0.0134165</text:p>
              </table:table-cell>
              <table:table-cell office:value-type="float" office:value="0.0140502">
                <text:p>0.0140502</text:p>
              </table:table-cell>
              <table:table-cell office:value-type="float" office:value="0.127847">
                <text:p>0.127847</text:p>
              </table:table-cell>
              <table:table-cell office:value-type="float" office:value="0.0346797">
                <text:p>0.0346797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122959">
                <text:p>0.0122959</text:p>
              </table:table-cell>
              <table:table-cell office:value-type="float" office:value="0.0136742">
                <text:p>0.0136742</text:p>
              </table:table-cell>
              <table:table-cell office:value-type="float" office:value="0.12792">
                <text:p>0.12792</text:p>
              </table:table-cell>
              <table:table-cell office:value-type="float" office:value="0.0360246">
                <text:p>0.036024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123483">
                <text:p>0.0123483</text:p>
              </table:table-cell>
              <table:table-cell office:value-type="float" office:value="0.0150893">
                <text:p>0.0150893</text:p>
              </table:table-cell>
              <table:table-cell office:value-type="float" office:value="0.127408">
                <text:p>0.127408</text:p>
              </table:table-cell>
              <table:table-cell office:value-type="float" office:value="0.0354985">
                <text:p>0.035498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136791">
                <text:p>0.0136791</text:p>
              </table:table-cell>
              <table:table-cell office:value-type="float" office:value="0.0141217">
                <text:p>0.0141217</text:p>
              </table:table-cell>
              <table:table-cell office:value-type="float" office:value="0.128451">
                <text:p>0.128451</text:p>
              </table:table-cell>
              <table:table-cell office:value-type="float" office:value="0.0387124">
                <text:p>0.0387124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136634">
                <text:p>0.0136634</text:p>
              </table:table-cell>
              <table:table-cell office:value-type="float" office:value="0.0133764">
                <text:p>0.0133764</text:p>
              </table:table-cell>
              <table:table-cell office:value-type="float" office:value="0.130865">
                <text:p>0.130865</text:p>
              </table:table-cell>
              <table:table-cell office:value-type="float" office:value="0.0351947">
                <text:p>0.0351947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125025">
                <text:p>0.0125025</text:p>
              </table:table-cell>
              <table:table-cell office:value-type="float" office:value="0.0131301">
                <text:p>0.0131301</text:p>
              </table:table-cell>
              <table:table-cell office:value-type="float" office:value="0.128639">
                <text:p>0.128639</text:p>
              </table:table-cell>
              <table:table-cell office:value-type="float" office:value="0.0340609">
                <text:p>0.0340609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12369">
                <text:p>0.012369</text:p>
              </table:table-cell>
              <table:table-cell office:value-type="float" office:value="0.0134201">
                <text:p>0.0134201</text:p>
              </table:table-cell>
              <table:table-cell office:value-type="float" office:value="0.127444">
                <text:p>0.127444</text:p>
              </table:table-cell>
              <table:table-cell office:value-type="float" office:value="0.0354247">
                <text:p>0.035424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1253">
                <text:p>0.01253</text:p>
              </table:table-cell>
              <table:table-cell office:value-type="float" office:value="0.0153652">
                <text:p>0.0153652</text:p>
              </table:table-cell>
              <table:table-cell office:value-type="float" office:value="0.127716">
                <text:p>0.127716</text:p>
              </table:table-cell>
              <table:table-cell office:value-type="float" office:value="0.0352146">
                <text:p>0.035214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141044">
                <text:p>0.0141044</text:p>
              </table:table-cell>
              <table:table-cell office:value-type="float" office:value="0.0144265">
                <text:p>0.0144265</text:p>
              </table:table-cell>
              <table:table-cell office:value-type="float" office:value="0.129237">
                <text:p>0.129237</text:p>
              </table:table-cell>
              <table:table-cell office:value-type="float" office:value="0.0349624">
                <text:p>0.0349624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132419">
                <text:p>0.0132419</text:p>
              </table:table-cell>
              <table:table-cell office:value-type="float" office:value="0.0156326">
                <text:p>0.0156326</text:p>
              </table:table-cell>
              <table:table-cell office:value-type="float" office:value="0.12768">
                <text:p>0.12768</text:p>
              </table:table-cell>
              <table:table-cell office:value-type="float" office:value="0.0360996">
                <text:p>0.036099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123172">
                <text:p>0.0123172</text:p>
              </table:table-cell>
              <table:table-cell office:value-type="float" office:value="0.0137006">
                <text:p>0.0137006</text:p>
              </table:table-cell>
              <table:table-cell office:value-type="float" office:value="0.127933">
                <text:p>0.127933</text:p>
              </table:table-cell>
              <table:table-cell office:value-type="float" office:value="0.0365232">
                <text:p>0.036523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129298">
                <text:p>0.0129298</text:p>
              </table:table-cell>
              <table:table-cell office:value-type="float" office:value="0.0134616">
                <text:p>0.0134616</text:p>
              </table:table-cell>
              <table:table-cell office:value-type="float" office:value="0.127757">
                <text:p>0.127757</text:p>
              </table:table-cell>
              <table:table-cell office:value-type="float" office:value="0.0350483">
                <text:p>0.0350483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124739">
                <text:p>0.0124739</text:p>
              </table:table-cell>
              <table:table-cell office:value-type="float" office:value="0.0142248">
                <text:p>0.0142248</text:p>
              </table:table-cell>
              <table:table-cell office:value-type="float" office:value="0.131784">
                <text:p>0.131784</text:p>
              </table:table-cell>
              <table:table-cell office:value-type="float" office:value="0.0372032">
                <text:p>0.037203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125984">
                <text:p>0.0125984</text:p>
              </table:table-cell>
              <table:table-cell office:value-type="float" office:value="0.0127943">
                <text:p>0.0127943</text:p>
              </table:table-cell>
              <table:table-cell office:value-type="float" office:value="0.132414">
                <text:p>0.132414</text:p>
              </table:table-cell>
              <table:table-cell office:value-type="float" office:value="0.0396221">
                <text:p>0.039622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124121">
                <text:p>0.0124121</text:p>
              </table:table-cell>
              <table:table-cell office:value-type="float" office:value="0.0141426">
                <text:p>0.0141426</text:p>
              </table:table-cell>
              <table:table-cell office:value-type="float" office:value="0.130721">
                <text:p>0.130721</text:p>
              </table:table-cell>
              <table:table-cell office:value-type="float" office:value="0.0361038">
                <text:p>0.036103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130343">
                <text:p>0.0130343</text:p>
              </table:table-cell>
              <table:table-cell office:value-type="float" office:value="0.0137595">
                <text:p>0.0137595</text:p>
              </table:table-cell>
              <table:table-cell office:value-type="float" office:value="0.133102">
                <text:p>0.133102</text:p>
              </table:table-cell>
              <table:table-cell office:value-type="float" office:value="0.035815">
                <text:p>0.035815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131421">
                <text:p>0.0131421</text:p>
              </table:table-cell>
              <table:table-cell office:value-type="float" office:value="0.0139409">
                <text:p>0.0139409</text:p>
              </table:table-cell>
              <table:table-cell office:value-type="float" office:value="0.135051">
                <text:p>0.135051</text:p>
              </table:table-cell>
              <table:table-cell office:value-type="float" office:value="0.0347249">
                <text:p>0.0347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6.2$Windows_X86_64 LibreOffice_project/b4b39682cd9868fa725bc664aff94278d315bd0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